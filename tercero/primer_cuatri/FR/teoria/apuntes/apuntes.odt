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0000000A5C3579DC4.png" manifest:media-type="image/png"/>
  <manifest:file-entry manifest:full-path="Pictures/10000001000001B2000000F5C7C618B3.png" manifest:media-type="image/png"/>
  <manifest:file-entry manifest:full-path="Pictures/1000000100000124000001218E3237A3.png" manifest:media-type="image/png"/>
  <manifest:file-entry manifest:full-path="Pictures/1000000100000213000000A726F9C6D8.png" manifest:media-type="image/png"/>
  <manifest:file-entry manifest:full-path="Pictures/10000001000003030000010AA7ACC91E.png" manifest:media-type="image/png"/>
  <manifest:file-entry manifest:full-path="Pictures/10000001000003EA00000214F14849E0.png" manifest:media-type="image/png"/>
  <manifest:file-entry manifest:full-path="Pictures/10000001000001AB0000026AB91CC37B.png" manifest:media-type="image/png"/>
  <manifest:file-entry manifest:full-path="Pictures/10000001000001A1000001FBC9E764B4.png" manifest:media-type="image/png"/>
  <manifest:file-entry manifest:full-path="Pictures/10000001000001960000007B1B26A990.png" manifest:media-type="image/png"/>
  <manifest:file-entry manifest:full-path="Pictures/10000001000001960000007BDF5E8D21.png" manifest:media-type="image/png"/>
  <manifest:file-entry manifest:full-path="Pictures/1000000100000355000001E9B1F3F3A0.png" manifest:media-type="image/png"/>
  <manifest:file-entry manifest:full-path="Pictures/10000001000003840000024ECDD33DCC.png" manifest:media-type="image/png"/>
  <manifest:file-entry manifest:full-path="Pictures/10000001000001960000007BA14AAFE5.png" manifest:media-type="image/png"/>
  <manifest:file-entry manifest:full-path="Pictures/100000010000030100000153186CB527.png" manifest:media-type="image/png"/>
  <manifest:file-entry manifest:full-path="Pictures/100000010000022300000176D2346D51.png" manifest:media-type="image/png"/>
  <manifest:file-entry manifest:full-path="Pictures/10000001000003B700000189B99761C2.png" manifest:media-type="image/png"/>
  <manifest:file-entry manifest:full-path="Pictures/100000010000017D000002568477B6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82550"/>
    </style:style>
    <style:style style:name="P2" style:family="paragraph" style:parent-style-name="Text_20_body">
      <style:text-properties officeooo:paragraph-rsid="0009ea18"/>
    </style:style>
    <style:style style:name="P3" style:family="paragraph" style:parent-style-name="Text_20_body">
      <style:paragraph-properties fo:text-align="start" style:justify-single-word="false"/>
      <style:text-properties officeooo:rsid="00082550" officeooo:paragraph-rsid="00082550"/>
    </style:style>
    <style:style style:name="P4" style:family="paragraph" style:parent-style-name="Title">
      <style:paragraph-properties fo:text-align="start" style:justify-single-word="false"/>
      <style:text-properties officeooo:rsid="00082550" officeooo:paragraph-rsid="00082550"/>
    </style:style>
    <style:style style:name="P5" style:family="paragraph" style:parent-style-name="Text_20_body">
      <style:text-properties officeooo:rsid="00082550" officeooo:paragraph-rsid="00082550"/>
    </style:style>
    <style:style style:name="P6" style:family="paragraph" style:parent-style-name="Text_20_body">
      <style:text-properties fo:font-weight="bold" officeooo:paragraph-rsid="00082550" style:font-weight-asian="bold" style:font-weight-complex="bold"/>
    </style:style>
    <style:style style:name="P7" style:family="paragraph" style:parent-style-name="Text_20_body">
      <style:text-properties fo:font-weight="bold" officeooo:paragraph-rsid="000a1ffe" style:font-weight-asian="bold" style:font-weight-complex="bold"/>
    </style:style>
    <style:style style:name="P8" style:family="paragraph" style:parent-style-name="Text_20_body">
      <style:text-properties fo:font-weight="bold" officeooo:rsid="000cc65b" officeooo:paragraph-rsid="000cc65b" style:font-weight-asian="bold" style:font-weight-complex="bold"/>
    </style:style>
    <style:style style:name="P9" style:family="paragraph" style:parent-style-name="Text_20_body">
      <style:text-properties fo:font-weight="bold" officeooo:rsid="000d608e" officeooo:paragraph-rsid="000d608e" style:font-weight-asian="bold" style:font-weight-complex="bold"/>
    </style:style>
    <style:style style:name="P10" style:family="paragraph" style:parent-style-name="Text_20_body">
      <style:text-properties officeooo:paragraph-rsid="000a1ffe"/>
    </style:style>
    <style:style style:name="P11" style:family="paragraph" style:parent-style-name="Text_20_body">
      <style:text-properties fo:color="#c9211e" loext:opacity="100%" officeooo:paragraph-rsid="000a1ffe"/>
    </style:style>
    <style:style style:name="P12" style:family="paragraph" style:parent-style-name="Text_20_body">
      <style:text-properties fo:color="#069a2e" loext:opacity="100%" officeooo:paragraph-rsid="000a1ffe"/>
    </style:style>
    <style:style style:name="P13" style:family="paragraph" style:parent-style-name="Text_20_body">
      <style:text-properties fo:color="#069a2e" loext:opacity="100%"/>
    </style:style>
    <style:style style:name="P14" style:family="paragraph" style:parent-style-name="Text_20_body">
      <style:text-properties fo:color="#069a2e" loext:opacity="100%" fo:font-weight="normal" officeooo:paragraph-rsid="000a1ffe" style:font-weight-asian="normal" style:font-weight-complex="normal"/>
    </style:style>
    <style:style style:name="P15" style:family="paragraph" style:parent-style-name="Text_20_body">
      <style:text-properties officeooo:rsid="000cc65b" officeooo:paragraph-rsid="000cc65b"/>
    </style:style>
    <style:style style:name="P16" style:family="paragraph" style:parent-style-name="Text_20_body">
      <style:text-properties officeooo:rsid="000d608e" officeooo:paragraph-rsid="000d608e"/>
    </style:style>
    <style:style style:name="P17" style:family="paragraph" style:parent-style-name="Heading_20_1">
      <style:text-properties officeooo:rsid="00082550" officeooo:paragraph-rsid="00082550"/>
    </style:style>
    <style:style style:name="P18" style:family="paragraph" style:parent-style-name="Heading_20_3">
      <style:text-properties officeooo:paragraph-rsid="0009ea18"/>
    </style:style>
    <style:style style:name="P19" style:family="paragraph" style:parent-style-name="Heading_20_3">
      <style:text-properties officeooo:rsid="000cc65b" officeooo:paragraph-rsid="000cc65b"/>
    </style:style>
    <style:style style:name="P20" style:family="paragraph" style:parent-style-name="Heading_20_3">
      <style:text-properties officeooo:rsid="000d608e" officeooo:paragraph-rsid="000d608e"/>
    </style:style>
    <style:style style:name="P21" style:family="paragraph" style:parent-style-name="Heading_20_3">
      <style:text-properties officeooo:rsid="000eee3f" officeooo:paragraph-rsid="000eee3f"/>
    </style:style>
    <style:style style:name="P22" style:family="paragraph" style:parent-style-name="Heading_20_3">
      <style:text-properties officeooo:rsid="00104751" officeooo:paragraph-rsid="00104751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>
      <style:text-properties officeooo:rsid="000d608e" officeooo:paragraph-rsid="000d608e"/>
    </style:style>
    <style:style style:name="P27" style:family="paragraph" style:parent-style-name="Text_20_body" style:list-style-name="L5">
      <style:text-properties officeooo:rsid="000d608e" officeooo:paragraph-rsid="000d608e"/>
    </style:style>
    <style:style style:name="P28" style:family="paragraph" style:parent-style-name="Text_20_body">
      <style:text-properties officeooo:rsid="000eee3f" officeooo:paragraph-rsid="000eee3f"/>
    </style:style>
    <style:style style:name="P29" style:family="paragraph" style:parent-style-name="Text_20_body" style:list-style-name="L7">
      <style:text-properties officeooo:rsid="000eee3f" officeooo:paragraph-rsid="000eee3f"/>
    </style:style>
    <style:style style:name="P30" style:family="paragraph" style:parent-style-name="Text_20_body" style:list-style-name="L8">
      <style:text-properties officeooo:rsid="000eee3f" officeooo:paragraph-rsid="000eee3f"/>
    </style:style>
    <style:style style:name="P31" style:family="paragraph" style:parent-style-name="Text_20_body">
      <style:text-properties officeooo:rsid="000eee3f" officeooo:paragraph-rsid="001043a4"/>
    </style:style>
    <style:style style:name="P32" style:family="paragraph" style:parent-style-name="Text_20_body">
      <style:text-properties officeooo:paragraph-rsid="001043a4"/>
    </style:style>
    <style:style style:name="P33" style:family="paragraph" style:parent-style-name="Text_20_body" style:list-style-name="L9">
      <style:text-properties officeooo:rsid="001043a4" officeooo:paragraph-rsid="001043a4"/>
    </style:style>
    <style:style style:name="P34" style:family="paragraph" style:parent-style-name="Text_20_body" style:list-style-name="L10">
      <style:text-properties officeooo:rsid="001043a4" officeooo:paragraph-rsid="001043a4"/>
    </style:style>
    <style:style style:name="P35" style:family="paragraph" style:parent-style-name="Text_20_body" style:list-style-name="L9">
      <style:text-properties officeooo:paragraph-rsid="001043a4"/>
    </style:style>
    <style:style style:name="P36" style:family="paragraph" style:parent-style-name="Text_20_body" style:list-style-name="L9">
      <style:text-properties officeooo:rsid="00104751" officeooo:paragraph-rsid="00104751"/>
    </style:style>
    <style:style style:name="P37" style:family="paragraph" style:parent-style-name="Text_20_body">
      <style:text-properties officeooo:rsid="0010c221" officeooo:paragraph-rsid="0010c221"/>
    </style:style>
    <style:style style:name="P38" style:family="paragraph" style:parent-style-name="Text_20_body" style:list-style-name="L11">
      <style:text-properties officeooo:rsid="0010c221" officeooo:paragraph-rsid="0010c221"/>
    </style:style>
    <style:style style:name="P39" style:family="paragraph" style:parent-style-name="Text_20_body" style:list-style-name="L12">
      <style:text-properties officeooo:rsid="0010c221" officeooo:paragraph-rsid="0010c221"/>
    </style:style>
    <style:style style:name="P40" style:family="paragraph" style:parent-style-name="Text_20_body">
      <style:text-properties fo:font-weight="bold" officeooo:rsid="00110b40" officeooo:paragraph-rsid="00110b40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ffbf00" loext:opacity="100%"/>
    </style:style>
    <style:style style:name="T3" style:family="text">
      <style:text-properties fo:color="#ffbf00" loext:opacity="100%" fo:font-weight="normal" style:font-weight-asian="normal" style:font-weight-complex="normal"/>
    </style:style>
    <style:style style:name="T4" style:family="text">
      <style:text-properties fo:color="#069a2e" loext:opacity="100%"/>
    </style:style>
    <style:style style:name="T5" style:family="text">
      <style:text-properties fo:color="#069a2e" loext:opacity="100%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ff0000" loext:opacity="100%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4751" style:font-weight-asian="bold" style:font-weight-complex="bold"/>
    </style:style>
    <style:style style:name="T10" style:family="text">
      <style:text-properties officeooo:rsid="000eee3f"/>
    </style:style>
    <style:style style:name="T11" style:family="text">
      <style:text-properties officeooo:rsid="001043a4"/>
    </style:style>
    <style:style style:name="T12" style:family="text">
      <style:text-properties officeooo:rsid="00104751"/>
    </style:style>
    <style:style style:name="T13" style:family="text">
      <style:text-properties officeooo:rsid="00110b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R</text:p>
      <text:p text:style-name="P3"/>
      <text:h text:style-name="P17" text:outline-level="1">TEMA 1</text:h>
      <text:h text:style-name="P18" text:outline-level="3">SISTEMAS DE COMUNICACIÓN Y REDES</text:h>
      <text:p text:style-name="P2">Sistema de comunicación: infraestructura que permite el intercambio de información.</text:p>
      <text:p text:style-name="P2">Red: sistema de comunicación con sistemas terminales, autónomos y que permite un intercambio eficaz y transparente de la información.</text:p>
      <text:p text:style-name="Text_20_body"><draw:frame draw:style-name="fr1" draw:name="Imagen1" text:anchor-type="char" svg:x="1.429cm" svg:y="-0.016cm" svg:width="14.085cm" svg:height="4.86cm" draw:z-index="0"><draw:image xlink:href="Pictures/10000001000003030000010AA7ACC91E.png" xlink:type="simple" xlink:show="embed" xlink:actuate="onLoad" draw:mime-type="image/png"/></draw:frame></text:p>
      <text:p text:style-name="Text_20_body">Las redes permiten compartir recursos, facilitan la escalabilidad, mejoran la eficacia y la robustez y reducen costes.</text:p>
      <text:p text:style-name="Text_20_body"/>
      <text:p text:style-name="Text_20_body">Clásificación de las redes:</text:p>
      <text:p text:style-name="Text_20_body"><text:tab/>Por cobertura geográfica</text:p>
      <text:list text:style-name="L1">
        <text:list-item>
          <text:p text:style-name="P23">LAN</text:p>
        </text:list-item>
        <text:list-item>
          <text:p text:style-name="P23">MAN </text:p>
        </text:list-item>
        <text:list-item>
          <text:p text:style-name="P23">WAN</text:p>
        </text:list-item>
      </text:list>
      <text:p text:style-name="Text_20_body"><text:tab/>Por tecnología de transmisión o uso del canal de comunicación</text:p>
      <text:list text:style-name="L2">
        <text:list-item>
          <text:p text:style-name="P24">Redes de difusión o canal compartido(Wifi, datos, bluetooth)</text:p>
        </text:list-item>
        <text:list-item>
          <text:p text:style-name="P24">Redes punto a punto(fibra, ADSL)</text:p>
        </text:list-item>
      </text:list>
      <text:p text:style-name="Text_20_body"/>
      <text:p text:style-name="Text_20_body">Estructura y elementos de una red:</text:p>
      <text:p text:style-name="Text_20_body"><text:tab/>Host: sistemas terminales autónomos.</text:p>
      <text:p text:style-name="Text_20_body"><text:tab/>Subred: infraestructura para el transporte de la información</text:p>
      <text:list text:style-name="L3">
        <text:list-item>
          <text:p text:style-name="P25">Líneas de transmisión</text:p>
        </text:list-item>
        <text:list-item>
          <text:p text:style-name="P25"><text:soft-page-break/>Nodos o elementos de conmutación: routers / switches</text:p>
        </text:list-item>
      </text:list>
      <text:p text:style-name="Text_20_body"><draw:frame draw:style-name="fr1" draw:name="Imagen3" text:anchor-type="char" svg:x="9.361cm" svg:y="-0.014cm" svg:width="8.759cm" svg:height="12.677cm" draw:z-index="2"><draw:image xlink:href="Pictures/10000001000001AB0000026AB91CC37B.png" xlink:type="simple" xlink:show="embed" xlink:actuate="onLoad" draw:mime-type="image/png"/></draw:frame></text:p>
      <text:p text:style-name="Text_20_body"><draw:frame draw:style-name="fr1" draw:name="Imagen2" text:anchor-type="char" svg:x="-1.351cm" svg:y="1.482cm" svg:width="11.07cm" svg:height="4.879cm" draw:z-index="1"><draw:image xlink:href="Pictures/100000010000030100000153186CB527.png" xlink:type="simple" xlink:show="embed" xlink:actuate="onLoad" draw:mime-type="image/png"/></draw:frame>­</text:p>
      <text:h text:style-name="Heading_20_3" text:outline-level="3" text:is-list-header="true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DISEÑO Y ESTANDARIZACIÓN DE REDES</text:h>
      <text:p text:style-name="P6"><draw:frame draw:style-name="fr1" draw:name="Imagen4" text:anchor-type="char" svg:x="1.889cm" svg:y="0.397cm" svg:width="7.989cm" svg:height="9.712cm" draw:z-index="3"><draw:image xlink:href="Pictures/10000001000001A1000001FBC9E764B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Modelo OSI<draw:frame draw:style-name="fr1" draw:name="Imagen5" text:anchor-type="char" svg:x="8.897cm" svg:y="-0.268cm" svg:width="7.038cm" svg:height="2.133cm" draw:z-index="4"><draw:image xlink:href="Pictures/10000001000001960000007B1B26A990.png" xlink:type="simple" xlink:show="embed" xlink:actuate="onLoad" draw:mime-type="image/png"/></draw:frame></text:p>
      <text:p text:style-name="P1"><text:tab/><text:span text:style-name="T1">Capa o nivel físico</text:span></text:p>
      <text:p text:style-name="P11"><text:tab/>Capa o nivel de enlace<draw:frame draw:style-name="fr1" draw:name="Imagen6" text:anchor-type="char" svg:x="9.472cm" svg:y="0.25cm" svg:width="6.578cm" svg:height="1.993cm" draw:z-index="5"><draw:image xlink:href="Pictures/10000001000001960000007BDF5E8D21.png" xlink:type="simple" xlink:show="embed" xlink:actuate="onLoad" draw:mime-type="image/png"/></draw:frame></text:p>
      <text:p text:style-name="P10"><text:tab/><text:span text:style-name="T2">Capa o nivel de red</text:span></text:p>
      <text:p text:style-name="P10"><text:tab/><text:span text:style-name="T4">Capa o nivel de transporte</text:span></text:p>
      <text:p text:style-name="P12"><text:tab/>Capa o nivel de sesión<draw:frame draw:style-name="fr1" draw:name="Imagen7" text:anchor-type="char" svg:x="9.125cm" svg:y="-0.085cm" svg:width="7.16cm" svg:height="2.17cm" draw:z-index="6"><draw:image xlink:href="Pictures/10000001000001960000007BA14AAFE5.png" xlink:type="simple" xlink:show="embed" xlink:actuate="onLoad" draw:mime-type="image/png"/></draw:frame></text:p>
      <text:p text:style-name="P13"><text:tab/>Capa o nivel de presentación</text:p>
      <text:p text:style-name="P12"><text:tab/>Capa o nivel de aplicación</text:p>
      <text:p text:style-name="P1"/>
      <text:p text:style-name="P7">Modelo TCP/IP</text:p>
      <text:p text:style-name="P7"><text:tab/><text:span text:style-name="T7">Red subyacente</text:span></text:p>
      <text:p text:style-name="P7"><text:span text:style-name="T6"><text:tab/></text:span><text:span text:style-name="T3">Capa o nivel de red</text:span></text:p>
      <text:p text:style-name="P7"><text:span text:style-name="T6"><text:tab/></text:span><text:span text:style-name="T5">Capa o nivel de transporte</text:span></text:p>
      <text:p text:style-name="P14"><text:tab/>Capa o nivel de aplicación</text:p>
      <text:p text:style-name="P1"/>
      <text:h text:style-name="Heading_20_3" text:outline-level="3">TERMINOLOGÍA, CONCEPTOS Y SERVICIOS</text:h>
      <text:p text:style-name="P1"><draw:frame draw:style-name="fr1" draw:name="Imagen8" text:anchor-type="char" svg:x="1.617cm" svg:y="0cm" svg:width="13.183cm" svg:height="8.643cm" draw:z-index="7"><draw:image xlink:href="Pictures/10000001000003840000024ECDD33DCC.png" xlink:type="simple" xlink:show="embed" xlink:actuate="onLoad" draw:mime-type="image/png"/></draw:frame></text:p>
      <text:p text:style-name="P1"/>
      <text:p text:style-name="P1"/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"><text:soft-page-break/>Terminología:</text:p>
      <text:p text:style-name="P15"><text:tab/>Comunicación real(vertical)</text:p>
      <text:p text:style-name="P15"><text:tab/>Comunicación virtual(horizontal)</text:p>
      <text:p text:style-name="P15"><text:tab/>Entidad del nivel N (N en OSI del 1 = físico al 7 = aplicación)</text:p>
      <text:p text:style-name="P15"> <text:tab/>Entidades pares</text:p>
      <text:p text:style-name="P15"><text:tab/>Protocolo</text:p>
      <text:p text:style-name="P15"> <text:tab/>Interfaz</text:p>
      <text:p text:style-name="P15"> <text:tab/>Servicio</text:p>
      <text:p text:style-name="P15"> <text:tab/>Capa proveedora/usuaria del servicio</text:p>
      <text:p text:style-name="P15"> <text:tab/>Pila de protocolos</text:p>
      <text:p text:style-name="P15"> <text:tab/>Arquitectura de red = Modelo de referencia + Pila de protocolos</text:p>
      <text:p text:style-name="P15"/>
      <text:p text:style-name="P15"><text:span text:style-name="T8">¿Qué garantiza el intercambio de información transparente entre hosts?</text:span> Compartir una arquitectura de red extremo a extremo.</text:p>
      <text:h text:style-name="P19" text:outline-level="3" text:is-list-header="true"><draw:frame draw:style-name="fr1" draw:name="Imagen9" text:anchor-type="char" svg:x="1.898cm" svg:y="1.005cm" svg:width="13.206cm" svg:height="5.456cm" draw:z-index="8"><draw:image xlink:href="Pictures/10000001000003B700000189B99761C2.png" xlink:type="simple" xlink:show="embed" xlink:actuate="onLoad" draw:mime-type="image/png"/></draw:frame></text:h>
      <text:p text:style-name="P9"><draw:frame draw:style-name="fr1" draw:name="Imagen10" text:anchor-type="char" svg:x="1.54cm" svg:y="6.548cm" svg:width="12.547cm" svg:height="6.66cm" draw:z-index="9"><draw:image xlink:href="Pictures/10000001000003EA00000214F14849E0.png" xlink:type="simple" xlink:show="embed" xlink:actuate="onLoad" draw:mime-type="image/png"/></draw:frame>Retardos en la comunicación</text:p>
      <text:p text:style-name="Text_20_body"/>
      <text:h text:style-name="P20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style-name="L4">
        <text:list-item>
          <text:p text:style-name="P26"><text:soft-page-break/>Orientado a conexión (SOC)<draw:frame draw:style-name="fr1" draw:name="Imagen11" text:anchor-type="char" svg:x="10.709cm" svg:y="-0.321cm" svg:width="6.234cm" svg:height="9.783cm" draw:z-index="10"><draw:image xlink:href="Pictures/100000010000017D000002568477B60C.png" xlink:type="simple" xlink:show="embed" xlink:actuate="onLoad" draw:mime-type="image/png"/></draw:frame></text:p>
        </text:list-item>
        <text:list-item>
          <text:p text:style-name="P26">No orientado a conexión (SNOC)</text:p>
        </text:list-item>
        <text:list-item>
          <text:p text:style-name="P26">Confirmado (fiable)</text:p>
        </text:list-item>
        <text:list-item>
          <text:p text:style-name="P26">No confirmado (no fiable)</text:p>
        </text:list-item>
      </text:list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 text:is-list-header="true">INTERNET: TOPOLOGÍA Y DIRECCIONAMIENTO</text:h>
      <text:p text:style-name="P16">Internet es topología jerárquica a 3 niveles:</text:p>
      <text:list text:style-name="L5">
        <text:list-item>
          <text:p text:style-name="P27"><text:span text:style-name="T8">Intranets</text:span> (Ethernet-Wifi) de los usuarios: zona pública + zona privada.</text:p>
        </text:list-item>
        <text:list-item>
          <text:p text:style-name="P27"><text:span text:style-name="T8">Redes de acceso </text:span>(xDSL, RDSI, FTTH, etc) de los Internet Service Providers (ISP).</text:p>
        </text:list-item>
        <text:list-item>
          <text:p text:style-name="P27"><text:span text:style-name="T8">Redes troncales</text:span> (ATM, SDH, SONET, MPLS) de grandes operadores de telecomunicaciones.</text:p>
          <text:list>
            <text:list-item>
              <text:p text:style-name="P27">Acuerdos de Peering y Tránsito.</text:p>
            </text:list-item>
            <text:list-item>
              <text:p text:style-name="P27">Tier1, Tier2, Tier3.</text:p>
            </text:list-item>
            <text:list-item>
              <text:p text:style-name="P27">Puntos neutros o PoP o IXP.</text:p>
            </text:list-item>
          </text:list>
        </text:list-item>
      </text:list>
      <text:p text:style-name="P1"><draw:frame draw:style-name="fr1" draw:name="Imagen12" text:anchor-type="char" svg:x="0.748cm" svg:y="0.007cm" svg:width="14.159cm" svg:height="8.117cm" draw:z-index="11"><draw:image xlink:href="Pictures/1000000100000355000001E9B1F3F3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 text:is-list-header="true"><text:soft-page-break/>TEMA 2: <text:span text:style-name="T10">CAPA DE RED</text:span></text:h>
      <text:h text:style-name="P21" text:outline-level="3">INTRODUCCIÓN</text:h>
      <text:p text:style-name="P28">Funciones y servicios de la capa de red en TCP/IP:</text:p>
      <text:list text:style-name="L7">
        <text:list-item>
          <text:p text:style-name="P29">El objetivo de la capa de red es la interconexión de redes.</text:p>
        </text:list-item>
        <text:list-item>
          <text:p text:style-name="P29">Conmutación: acción de cursar tráfico entre los nodos de la red, para determinar el camino que permita llevar la información de un extremo a otro.</text:p>
        </text:list-item>
        <text:list-item>
          <text:p text:style-name="P29">Encaminamiento: encontrar la mejor ruta hasta el destino.</text:p>
        </text:list-item>
      </text:list>
      <text:h text:style-name="P21" text:outline-level="3">CONMUTACIÓN</text:h>
      <text:p text:style-name="P28">Conmutación de circuitos:</text:p>
      <text:list text:style-name="L8">
        <text:list-item>
          <text:p text:style-name="P30">Exige un establecimiento de conexión previo <text:s/>a la transmisión, por ejemplo la red de telefonía básica, actualmente se hace de manera automática pero antiguamente se hacía de manera manual, al llamar te lo cogía un operador y este pinchaba la salida según el lugar al que quisieras llamar.</text:p>
        </text:list-item>
      </text:list>
      <text:p text:style-name="P28"><draw:frame draw:style-name="fr1" draw:name="Imagen14" text:anchor-type="char" svg:x="-1.286cm" svg:y="-0.053cm" svg:width="10.899cm" svg:height="7.452cm" draw:z-index="12"><draw:image xlink:href="Pictures/100000010000022300000176D2346D51.png" xlink:type="simple" xlink:show="embed" xlink:actuate="onLoad" draw:mime-type="image/png"/></draw:frame></text:p>
      <text:p text:style-name="P31"/>
      <text:p text:style-name="P31"><draw:frame draw:style-name="fr1" draw:name="Imagen13" text:anchor-type="char" svg:x="8.5cm" svg:y="0.254cm" svg:width="10.499cm" svg:height="3.304cm" draw:z-index="13"><draw:image xlink:href="Pictures/1000000100000213000000A726F9C6D8.png" xlink:type="simple" xlink:show="embed" xlink:actuate="onLoad" draw:mime-type="image/png"/></draw:frame></text:p>
      <text:p text:style-name="P31"/>
      <text:p text:style-name="P31"/>
      <text:p text:style-name="P31"><text:tab/><text:span text:style-name="T9">AÑADIR VENTAJAS E INCONVENIENTES</text:span></text:p>
      <text:p text:style-name="P31">Conmutación de paquetes:</text:p>
      <text:list text:style-name="L10">
        <text:list-item>
          <text:p text:style-name="P34">Para pegar redes en internet se usa esta conmutación, la cual parte de unidades de datos independientes(paquetes), cada paquete tiene una cabecera con la información de origen y destino.</text:p>
        </text:list-item>
      </text:list>
      <text:list text:style-name="L9">
        <text:list-item>
          <text:p text:style-name="P33">En cada salto almacenamiento y re-envío.</text:p>
        </text:list-item>
        <text:list-item>
          <text:p text:style-name="P35"><text:span text:style-name="T11">Los paquetes pueden ir por diferentes rutas y llegar desordenados, posteriormente el TCP se encargará de </text:span><text:span text:style-name="T12">re</text:span><text:span text:style-name="T11">ordenarlos.</text:span></text:p>
        </text:list-item>
        <text:list-item>
          <text:p text:style-name="P36">Cuenta con un sistema de reenvío de paquetes por si alguno no llega.</text:p>
        </text:list-item>
      </text:list>
      <text:p text:style-name="P32"><draw:frame draw:style-name="fr1" draw:name="Imagen15" text:anchor-type="char" svg:x="2.256cm" svg:y="-0.439cm" svg:width="7.726cm" svg:height="7.646cm" draw:z-index="14"><draw:image xlink:href="Pictures/1000000100000124000001218E3237A3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16" text:anchor-type="char" svg:x="0.774cm" svg:y="0.39cm" svg:width="11.483cm" svg:height="6.482cm" draw:z-index="15"><draw:image xlink:href="Pictures/10000001000001B2000000F5C7C618B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2" text:outline-level="3">PROTOCOLO IP</text:h>
      <text:p text:style-name="P37">Características:</text:p>
      <text:list text:style-name="L11">
        <text:list-item>
          <text:p text:style-name="P38">Protocolo para la interconexión de redes.</text:p>
        </text:list-item>
        <text:list-item>
          <text:p text:style-name="P38">Resuelve el encaminamiento en internet.</text:p>
        </text:list-item>
        <text:list-item>
          <text:p text:style-name="P38">Es un protocolo salto a salto:</text:p>
          <text:list>
            <text:list-item>
              <text:p text:style-name="P38">host&lt;-&gt;router<text:tab/><text:tab/>router&lt;-&gt;router<text:tab/><text:tab/>router←&gt;host</text:p>
            </text:list-item>
          </text:list>
        </text:list-item>
        <text:list-item>
          <text:p text:style-name="P38">Ofrece un servicio no orientado a conexión no fiable.</text:p>
        </text:list-item>
        <text:list-item>
          <text:p text:style-name="P38">Su unidad de datos se denomina datagrama = cabecera+datos</text:p>
        </text:list-item>
        <text:list-item>
          <text:p text:style-name="P38">Es un protocolo de máximo esfuerzo.</text:p>
        </text:list-item>
        <text:list-item>
          <text:p text:style-name="P38">Gestiona la fragmentación: adapta el tamaño del datagrama a las Maximum Transfer Units(MTUs) de las subredes hasta llegar al destino.</text:p>
        </text:list-item>
      </text:list>
      <text:p text:style-name="P37"/>
      <text:p text:style-name="P37">Una direccion ip es de 32 bits, se divide en la parte de la izquierda, la cual es el id de la subred y la derecha la cual es la id del dispositivo. <text:span text:style-name="T13">Para saber que bits corresponden al identificativo de red y al </text:span><text:soft-page-break/><text:span text:style-name="T13">dispositivo se usa la máscara de red, la cuál contiene 1s(unos) en los que pertenecen a la id de la red y 0s(ceros) para los que corresponden al id del dispositivo.</text:span></text:p>
      <text:list text:style-name="L12">
        <text:list-item>
          <text:p text:style-name="P39">Internet adopta un direccionamiento jerárquico, lo cual simplifica las tablas de routing.</text:p>
        </text:list-item>
        <text:list-item>
          <text:p text:style-name="P39">Cada subred cuenta con un identificador único en la intranet(dir. Privada) o en internet(dir. Públicas), dos empresas pueden tener dos dispositivos con el mismo identificador ya que este tiene ese identificador asociado para su propia red, pero las redes públicas no lo pueden compartir</text:p>
          <text:p text:style-name="P39"><draw:frame draw:style-name="fr1" draw:name="Imagen17" text:anchor-type="char" svg:x="0.318cm" svg:y="0.291cm" svg:width="16.365cm" svg:height="3.515cm" draw:z-index="16"><draw:image xlink:href="Pictures/1000000100000300000000A5C3579DC4.png" xlink:type="simple" xlink:show="embed" xlink:actuate="onLoad" draw:mime-type="image/png"/></draw:frame></text:p>
        </text:list-item>
      </text:list>
      <text:p text:style-name="P40">Subred:<text:span text:style-name="T6"> es una sublínea o línea de información que permite realizar conexión DIRECTA a dispositivos IP sin intermediarlos, opera en capa 3. </text:span></text:p>
      <text:p text:style-name="P40">Router: <text:span text:style-name="T6">es un elemento hardware que interconecta redes con distinto prefijo en su IP. Establece la mejor ruta que destinará a cada paquete para que llegue a su destino.</text:span></text:p>
      <text:p text:style-name="P40">Switch:<text:span text:style-name="T6"> dispositivo digital de interconexión de equipos que interconecta dos o más host pasando datos de un segmento a otro según las direcciones MAC de destino.</text:span></text:p>
      <text:p text:style-name="P40"><text:span text:style-name="T6"/></text:p>
      <text:p text:style-name="P40"><text:span text:style-name="T6"/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TEMA 3</text:h>
      <text:p text:style-name="P5">­</text:p>
      <text:p text:style-name="P5"/>
      <text:p text:style-name="P5"/>
      <text:h text:style-name="Heading_20_1" text:outline-level="1">TEMA 4</text:h>
      <text:p text:style-name="P5"/>
      <text:p text:style-name="P5"/>
      <text:p text:style-name="P5"/>
      <text:h text:style-name="Heading_20_1" text:outline-level="1">TEMA 5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7:06:38.451742764</meta:creation-date>
    <meta:generator>LibreOffice/24.2.5.2$Linux_X86_64 LibreOffice_project/420$Build-2</meta:generator>
    <dc:date>2024-10-23T17:02:42.043282060</dc:date>
    <meta:editing-duration>PT48M9S</meta:editing-duration>
    <meta:editing-cycles>3</meta:editing-cycles>
    <meta:document-statistic meta:table-count="0" meta:image-count="17" meta:object-count="0" meta:page-count="12" meta:paragraph-count="96" meta:word-count="828" meta:character-count="4975" meta:non-whitespace-character-count="4247"/>
  </office:meta>
</office:document-meta>
</file>