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C0000020F366F3265.png" manifest:media-type="image/png"/>
  <manifest:file-entry manifest:full-path="Pictures/100000010000033D0000015966E75C32.png" manifest:media-type="image/png"/>
  <manifest:file-entry manifest:full-path="Pictures/1000000100000355000002298400E0B4.png" manifest:media-type="image/png"/>
  <manifest:file-entry manifest:full-path="Pictures/100000010000021D0000018AD3839D37.png" manifest:media-type="image/png"/>
  <manifest:file-entry manifest:full-path="Pictures/10000001000004210000029AFF308D00.png" manifest:media-type="image/png"/>
  <manifest:file-entry manifest:full-path="Pictures/100000010000041D000002841DA823F9.png" manifest:media-type="image/png"/>
  <manifest:file-entry manifest:full-path="Pictures/100000010000038E0000021C74E19A8C.png" manifest:media-type="image/png"/>
  <manifest:file-entry manifest:full-path="Pictures/10000001000003BC0000020FC569B233.png" manifest:media-type="image/png"/>
  <manifest:file-entry manifest:full-path="Pictures/100000010000033C000001F15676C7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8073" officeooo:paragraph-rsid="00158073"/>
    </style:style>
    <style:style style:name="P2" style:family="paragraph" style:parent-style-name="Standard">
      <style:text-properties officeooo:rsid="001621a5" officeooo:paragraph-rsid="001621a5"/>
    </style:style>
    <style:style style:name="P3" style:family="paragraph" style:parent-style-name="Standard">
      <style:text-properties officeooo:rsid="00170567" officeooo:paragraph-rsid="00170567"/>
    </style:style>
    <style:style style:name="P4" style:family="paragraph" style:parent-style-name="Standard">
      <style:text-properties style:text-underline-style="none" officeooo:rsid="00170567" officeooo:paragraph-rsid="00170567"/>
    </style:style>
    <style:style style:name="P5" style:family="paragraph" style:parent-style-name="Standard">
      <style:text-properties officeooo:rsid="00170567" officeooo:paragraph-rsid="00170567"/>
    </style:style>
    <style:style style:name="T1" style:family="text">
      <style:text-properties officeooo:rsid="001621a5"/>
    </style:style>
    <style:style style:name="T2" style:family="text">
      <style:text-properties officeooo:rsid="001705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ncontrar el lenguaje generado por</text:p>
      <text:p text:style-name="P1">S→aAB; <text:tab/>bB→a;<text:tab/><text:tab/>Ab→SBb</text:p>
      <text:p text:style-name="P1">Aa→SaB;B→SA;<text:tab/>B→ab</text:p>
      <text:p text:style-name="P1"/>
      <text:p text:style-name="P1"/>
      <text:p text:style-name="P1"/>
      <text:p text:style-name="P1"><text:span text:style-name="T1">2.</text:span>diapositiva 105-<text:span text:style-name="T1">111</text:span> tema 2</text:p>
      <text:p text:style-name="P1"/>
      <text:p text:style-name="P2">3. Reconocer correos electrónic<text:span text:style-name="T2">o</text:span>s</text:p>
      <text:p text:style-name="P2"/>
      <text:p text:style-name="P3">4. Complemento a 2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n6" text:anchor-type="char" svg:width="17cm" svg:height="10.204cm" draw:z-index="5"><draw:image xlink:href="Pictures/100000010000033C000001F15676C714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2" draw:name="Imagen7" text:anchor-type="char" svg:width="17cm" svg:height="10.088cm" draw:z-index="6"><draw:image xlink:href="Pictures/100000010000038E0000021C74E19A8C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8" text:anchor-type="char" svg:width="17cm" svg:height="10.396cm" draw:z-index="7"><draw:image xlink:href="Pictures/100000010000041D000002841DA823F9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9" text:anchor-type="char" svg:width="17cm" svg:height="10.71cm" draw:z-index="8"><draw:image xlink:href="Pictures/10000001000004210000029AFF308D00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4" draw:name="Imagen5" text:anchor-type="char" svg:width="14.314cm" svg:height="10.425cm" draw:z-index="4"><draw:image xlink:href="Pictures/100000010000021D0000018AD3839D37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n4" text:anchor-type="char" svg:width="17cm" svg:height="11.021cm" draw:z-index="3"><draw:image xlink:href="Pictures/1000000100000355000002298400E0B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1" text:anchor-type="char" svg:x="0.132cm" svg:y="0.355cm" svg:width="17cm" svg:height="9.37cm" draw:z-index="0"><draw:image xlink:href="Pictures/10000001000003BC0000020F366F3265.png" xlink:type="simple" xlink:show="embed" xlink:actuate="onLoad" draw:mime-type="image/png"/></draw:frame><text:soft-page-break/></text:p>
      <text:p text:style-name="P3"/>
      <text:p text:style-name="P3"><draw:frame draw:style-name="fr1" draw:name="Imagen2" text:anchor-type="char" svg:x="0.265cm" svg:y="0.071cm" svg:width="17cm" svg:height="9.37cm" draw:z-index="1"><draw:image xlink:href="Pictures/10000001000003BC0000020FC569B233.png" xlink:type="simple" xlink:show="embed" xlink:actuate="onLoad" draw:mime-type="image/png"/></draw:frame></text:p>
      <text:p text:style-name="P3"/>
      <text:p text:style-name="P3"/>
      <text:p text:style-name="P3"/>
      <text:p text:style-name="P4"><draw:frame draw:style-name="fr1" draw:name="Imagen3" text:anchor-type="char" svg:x="0.476cm" svg:y="0.508cm" svg:width="17cm" svg:height="7.073cm" draw:z-index="2"><draw:image xlink:href="Pictures/100000010000033D0000015966E75C3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6:47:42.737521561</meta:creation-date>
    <dc:date>2025-01-12T13:43:35.124997282</dc:date>
    <meta:editing-duration>PT44M12S</meta:editing-duration>
    <meta:editing-cycles>5</meta:editing-cycles>
    <meta:generator>LibreOffice/24.2.5.2$Linux_X86_64 LibreOffice_project/420$Build-2</meta:generator>
    <meta:document-statistic meta:table-count="0" meta:image-count="9" meta:object-count="0" meta:page-count="7" meta:paragraph-count="6" meta:word-count="23" meta:character-count="154" meta:non-whitespace-character-count="135"/>
  </office:meta>
</office:document-meta>
</file>