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B26D89F5AE.png" manifest:media-type="image/png"/>
  <manifest:file-entry manifest:full-path="Pictures/10000001000004F20000020ABBF46C44.png" manifest:media-type="image/png"/>
  <manifest:file-entry manifest:full-path="Pictures/1000000100000237000003489DE04C23.png" manifest:media-type="image/png"/>
  <manifest:file-entry manifest:full-path="Pictures/10000001000004F7000000AA28DC2F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771" officeooo:paragraph-rsid="0014f771"/>
    </style:style>
    <style:style style:name="P2" style:family="paragraph" style:parent-style-name="Standard">
      <style:text-properties fo:font-size="14pt" fo:font-style="normal" fo:font-weight="bold" officeooo:rsid="0014f771" officeooo:paragraph-rsid="0014f771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2pt" fo:font-style="normal" fo:font-weight="normal" officeooo:rsid="0014f771" officeooo:paragraph-rsid="0014f77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53ee2" officeooo:paragraph-rsid="00153ee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76e5a" officeooo:paragraph-rsid="00176e5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bold" officeooo:rsid="00176e5a" officeooo:paragraph-rsid="00176e5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4f771"/>
    </style:style>
    <style:style style:name="T2" style:family="text">
      <style:text-properties officeooo:rsid="00153e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Á<text:span text:style-name="T1">lvaro García Zafra</text:span></text:p>
      <text:p text:style-name="P1">Grupo A2</text:p>
      <text:p text:style-name="P1"/>
      <text:p text:style-name="P2">Práctica 2 “Cifrado de información sensible usando flex”</text:p>
      <text:p text:style-name="P3">Para la realización de la práctica he decidido crear un programa <text:span text:style-name="T2">f</text:span>lex que “cifra” la información sensible <text:span text:style-name="T2">sustituyendo los caracteres por su correspondiente en el código ascii.</text:span> <text:span text:style-name="T2">P</text:span>ara esto lo que hace es localizar las zonas de texto calificadas como sensibles:</text:p>
      <text:p text:style-name="P3"><text:tab/>CORREO, DNI, FECHAS, IBAN, TELÉFONO, <text:span text:style-name="T2">DOMICILIO</text:span></text:p>
      <text:p text:style-name="P3"/>
      <text:p text:style-name="P4">Para poder realizar esto lo que tiene que hacer es ir recorriendo el texto dado y lo analiza con las expresiones que le he puesto a cada una de las “zonas sensibles”</text:p>
      <text:p text:style-name="P4"/>
      <text:p text:style-name="P4"><draw:frame draw:style-name="fr3" draw:name="Imagen2" text:anchor-type="char" svg:width="19.001cm" svg:height="2.542cm" draw:z-index="1"><draw:image xlink:href="Pictures/10000001000004F7000000AA28DC2F6E.png" xlink:type="simple" xlink:show="embed" xlink:actuate="onLoad" draw:mime-type="image/png"/></draw:frame></text:p>
      <text:p text:style-name="P4"/>
      <text:p text:style-name="P4">Cuándo localiza alguna de ellas expresiones llama a la función que las “cifra” en ascii y las va escribiendo en el fichero de salida, en el caso de que no sea información sensible la copia tal cuál en el fichero.</text:p>
      <text:p text:style-name="P4"><draw:frame draw:style-name="fr2" draw:name="Imagen1" text:anchor-type="char" svg:x="-0.019cm" svg:y="0.065cm" svg:width="10.458cm" svg:height="15.494cm" draw:z-index="0"><draw:image xlink:href="Pictures/1000000100000237000003489DE04C23.png" xlink:type="simple" xlink:show="embed" xlink:actuate="onLoad" draw:mime-type="image/png"/></draw:frame></text:p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Para ejecutar el fichero </text:p>
      <text:p text:style-name="P5">flex++ practica2.l </text:p>
      <text:p text:style-name="P5">g++ lex.yy.cc -o practica2</text:p>
      <text:p text:style-name="P5">./practica2 texto.txt salida.txt </text:p>
      <text:p text:style-name="P5"><draw:frame draw:style-name="fr2" draw:name="Imagen3" text:anchor-type="char" svg:x="0cm" svg:y="0.265cm" svg:width="17cm" svg:height="7.008cm" draw:z-index="2"><draw:image xlink:href="Pictures/10000001000004F20000020ABBF46C44.png" xlink:type="simple" xlink:show="embed" xlink:actuate="onLoad" draw:mime-type="image/png"/></draw:frame></text:p>
      <text:p text:style-name="P5"/>
      <text:p text:style-name="P5"><draw:frame draw:style-name="fr1" draw:name="Imagen4" text:anchor-type="char" svg:width="17cm" svg:height="9.199cm" draw:z-index="3"><draw:image xlink:href="Pictures/10000001000004FB000002B26D89F5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57:55.311509511</meta:creation-date>
    <meta:generator>LibreOffice/24.2.5.2$Linux_X86_64 LibreOffice_project/420$Build-2</meta:generator>
    <dc:date>2025-01-07T22:31:20.159092871</dc:date>
    <meta:editing-duration>PT2M15S</meta:editing-duration>
    <meta:editing-cycles>2</meta:editing-cycles>
    <meta:document-statistic meta:table-count="0" meta:image-count="4" meta:object-count="0" meta:page-count="2" meta:paragraph-count="12" meta:word-count="145" meta:character-count="870" meta:non-whitespace-character-count="730"/>
  </office:meta>
</office:document-meta>
</file>