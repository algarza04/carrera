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55000002298400E0B4.png" manifest:media-type="image/png"/>
  <manifest:file-entry manifest:full-path="Pictures/100000010000021D0000018AD3839D37.png" manifest:media-type="image/png"/>
  <manifest:file-entry manifest:full-path="Pictures/100000010000032A00000139B3DCD480.png" manifest:media-type="image/png"/>
  <manifest:file-entry manifest:full-path="Pictures/10000001000003B8000001E82905D625.png" manifest:media-type="image/png"/>
  <manifest:file-entry manifest:full-path="Pictures/10000001000003BC0000020F366F3265.png" manifest:media-type="image/png"/>
  <manifest:file-entry manifest:full-path="Pictures/10000001000004210000029AFF308D00.png" manifest:media-type="image/png"/>
  <manifest:file-entry manifest:full-path="Pictures/100000010000041D000002841DA823F9.png" manifest:media-type="image/png"/>
  <manifest:file-entry manifest:full-path="Pictures/100000010000038E0000021C74E19A8C.png" manifest:media-type="image/png"/>
  <manifest:file-entry manifest:full-path="Pictures/100000010000033C000001F15676C71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6" text:anchor-type="char" svg:x="1.886cm" svg:y="0.159cm" svg:width="13.707cm" svg:height="8.227cm" draw:z-index="0"><draw:image xlink:href="Pictures/100000010000033C000001F15676C71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1" draw:name="Imagen7" text:anchor-type="char" svg:x="1.198cm" svg:y="0.111cm" svg:width="14.101cm" svg:height="8.366cm" draw:z-index="1"><draw:image xlink:href="Pictures/100000010000038E0000021C74E19A8C.png" xlink:type="simple" xlink:show="embed" xlink:actuate="onLoad" draw:mime-type="image/png"/></draw:frame></text:p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8" text:anchor-type="char" svg:x="0.192cm" svg:y="1.593cm" svg:width="16.194cm" svg:height="9.904cm" draw:z-index="2"><draw:image xlink:href="Pictures/100000010000041D000002841DA823F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9" text:anchor-type="char" svg:x="1.393cm" svg:y="0.684cm" svg:width="13.935cm" svg:height="8.779cm" draw:z-index="3"><draw:image xlink:href="Pictures/10000001000004210000029AFF308D00.png" xlink:type="simple" xlink:show="embed" xlink:actuate="onLoad" draw:mime-type="image/png"/></draw:frame></text:p>
      <text:p text:style-name="Standard"><text:soft-page-break/></text:p>
      <text:p text:style-name="Standard"/>
      <text:p text:style-name="Standard"/>
      <text:p text:style-name="Standard"/>
      <text:p text:style-name="Standard"><draw:frame draw:style-name="fr1" draw:name="Imagen1" text:anchor-type="char" svg:x="0.51cm" svg:y="0.455cm" svg:width="15.141cm" svg:height="8.345cm" draw:z-index="4"><draw:image xlink:href="Pictures/10000001000003BC0000020F366F3265.png" xlink:type="simple" xlink:show="embed" xlink:actuate="onLoad" draw:mime-type="image/png"/></draw:frame><draw:frame draw:style-name="fr1" draw:name="Imagen2" text:anchor-type="char" svg:x="0.51cm" svg:y="9.499cm" svg:width="14.21cm" svg:height="7.285cm" draw:z-index="8"><draw:image xlink:href="Pictures/10000001000003B8000001E82905D62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3" text:anchor-type="char" svg:x="0.85cm" svg:y="0.591cm" svg:width="14.478cm" svg:height="5.593cm" draw:z-index="7"><draw:image xlink:href="Pictures/100000010000032A00000139B3DCD480.png" xlink:type="simple" xlink:show="embed" xlink:actuate="onLoad" draw:mime-type="image/png"/></draw:frame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5" text:anchor-type="char" svg:x="1.198cm" svg:y="0.377cm" svg:width="10.65cm" svg:height="7.756cm" draw:z-index="5"><draw:image xlink:href="Pictures/100000010000021D0000018AD3839D3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4" text:anchor-type="char" svg:x="1.011cm" svg:y="6.86cm" svg:width="13.129cm" svg:height="8.511cm" draw:z-index="6"><draw:image xlink:href="Pictures/1000000100000355000002298400E0B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2T13:42:10.659473125</meta:creation-date>
    <dc:date>2025-01-12T14:47:06.941232344</dc:date>
    <meta:editing-duration>PT17M24S</meta:editing-duration>
    <meta:editing-cycles>2</meta:editing-cycles>
    <meta:generator>LibreOffice/24.2.5.2$Linux_X86_64 LibreOffice_project/420$Build-2</meta:generator>
    <meta:print-date>2025-01-12T14:44:20.678330419</meta:print-date>
    <meta:document-statistic meta:table-count="0" meta:image-count="9" meta:object-count="0" meta:page-count="5" meta:paragraph-count="1" meta:word-count="0" meta:character-count="1" meta:non-whitespace-character-count="0"/>
  </office:meta>
</office:document-meta>
</file>