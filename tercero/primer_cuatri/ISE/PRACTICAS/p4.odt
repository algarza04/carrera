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5cf5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5cf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ra la realización de esta práctica me he informado sobre cual puede ser la mejor versión de phoronix para descargar, la cual según he leido es la ultima estable, por lo que he bajado el url mediante wget https://phoronix-test-suite.com/releases/repo/pts.debian/files/phoronix-test-suite_10.8.4_all.deb y posteriormente lo he instalado con <text:s/>sudo dpkg -i phoronix-test-suite_10.8.4_all.deb.</text:p>
      <text:p text:style-name="Standard"><text:span text:style-name="T2">Siguien</text:span><text:span text:style-name="T3">d</text:span><text:span text:style-name="T2">o</text:span> la documentación hay q ver que test suites están disponibles mediante phoronix-test-suite list-available-suites, y esto muestra que algunos no se han descomprimido, nos dice que instalemos PHP-ZIP, por lo que al instalarlo y volver a hacer el dpkg y probar que los test suites estan disponibles esta vez nos <text:span text:style-name="T1">muestra todos los suites disponibles y no muestra ningún mensaje de erro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11:08:22.453902668</meta:creation-date>
    <dc:date>2024-12-06T11:09:56.357530651</dc:date>
    <meta:editing-duration>PT1M34S</meta:editing-duration>
    <meta:editing-cycles>1</meta:editing-cycles>
    <meta:document-statistic meta:table-count="0" meta:image-count="0" meta:object-count="0" meta:page-count="1" meta:paragraph-count="2" meta:word-count="111" meta:character-count="781" meta:non-whitespace-character-count="671"/>
    <meta:generator>LibreOffice/24.2.5.2$Linux_X86_64 LibreOffice_project/420$Build-2</meta:generator>
  </office:meta>
</office:document-meta>
</file>