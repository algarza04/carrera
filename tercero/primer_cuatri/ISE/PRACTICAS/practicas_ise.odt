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1000000CB7FD74243.png" manifest:media-type="image/png"/>
  <manifest:file-entry manifest:full-path="Pictures/100000010000029A00000084E1899E2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e4eb" officeooo:paragraph-rsid="0009e4eb" style:font-weight-asian="bold" style:font-weight-complex="bold"/>
    </style:style>
    <style:style style:name="P2" style:family="paragraph" style:parent-style-name="Standard">
      <style:text-properties fo:font-weight="bold" officeooo:rsid="000ba7be" officeooo:paragraph-rsid="000ba7be" style:font-weight-asian="bold" style:font-weight-complex="bold"/>
    </style:style>
    <style:style style:name="P3" style:family="paragraph" style:parent-style-name="Standard">
      <style:text-properties fo:font-weight="bold" officeooo:rsid="000ba7be" officeooo:paragraph-rsid="000da84d" style:font-weight-asian="bold" style:font-weight-complex="bold"/>
    </style:style>
    <style:style style:name="P4" style:family="paragraph" style:parent-style-name="Standard">
      <style:text-properties fo:font-weight="bold" officeooo:rsid="000da84d" officeooo:paragraph-rsid="000da84d" style:font-weight-asian="bold" style:font-weight-complex="bold"/>
    </style:style>
    <style:style style:name="P5" style:family="paragraph" style:parent-style-name="Standard">
      <style:text-properties fo:font-weight="bold" officeooo:rsid="000e00cd" officeooo:paragraph-rsid="000e00cd" style:font-weight-asian="bold" style:font-weight-complex="bold"/>
    </style:style>
    <style:style style:name="P6" style:family="paragraph" style:parent-style-name="Standard">
      <style:text-properties fo:font-weight="bold" officeooo:rsid="000e00cd" officeooo:paragraph-rsid="002204e4" style:font-weight-asian="bold" style:font-weight-complex="bold"/>
    </style:style>
    <style:style style:name="P7" style:family="paragraph" style:parent-style-name="Standard">
      <style:text-properties fo:font-weight="bold" officeooo:rsid="000e23f0" officeooo:paragraph-rsid="000e23f0" style:font-weight-asian="bold" style:font-weight-complex="bold"/>
    </style:style>
    <style:style style:name="P8" style:family="paragraph" style:parent-style-name="Standard">
      <style:text-properties fo:font-weight="bold" officeooo:rsid="000e5dfc" officeooo:paragraph-rsid="000e5dfc" style:font-weight-asian="bold" style:font-weight-complex="bold"/>
    </style:style>
    <style:style style:name="P9" style:family="paragraph" style:parent-style-name="Standard">
      <style:text-properties fo:font-weight="bold" officeooo:rsid="001075c6" officeooo:paragraph-rsid="001075c6" style:font-weight-asian="bold" style:font-weight-complex="bold"/>
    </style:style>
    <style:style style:name="P10" style:family="paragraph" style:parent-style-name="Standard">
      <style:text-properties fo:font-weight="bold" officeooo:rsid="001166f1" officeooo:paragraph-rsid="001166f1" style:font-weight-asian="bold" style:font-weight-complex="bold"/>
    </style:style>
    <style:style style:name="P11" style:family="paragraph" style:parent-style-name="Standard">
      <style:text-properties fo:font-weight="bold" officeooo:rsid="0011afc6" officeooo:paragraph-rsid="0011afc6" style:font-weight-asian="bold" style:font-weight-complex="bold"/>
    </style:style>
    <style:style style:name="P12" style:family="paragraph" style:parent-style-name="Standard">
      <style:text-properties fo:font-weight="bold" officeooo:rsid="00127c0a" officeooo:paragraph-rsid="00127c0a" style:font-weight-asian="bold" style:font-weight-complex="bold"/>
    </style:style>
    <style:style style:name="P13" style:family="paragraph" style:parent-style-name="Standard">
      <style:text-properties fo:font-weight="bold" officeooo:rsid="00143acf" officeooo:paragraph-rsid="00143acf" style:font-weight-asian="bold" style:font-weight-complex="bold"/>
    </style:style>
    <style:style style:name="P14" style:family="paragraph" style:parent-style-name="Standard">
      <style:text-properties fo:font-weight="bold" officeooo:rsid="00143acf" officeooo:paragraph-rsid="0019bdaf" style:font-weight-asian="bold" style:font-weight-complex="bold"/>
    </style:style>
    <style:style style:name="P15" style:family="paragraph" style:parent-style-name="Standard">
      <style:text-properties fo:font-weight="bold" officeooo:rsid="00163395" officeooo:paragraph-rsid="00163395" style:font-weight-asian="bold" style:font-weight-complex="bold"/>
    </style:style>
    <style:style style:name="P16" style:family="paragraph" style:parent-style-name="Standard">
      <style:text-properties fo:font-weight="bold" officeooo:rsid="00163395" officeooo:paragraph-rsid="00189353" style:font-weight-asian="bold" style:font-weight-complex="bold"/>
    </style:style>
    <style:style style:name="P17" style:family="paragraph" style:parent-style-name="Standard">
      <style:text-properties fo:font-weight="bold" officeooo:rsid="00199886" officeooo:paragraph-rsid="00199886" style:font-weight-asian="bold" style:font-weight-complex="bold"/>
    </style:style>
    <style:style style:name="P18" style:family="paragraph" style:parent-style-name="Standard">
      <style:text-properties fo:font-weight="bold" officeooo:rsid="0019bdaf" officeooo:paragraph-rsid="0019bdaf" style:font-weight-asian="bold" style:font-weight-complex="bold"/>
    </style:style>
    <style:style style:name="P19" style:family="paragraph" style:parent-style-name="Standard">
      <style:text-properties fo:font-weight="bold" officeooo:rsid="001a18ef" officeooo:paragraph-rsid="001a18ef" style:font-weight-asian="bold" style:font-weight-complex="bold"/>
    </style:style>
    <style:style style:name="P20" style:family="paragraph" style:parent-style-name="Standard">
      <style:text-properties fo:font-weight="bold" officeooo:rsid="001d0f5d" officeooo:paragraph-rsid="001d0f5d" style:font-weight-asian="bold" style:font-weight-complex="bold"/>
    </style:style>
    <style:style style:name="P21" style:family="paragraph" style:parent-style-name="Standard">
      <style:text-properties fo:font-weight="bold" officeooo:rsid="001e397a" officeooo:paragraph-rsid="001e397a" style:font-weight-asian="bold" style:font-weight-complex="bold"/>
    </style:style>
    <style:style style:name="P22" style:family="paragraph" style:parent-style-name="Standard">
      <style:text-properties fo:font-weight="bold" officeooo:rsid="00200566" officeooo:paragraph-rsid="00200566" style:font-weight-asian="bold" style:font-weight-complex="bold"/>
    </style:style>
    <style:style style:name="P23" style:family="paragraph" style:parent-style-name="Standard">
      <style:text-properties fo:font-weight="bold" officeooo:rsid="0027af40" officeooo:paragraph-rsid="0027af40" style:font-weight-asian="bold" style:font-weight-complex="bold"/>
    </style:style>
    <style:style style:name="P24" style:family="paragraph" style:parent-style-name="Standard">
      <style:text-properties fo:font-weight="bold" officeooo:rsid="0027af40" officeooo:paragraph-rsid="00293ab5" style:font-weight-asian="bold" style:font-weight-complex="bold"/>
    </style:style>
    <style:style style:name="P25" style:family="paragraph" style:parent-style-name="Standard">
      <style:text-properties fo:font-weight="bold" officeooo:rsid="00293ab5" officeooo:paragraph-rsid="00293ab5" style:font-weight-asian="bold" style:font-weight-complex="bold"/>
    </style:style>
    <style:style style:name="P26" style:family="paragraph" style:parent-style-name="Standard">
      <style:text-properties fo:font-weight="normal" officeooo:rsid="0009e4eb" officeooo:paragraph-rsid="0009e4eb" style:font-weight-asian="normal" style:font-weight-complex="normal"/>
    </style:style>
    <style:style style:name="P27" style:family="paragraph" style:parent-style-name="Standard">
      <style:text-properties fo:font-weight="normal" officeooo:rsid="000ba7be" officeooo:paragraph-rsid="000ba7be" style:font-weight-asian="normal" style:font-weight-complex="normal"/>
    </style:style>
    <style:style style:name="P28" style:family="paragraph" style:parent-style-name="Standard">
      <style:text-properties fo:font-weight="normal" officeooo:rsid="000da84d" officeooo:paragraph-rsid="000da84d" style:font-weight-asian="normal" style:font-weight-complex="normal"/>
    </style:style>
    <style:style style:name="P29" style:family="paragraph" style:parent-style-name="Standard">
      <style:text-properties fo:font-weight="normal" officeooo:rsid="000e23f0" officeooo:paragraph-rsid="000e23f0" style:font-weight-asian="normal" style:font-weight-complex="normal"/>
    </style:style>
    <style:style style:name="P30" style:family="paragraph" style:parent-style-name="Standard">
      <style:text-properties fo:font-weight="normal" officeooo:rsid="000e5dfc" officeooo:paragraph-rsid="000e5dfc" style:font-weight-asian="normal" style:font-weight-complex="normal"/>
    </style:style>
    <style:style style:name="P31" style:family="paragraph" style:parent-style-name="Standard">
      <style:text-properties fo:font-weight="normal" officeooo:rsid="001075c6" officeooo:paragraph-rsid="001075c6" style:font-weight-asian="normal" style:font-weight-complex="normal"/>
    </style:style>
    <style:style style:name="P32" style:family="paragraph" style:parent-style-name="Standard">
      <style:text-properties fo:font-weight="normal" officeooo:rsid="001166f1" officeooo:paragraph-rsid="001166f1" style:font-weight-asian="normal" style:font-weight-complex="normal"/>
    </style:style>
    <style:style style:name="P33" style:family="paragraph" style:parent-style-name="Standard">
      <style:text-properties fo:font-weight="normal" officeooo:rsid="0011afc6" officeooo:paragraph-rsid="0011afc6" style:font-weight-asian="normal" style:font-weight-complex="normal"/>
    </style:style>
    <style:style style:name="P34" style:family="paragraph" style:parent-style-name="Standard">
      <style:text-properties fo:font-weight="normal" officeooo:rsid="00127c0a" officeooo:paragraph-rsid="00127c0a" style:font-weight-asian="normal" style:font-weight-complex="normal"/>
    </style:style>
    <style:style style:name="P35" style:family="paragraph" style:parent-style-name="Standard">
      <style:text-properties fo:font-weight="normal" officeooo:rsid="000e00cd" officeooo:paragraph-rsid="000e00cd" style:font-weight-asian="normal" style:font-weight-complex="normal"/>
    </style:style>
    <style:style style:name="P36" style:family="paragraph" style:parent-style-name="Standard">
      <style:text-properties fo:font-weight="normal" officeooo:rsid="00163395" officeooo:paragraph-rsid="00163395" style:font-weight-asian="normal" style:font-weight-complex="normal"/>
    </style:style>
    <style:style style:name="P37" style:family="paragraph" style:parent-style-name="Standard">
      <style:text-properties fo:font-weight="normal" officeooo:rsid="00143acf" officeooo:paragraph-rsid="00143acf" style:font-weight-asian="normal" style:font-weight-complex="normal"/>
    </style:style>
    <style:style style:name="P38" style:family="paragraph" style:parent-style-name="Standard">
      <style:text-properties fo:font-weight="normal" officeooo:rsid="001b2db7" officeooo:paragraph-rsid="001b2db7" style:font-weight-asian="normal" style:font-weight-complex="normal"/>
    </style:style>
    <style:style style:name="P39" style:family="paragraph" style:parent-style-name="Standard">
      <style:text-properties fo:font-weight="normal" officeooo:rsid="0019bdaf" officeooo:paragraph-rsid="0019bdaf" style:font-weight-asian="normal" style:font-weight-complex="normal"/>
    </style:style>
    <style:style style:name="P40" style:family="paragraph" style:parent-style-name="Standard">
      <style:text-properties fo:font-weight="normal" officeooo:rsid="001e397a" officeooo:paragraph-rsid="001e397a" style:font-weight-asian="normal" style:font-weight-complex="normal"/>
    </style:style>
    <style:style style:name="P41" style:family="paragraph" style:parent-style-name="Standard">
      <style:text-properties fo:font-weight="normal" officeooo:rsid="0027af40" officeooo:paragraph-rsid="0027af40" style:font-weight-asian="normal" style:font-weight-complex="normal"/>
    </style:style>
    <style:style style:name="P42" style:family="paragraph" style:parent-style-name="Standard">
      <style:text-properties fo:font-weight="normal" officeooo:rsid="00293ab5" officeooo:paragraph-rsid="00293ab5" style:font-weight-asian="normal" style:font-weight-complex="normal"/>
    </style:style>
    <style:style style:name="P43" style:family="paragraph" style:parent-style-name="Standard">
      <style:text-properties fo:font-weight="normal" officeooo:rsid="001944d5" officeooo:paragraph-rsid="001944d5" style:font-weight-asian="normal" style:font-weight-complex="normal"/>
    </style:style>
    <style:style style:name="P44" style:family="paragraph" style:parent-style-name="Standard">
      <style:text-properties fo:font-weight="bold" officeooo:rsid="001075c6" officeooo:paragraph-rsid="001075c6" style:font-weight-asian="bold" style:font-weight-complex="bold"/>
    </style:style>
    <style:style style:name="P45" style:family="paragraph" style:parent-style-name="Standard">
      <style:text-properties fo:font-weight="bold" officeooo:rsid="002e0303" officeooo:paragraph-rsid="002e0303" style:font-weight-asian="bold" style:font-weight-complex="bold"/>
    </style:style>
    <style:style style:name="P46" style:family="paragraph" style:parent-style-name="Standard">
      <style:text-properties fo:font-weight="bold" officeooo:rsid="00143acf" officeooo:paragraph-rsid="00143acf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5dfc" style:font-weight-asian="normal" style:font-weight-complex="normal"/>
    </style:style>
    <style:style style:name="T3" style:family="text">
      <style:text-properties fo:font-weight="normal" officeooo:rsid="00189353" style:font-weight-asian="normal" style:font-weight-complex="normal"/>
    </style:style>
    <style:style style:name="T4" style:family="text">
      <style:text-properties fo:font-weight="normal" officeooo:rsid="001944d5" style:font-weight-asian="normal" style:font-weight-complex="normal"/>
    </style:style>
    <style:style style:name="T5" style:family="text">
      <style:text-properties fo:font-weight="normal" officeooo:rsid="0019bdaf" style:font-weight-asian="normal" style:font-weight-complex="normal"/>
    </style:style>
    <style:style style:name="T6" style:family="text">
      <style:text-properties fo:font-weight="normal" officeooo:rsid="001a18ef" style:font-weight-asian="normal" style:font-weight-complex="normal"/>
    </style:style>
    <style:style style:name="T7" style:family="text">
      <style:text-properties fo:font-weight="normal" officeooo:rsid="001e397a" style:font-weight-asian="normal" style:font-weight-complex="normal"/>
    </style:style>
    <style:style style:name="T8" style:family="text">
      <style:text-properties fo:font-weight="normal" officeooo:rsid="00241830" style:font-weight-asian="normal" style:font-weight-complex="normal"/>
    </style:style>
    <style:style style:name="T9" style:family="text">
      <style:text-properties fo:font-weight="normal" officeooo:rsid="002bee41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e5dfc" style:font-weight-asian="bold" style:font-weight-complex="bold"/>
    </style:style>
    <style:style style:name="T12" style:family="text">
      <style:text-properties officeooo:rsid="000e00cd"/>
    </style:style>
    <style:style style:name="T13" style:family="text">
      <style:text-properties officeooo:rsid="001166f1"/>
    </style:style>
    <style:style style:name="T14" style:family="text">
      <style:text-properties officeooo:rsid="00127c0a"/>
    </style:style>
    <style:style style:name="T15" style:family="text">
      <style:text-properties officeooo:rsid="001944d5"/>
    </style:style>
    <style:style style:name="T16" style:family="text">
      <style:text-properties officeooo:rsid="0019bdaf"/>
    </style:style>
    <style:style style:name="T17" style:family="text">
      <style:text-properties officeooo:rsid="001a18ef"/>
    </style:style>
    <style:style style:name="T18" style:family="text">
      <style:text-properties officeooo:rsid="0029f9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1-L2</text:p>
      <text:p text:style-name="P26">Para la realización de está práctica se pide ampliar el tamaño de /var, para ello antes de arrancar la mv tenemos que crear un disco de almacenamiento.</text:p>
      <text:p text:style-name="P26"/>
      <text:p text:style-name="P1">fdisk /dev/sdb <text:span text:style-name="T1">con esto creamos una partición para el disco sdb, a la cuál le daremos toda la memoria</text:span></text:p>
      <text:p text:style-name="P1"><text:span text:style-name="T1"/></text:p>
      <text:p text:style-name="P26">una vez tenemos la partición tenemos que crear un pv, el cuál lo agregaremos a un vg, donde haremos un lv para la petición que nos han hecho.</text:p>
      <text:p text:style-name="P1"><text:span text:style-name="T1"/></text:p>
      <text:p text:style-name="P1">Pvs </text:p>
      <text:p text:style-name="P1">pvcreate /dev/sdb1</text:p>
      <text:p text:style-name="P1">pvs</text:p>
      <text:p text:style-name="P1"/>
      <text:p text:style-name="P1">vgs</text:p>
      <text:p text:style-name="P1">vgextend vg0 /dev/sdb1 <text:span text:style-name="T1">en este caso vamos a usar vgextend ya que lo que quedemos es agrandar el vg existente</text:span></text:p>
      <text:p text:style-name="P1">vgs</text:p>
      <text:p text:style-name="P1"/>
      <text:p text:style-name="P1">lvs</text:p>
      <text:p text:style-name="P1">lvcreate -n new_var -L tamaño vg0</text:p>
      <text:p text:style-name="P1">lvs</text:p>
      <text:p text:style-name="P1"/>
      <text:p text:style-name="P26">a continuación, para poder copiar los archivos realizaremos los siguientes pasos:</text:p>
      <text:p text:style-name="P26"><text:tab/>-montar filesistem para lv</text:p>
      <text:p text:style-name="P26"><text:tab/>-montar lv</text:p>
      <text:p text:style-name="P26"><text:tab/>-copiar /var en lv</text:p>
      <text:p text:style-name="P26"><text:tab/>-indicar al so donde va /Var</text:p>
      <text:p text:style-name="P26"><text:tab/>-liberar espacio</text:p>
      <text:p text:style-name="P26"/>
      <text:p text:style-name="P2">mkfs -t ext4 /dev/mapper/vg0-new_var</text:p>
      <text:p text:style-name="P2">mkdir /mnt/new_var</text:p>
      <text:p text:style-name="P2">mount /dev/mapper/vg0-new_var /mnt/new_var</text:p>
      <text:p text:style-name="P2"/>
      <text:p text:style-name="P2"><text:s/>systemctl isolate rescue <text:span text:style-name="T1">debemos hacer esto ya que queremos copiar los datos de manera atómica, si no lo iniciamos se pueden perder datos que añadan durante el proceso de copia</text:span></text:p>
      <text:p text:style-name="P2">systemctl status</text:p>
      <text:p text:style-name="P2"/>
      <text:p text:style-name="P2">cp -a /var/. /new_var</text:p>
      <text:p text:style-name="P2">ls -laZ /Var</text:p>
      <text:p text:style-name="P2">ls -laZ /new_var</text:p>
      <text:p text:style-name="P2"/>
      <text:p text:style-name="P2">vi /etc/fstab <text:span text:style-name="T1">en el que añadiremos</text:span></text:p>
      <text:p text:style-name="P27"><text:tab/>/dev/mapper/vg0-new_var <text:tab/>/var<text:tab/>ext4<text:tab/>default<text:tab/> <text:s text:c="5"/>0 0</text:p>
      <text:p text:style-name="P2"><text:span text:style-name="T1"/></text:p>
      <text:p text:style-name="P2">lsblk</text:p>
      <text:p text:style-name="P2">umount /new_var</text:p>
      <text:p text:style-name="P2">mount -a</text:p>
      <text:p text:style-name="P2"/>
      <text:p text:style-name="P27">ahora vamos a procdder a liberar la memoria, ya que tenemos la información de /var en / y en el almacenamiento, por lo que tendremos que deshacer los pasos</text:p>
      <text:p text:style-name="P27"/>
      <text:p text:style-name="P2"><text:soft-page-break/>umount /dev/mapper/vg0-new_var</text:p>
      <text:p text:style-name="P2"/>
      <text:p text:style-name="P2">mv /var /var_old</text:p>
      <text:p text:style-name="P2"/>
      <text:p text:style-name="P2">mount -a <text:span text:style-name="T1"><text:s/>nos dará error ya que dice que no existe /var</text:span></text:p>
      <text:p text:style-name="P2"><text:span text:style-name="T1"/></text:p>
      <text:p text:style-name="P2">mkdir /var</text:p>
      <text:p text:style-name="P2">restorecon /var <text:span text:style-name="T1">si barra bar difiere en el contexto tendremos que realizar este comando para que se arregle</text:span></text:p>
      <text:p text:style-name="P2"><text:span text:style-name="T1"/></text:p>
      <text:p text:style-name="P2">mount -a</text:p>
      <text:p text:style-name="P2">lsblk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P1-L3</text:p>
      <text:p text:style-name="P4"/>
      <text:p text:style-name="P28">Para la realización de esta práctica queremos cifrar el contenido de /var</text:p>
      <text:p text:style-name="P28">Para realizar esto tenemos que añadir un raid1, cuyo lv será cifrado</text:p>
      <text:p text:style-name="P28"/>
      <text:p text:style-name="P28"><text:s/><text:span text:style-name="T10">fdisk </text:span>en primer lugar crearemos la partición en ambos discos</text:p>
      <text:p text:style-name="P4">mdadm --create /dev/md0 <text:s/>--level=1 --raid-devices=2 /dev/sdb /dev/sdc</text:p>
      <text:p text:style-name="P28">una vez hemos creado el raid1 podemos pasar a la siguiente parte: pv→vg→lv</text:p>
      <text:p text:style-name="P4">pvs</text:p>
      <text:p text:style-name="P4">pvcreate /dev/md0</text:p>
      <text:p text:style-name="P4">pvs</text:p>
      <text:p text:style-name="P4"/>
      <text:p text:style-name="P4">vgs</text:p>
      <text:p text:style-name="P4">vgcreate vg_raid1 /dev/md0</text:p>
      <text:p text:style-name="P4">vgs</text:p>
      <text:p text:style-name="P4"/>
      <text:p text:style-name="P4">lvs</text:p>
      <text:p text:style-name="P4">lvcreate -n new_var -L tamaño vg_raid1</text:p>
      <text:p text:style-name="P4">lvs</text:p>
      <text:p text:style-name="P4"/>
      <text:p text:style-name="P4">dnf search cryptsetup</text:p>
      <text:p text:style-name="P4">dnf install cryptsetup -y</text:p>
      <text:p text:style-name="P4">cryptsetup luksFormat /dev/mapper/vg_raid1-new_var</text:p>
      <text:p text:style-name="P4">cryptsetyp luksOpen /dev/mapper/vg_raid1-new_var <text:s/>vg_raid1-new_var_crypt</text:p>
      <text:p text:style-name="P4"/>
      <text:p text:style-name="P4"><text:s text:c="2"/></text:p>
      <text:p text:style-name="P4">mkfs -t xfs /dev/mapper/vg_raid1-new_var_<text:span text:style-name="T12">crypt</text:span></text:p>
      <text:p text:style-name="P5">mkdir /mnt/new_var</text:p>
      <text:p text:style-name="P6">mount /dev/mapper/vg_raid1-new_var_crypt /mnt/new_var</text:p>
      <text:p text:style-name="P5"/>
      <text:p text:style-name="P5">systemctl isolate rescue</text:p>
      <text:p text:style-name="P5">systemctl status</text:p>
      <text:p text:style-name="P5">cp -a /var/. /new_var</text:p>
      <text:p text:style-name="P5"/>
      <text:p text:style-name="P5">vi /etc/fstab </text:p>
      <text:p text:style-name="P5"><text:tab/><text:span text:style-name="T1">/dev/mapper/vg_raid1-new_var_crypt /mnt<text:tab/>/new_var<text:tab/>xfs<text:tab/>defautls<text:tab/>0 0</text:span></text:p>
      <text:p text:style-name="P5"/>
      <text:p text:style-name="P5">blkid | grep crypto » /etc/crypttab</text:p>
      <text:p text:style-name="P5">vi /etc/crypttab</text:p>
      <text:p text:style-name="P5"><text:tab/><text:span text:style-name="T1">vg_raid1-new_var_crypt<text:tab/><text:tab/>UUID=…. <text:tab/>None</text:span></text:p>
      <text:p text:style-name="P5"><text:span text:style-name="T1"/></text:p>
      <text:p text:style-name="P5">mv /var<text:tab/>/Var_old</text:p>
      <text:p text:style-name="P5">mkdir /var</text:p>
      <text:p text:style-name="P5">restorecon /var</text:p>
      <text:p text:style-name="P5">reboot</text:p>
      <text:p text:style-name="P5">lsblk <text:span text:style-name="T1">/var debería estar montado en new_var_crypt tanto en sdb como en sdc</text:span></text:p>
      <text:p text:style-name="P5"><text:span text:style-name="T1"/></text:p>
      <text:p text:style-name="P5"><text:span text:style-name="T1"/></text:p>
      <text:p text:style-name="P35">swap no queda cifrado, esto quiere decir que todavía no cumple las leyes, por lo que tendremos que usar swapoff y desactivar swap</text:p>
      <text:p text:style-name="P5"><text:span text:style-name="T1"/></text:p>
      <text:p text:style-name="P5"><text:span text:style-name="T1"/></text:p>
      <text:p text:style-name="P5"><text:soft-page-break/><text:span text:style-name="T1"/></text:p>
      <text:p text:style-name="P7">CONFIGURACIÓN DE RED</text:p>
      <text:p text:style-name="P29">tenemos que añadir un adaptador solo anfitrión vboxnet0</text:p>
      <text:p text:style-name="P29"/>
      <text:p text:style-name="P29">en rocky </text:p>
      <text:p text:style-name="P7">ip addr</text:p>
      <text:p text:style-name="P7">ip addr add 192… dev enp0s8</text:p>
      <text:p text:style-name="P7">ping 192.168.56.1</text:p>
      <text:p text:style-name="P7"/>
      <text:p text:style-name="P29">en ubs</text:p>
      <text:p text:style-name="P7">ip addr</text:p>
      <text:p text:style-name="P7">ip addr add 192….. dev enp0s8</text:p>
      <text:p text:style-name="P7">ping 192.168.56.1 </text:p>
      <text:p text:style-name="P29">si no funciona </text:p>
      <text:p text:style-name="P7">ip link set enp0s8 up</text:p>
      <text:p text:style-name="P7"/>
      <text:p text:style-name="P7"/>
      <text:p text:style-name="P8">P2-L1</text:p>
      <text:p text:style-name="P30">el primer paso para conectar ssh es</text:p>
      <text:p text:style-name="P8">ubs </text:p>
      <text:p text:style-name="P8">apt search ssh | grep server</text:p>
      <text:p text:style-name="P8">sudo apt install openssh-server</text:p>
      <text:p text:style-name="Standard"><text:span text:style-name="T11">ps -Af | grep sshd</text:span> <text:span text:style-name="T2">en el caso de que no salga tendremos que activarla</text:span></text:p>
      <text:p text:style-name="P8">systemctl start sshd</text:p>
      <text:p text:style-name="P8"/>
      <text:p text:style-name="P8">ssh-keygen</text:p>
      <text:p text:style-name="P8">cd .ssh/</text:p>
      <text:p text:style-name="P8">ssh-copy-id 192… -p 22022 <text:span text:style-name="T1"><text:s/>esto no nos va a dejar ya que tenemos que cambiar el puerto </text:span></text:p>
      <text:p text:style-name="P8"><text:span text:style-name="T1"/></text:p>
      <text:p text:style-name="P8">vi /etc/ssh/sshd_config</text:p>
      <text:p text:style-name="P8"><text:tab/>cambiar PermitRootLogin a no</text:p>
      <text:p text:style-name="P8"><text:tab/>cambiar el puerto a 22022</text:p>
      <text:p text:style-name="P8">systemctl restart sshd</text:p>
      <text:p text:style-name="P8"/>
      <text:p text:style-name="P8">ufw enable</text:p>
      <text:p text:style-name="P8">ufw allow 22022</text:p>
      <text:p text:style-name="P8"/>
      <text:p text:style-name="P8">ssh-copy-id 192… -p 22022</text:p>
      <text:p text:style-name="P8"><text:tab/><text:tab/><text:tab/><text:tab/><text:tab/><text:tab/><text:tab/><text:tab/><text:span text:style-name="T9">ambos comienzan con prohibit passw</text:span></text:p>
      <text:p text:style-name="P8">rocky</text:p>
      <text:p text:style-name="P8">systemctl status sshd</text:p>
      <text:p text:style-name="P8">vi /etc/ssh/sshd_config</text:p>
      <text:p text:style-name="P8">systemctl restart sshd</text:p>
      <text:p text:style-name="P8">sed s/’Port 22’/’Port 22022’/ /etc/ssh/config <text:span text:style-name="T1">nos va a dar error ya que no quita #</text:span></text:p>
      <text:p text:style-name="P30">para descargar semanage tenemos que usar policycoreutils</text:p>
      <text:p text:style-name="P9">semanage -a -t ssh_port_t -p tcp 22022</text:p>
      <text:p text:style-name="P9">firewall-cmd –add-port 22022/tcp –permanent</text:p>
      <text:p text:style-name="P9">firewall-cmd –add-port 22022/tcp</text:p>
      <text:p text:style-name="P9"><draw:frame draw:style-name="fr1" draw:name="Imagen1" text:anchor-type="char" svg:x="5.616cm" svg:y="0.406cm" svg:width="12.442cm" svg:height="2.466cm" draw:z-index="0"><draw:image xlink:href="Pictures/100000010000029A00000084E1899E23.png" xlink:type="simple" xlink:show="embed" xlink:actuate="onLoad" draw:mime-type="image/png"/></draw:frame></text:p>
      <text:p text:style-name="P9">ssh-keygen</text:p>
      <text:p text:style-name="P9">ssh-copy-id -p 22022 192….</text:p>
      <text:p text:style-name="P9"/>
      <text:p text:style-name="P9"><text:soft-page-break/>P2-L3</text:p>
      <text:p text:style-name="P45">rsync:</text:p>
      <text:p text:style-name="P45"><text:tab/>rsync -v -e “ssh -p 22022” origen destino</text:p>
      <text:p text:style-name="P45"><text:tab/><text:tab/>destino = <text:a xlink:type="simple" xlink:href="mailto:nombre@ip" text:style-name="Internet_20_link" text:visited-style-name="Visited_20_Internet_20_Link">nombre@ip</text:a>:/home/alvaro_gz/….</text:p>
      <text:p text:style-name="P45"><text:tab/><text:tab/>-e para poder mandarlo por el puertp 22022</text:p>
      <text:p text:style-name="P45"><text:tab/><text:tab/>-v muestra información</text:p>
      <text:p text:style-name="P9"/>
      <text:p text:style-name="P45">tar:</text:p>
      <text:p text:style-name="P45"><text:tab/>tar opciones archivo.tar.gz carpeta/s_a_comprimir</text:p>
      <text:p text:style-name="P45"><text:tab/><text:tab/> cvzf <text:tab/>xvzf</text:p>
      <text:p text:style-name="P45"><text:tab/><text:tab/>c crear</text:p>
      <text:p text:style-name="P45"><text:tab/><text:tab/>x extraer</text:p>
      <text:p text:style-name="P45"><text:tab/><text:tab/>f especifica noombre</text:p>
      <text:p text:style-name="P45"><text:tab/><text:tab/>v muestra los archivos proc(verbose)</text:p>
      <text:p text:style-name="P45"><text:tab/><text:tab/>z usar gz</text:p>
      <text:p text:style-name="P45"><text:tab/></text:p>
      <text:p text:style-name="P9">ALLOW USER</text:p>
      <text:p text:style-name="P31">al crear un nuevo usuario no se podrá hacer un ssh hacia el, para solucionarlo hay que desactivar el PermitRootLogin no y buscar AllowUsers, si no aparece lo añadimos al final con los nombres de los usuarios que si queremos que puedan acceder. <text:span text:style-name="T13">Se escribe de la siguiente manera </text:span></text:p>
      <text:p text:style-name="P9"><text:tab/><text:span text:style-name="T13">AllowUsers alvaro otro_user</text:span></text:p>
      <text:p text:style-name="P9"/>
      <text:p text:style-name="P10">SSHFS</text:p>
      <text:p text:style-name="P32">nos permite crear una ubicación remota</text:p>
      <text:p text:style-name="P10">mkdir ./nombre</text:p>
      <text:p text:style-name="P10">sshfs <text:a xlink:type="simple" xlink:href="mailto:alvaro_gz@192.168.56" text:style-name="Internet_20_link" text:visited-style-name="Visited_20_Internet_20_Link">alvaro_gz@192.168.56</text:a>…:/home/alvaro_gz/carpeta ./nombre -p 22022</text:p>
      <text:p text:style-name="P10"/>
      <text:p text:style-name="P10">XFORWARDING</text:p>
      <text:p text:style-name="P32">nos permite hacer que las solicitudes que hagamos desde nuestro servidor se muestren en la máquina del cliente</text:p>
      <text:p text:style-name="P10">ssh alvaro_gz@192… -p 22022 -X</text:p>
      <text:p text:style-name="P10"/>
      <text:p text:style-name="P11">SCREEN</text:p>
      <text:p text:style-name="P33">lanza un trabajo en una terminal y nos permite recuperarlo cuándo queramos</text:p>
      <text:p text:style-name="P11">screen -r num_sesion -d num_sesion <text:span text:style-name="T1">-r permite recuperar la sesión en mi monitor y -d cierra una sesión en otro monitor</text:span></text:p>
      <text:p text:style-name="P11"><text:span text:style-name="T1"/></text:p>
      <text:p text:style-name="P11"><text:span text:style-name="T1"/></text:p>
      <text:p text:style-name="P11">FAIL2BAN</text:p>
      <text:p text:style-name="P33">es un mecanismo de seguridad, el cuál banea usuarios que intenten acceder a nuestro servidor y se equivoquen mśa de x veces <text:span text:style-name="T10">maxretry=x</text:span></text:p>
      <text:p text:style-name="P11">sudo dnf search epel-release</text:p>
      <text:p text:style-name="P11">sudo dnf search fail2ban</text:p>
      <text:p text:style-name="P11">sudo dnf install epel-release -y</text:p>
      <text:p text:style-name="P11">sudo dnf install fail2ban -y</text:p>
      <text:p text:style-name="P33"><text:span text:style-name="T10"/></text:p>
      <text:p text:style-name="P34"><text:span text:style-name="T10">systemctl status fail2ban</text:span><text:span text:style-name="T10"/></text:p>
      <text:p text:style-name="P33"><text:span text:style-name="T10">fail2ban-client status </text:span><text:s/><text:span text:style-name="T14">sshd </text:span>nos muestra el estado de las jail <text:span text:style-name="T14">sshd</text:span></text:p>
      <text:p text:style-name="P33"/>
      <text:p text:style-name="P34">para añadir más jails tenemos que modificar </text:p>
      <text:p text:style-name="P34">es recomendable no editar directamente jail.conf ya que este puede recibir actualizaciones, por lo que lo copiaremos en jail.local</text:p>
      <text:p text:style-name="P12"><text:soft-page-break/>vi /etc/fail2ban/jail.local <text:span text:style-name="T1">como queremos activarlo en el servicio sshd buscamos este mismo y añadimos</text:span></text:p>
      <text:p text:style-name="P12"><text:tab/>enabled = true</text:p>
      <text:p text:style-name="P12"><draw:frame draw:style-name="fr1" draw:name="Imagen2" text:anchor-type="char" svg:x="-0.459cm" svg:y="0.228cm" svg:width="12.691cm" svg:height="3.828cm" draw:z-index="1"><draw:image xlink:href="Pictures/10000001000002A1000000CB7FD74243.png" xlink:type="simple" xlink:show="embed" xlink:actuate="onLoad" draw:mime-type="image/png"/></draw:frame><text:tab/></text:p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4">también tenemos que modificar port y poner 22022</text:p>
      <text:p text:style-name="P12">sudo systemctl restart fail2ban.service</text:p>
      <text:p text:style-name="P13">PILA LAMP</text:p>
      <text:p text:style-name="P14">sudo dnf install httpd -<text:span text:style-name="T16">y</text:span> <text:span text:style-name="T5">instalamos la pila lamp y posteriormente lo activamos si no lo está start</text:span></text:p>
      <text:p text:style-name="P18">firewall-cmd –add-port 80/tcp –permanent</text:p>
      <text:p text:style-name="P18">firewall-cmd –add-port 80/tcp<text:tab/><text:span text:style-name="T1">debemos desactivar el firewall para el puerto 80</text:span></text:p>
      <text:p text:style-name="P37">Para comprobar que funciona correctamente ponemos la ip de rocky y de ubuntu en google y deberia salirnos una pagina de <text:span text:style-name="T17">i</text:span>nicio de apache2(ubuntu)/httpd(rocky).</text:p>
      <text:p text:style-name="P37"/>
      <text:p text:style-name="P19">Dnf install mariadb -y <text:span text:style-name="T1">y ya lo activamos y lo reiniciamos</text:span></text:p>
      <text:p text:style-name="P19">dnf install mariadb-server -y </text:p>
      <text:p text:style-name="P19">systemctl start mariadb.service</text:p>
      <text:p text:style-name="P19">mysql -u root -p <text:span text:style-name="T1">nos permite comprobar su funcionamiento</text:span></text:p>
      <text:p text:style-name="P37"/>
      <text:p text:style-name="P13"><text:s/>sudo dnf install php -<text:span text:style-name="T17">y </text:span><text:span text:style-name="T6">al ser un interprete no le podemos hacer systemctl</text:span></text:p>
      <text:p text:style-name="P38">nos vamos a <text:span text:style-name="T10">/var/www/html </text:span>y creamos nuestro php, desde mysql tendremos que crear un user y darle privilegios, además de crear la base de datos. Una vez tenemos el php creado lo metemos en <text:span text:style-name="T10">/etc/http/httpd.conf </text:span><text:s/>y donde pone el index.html ponemos miscript.php</text:p>
      <text:p text:style-name="P37">Primero para solucionar el error que nos deberia salir es descargar “dnf install php-mysqlnd -y” ya que la funcion mysqli_connect.</text:p>
      <text:p text:style-name="P37">Ahora si hacemos php miscript.php ya funciona. Lo unico que nos falta es poder visualizarlo que se haría con el “setsebool httpd_can_network_connect_db on” ya que por defecto viene en OFF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CONTROL DE GIT</text:p>
      <text:p text:style-name="P15">dnf install git</text:p>
      <text:p text:style-name="P15">mkdir mirepo</text:p>
      <text:p text:style-name="P15">cd /mirepo</text:p>
      <text:p text:style-name="P15">git init <text:span text:style-name="T4">inicializar el servicio git</text:span></text:p>
      <text:p text:style-name="P15">git add arch.txt <text:span text:style-name="T4">añadir los nuevos archivos para que los incluya el commit o para añadir los cambios si en el commit no usamos la opción -a</text:span></text:p>
      <text:p text:style-name="P15">git config --global user.email “...@correo.ugr.es” <text:span text:style-name="T4">son necesarios cuando se hacen cambios </text:span></text:p>
      <text:p text:style-name="P15">git config <text:s/>--global user.name “nombre”</text:p>
      <text:p text:style-name="P15">git commit -a -m “mensaje” <text:s text:c="2"/><text:span text:style-name="T1">-</text:span><text:span text:style-name="T4">a agrega todos los archivos modificados o añadidos con git add</text:span></text:p>
      <text:p text:style-name="P43">al añadir la opción -a no nos hará falta añadir todos los archivos con git add, solo los muevos</text:p>
      <text:p text:style-name="P15">touch d</text:p>
      <text:p text:style-name="P15">git status <text:span text:style-name="T4">nos dice si hay cambios desde el último commit</text:span></text:p>
      <text:p text:style-name="P15">git commit -a -m “”</text:p>
      <text:p text:style-name="P15">git log --graph --all --decorate <text:span text:style-name="T1">nos permite ver bien las ramas del árbol</text:span></text:p>
      <text:p text:style-name="P15">git branch <text:span text:style-name="T4">nos indica todas las ramas que tenemos</text:span></text:p>
      <text:p text:style-name="P15">git checkout “<text:span text:style-name="T15">nombre_rama</text:span>” <text:span text:style-name="T4">cambiar a otra rama</text:span></text:p>
      <text:p text:style-name="P15">git checkout -b &lt;nombre_nueva_rama&gt; <text:span text:style-name="T4">crea una nueva rama y cambia a ella</text:span></text:p>
      <text:p text:style-name="P16">git merge <text:span text:style-name="T16">feature</text:span> <text:s/><text:span text:style-name="T3">sirve para combinar dos ramas, combinando por tanto sus archivos</text:span></text:p>
      <text:p text:style-name="P18"><text:span text:style-name="T3">d</text:span><text:span text:style-name="T1">esde main lo que hara es fusionar los cambios de feature en main </text:span><text:span text:style-name="T7">y genera un commit con la unión</text:span></text:p>
      <text:p text:style-name="P17">git rebase main <text:span text:style-name="T1">si hacemos esto desde la rama branch1 lo que va a hacer es actualizar branch1 con todos los commit de main</text:span></text:p>
      <text:p text:style-name="P39">la diferencia entre los dos últimos es :</text:p>
      <text:p text:style-name="P40">son rebase se pueden perder datos</text:p>
      <text:p text:style-name="P15">git clone <text:a xlink:type="simple" xlink:href="mailto:git@github.com" text:style-name="Internet_20_link" text:visited-style-name="Visited_20_Internet_20_Link">git@github.com</text:a>:usuario/nombreRepositorio.git</text:p>
      <text:p text:style-name="P15"/>
      <text:p text:style-name="P36"/>
      <text:p text:style-name="P20">git diff <text:span text:style-name="T1">compara el archivo en la zona de trabajo, es decir si hemos hecho git add pero sin commit nos mostrará los cambios realizados desde el último git add</text:span></text:p>
      <text:p text:style-name="P20">git diff HEAD <text:span text:style-name="T1">nos mostrará los cambios respecto al último commit</text:span></text:p>
      <text:p text:style-name="P20">git diff --staged <text:span text:style-name="T1"><text:s/>nos muesta los cambios entre el último add y el último commt</text:span></text:p>
      <text:p text:style-name="P20"><text:span text:style-name="T1"/></text:p>
      <text:p text:style-name="P21">git restore –source=18412049820438 libro.txt <text:tab/><text:span text:style-name="T1">nos volverá al commit de dicho código</text:span></text:p>
      <text:p text:style-name="P22">git restore libro.txt <text:span text:style-name="T1">nos volverá a </text:span><text:span text:style-name="T8">su estado actual en el repositorio, último commit</text:span></text:p>
      <text:p text:style-name="P22"><text:span text:style-name="T1"/></text:p>
      <text:p text:style-name="P22">git revert 3984475387583758973458<text:span text:style-name="T1"> nos permite crear un nuevo commit a través de los cambios, tendríamos que arreglar los conflictos y después git revert –continue</text:span></text:p>
      <text:p text:style-name="P22"><text:span text:style-name="T1"/></text:p>
      <text:p text:style-name="P22">más agresivo</text:p>
      <text:p text:style-name="P22"><text:tab/>git reset –hard 893285982 <text:span text:style-name="T1">elimina todo hasta dicho commit</text:span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3"><text:soft-page-break/>P3 – ZABBIX</text:p>
      <text:p text:style-name="P23">sudo apt install zabbix-server-mysql zabbix-frontend-php zabbix-apache-conf zabbix-agent</text:p>
      <text:p text:style-name="P41">necesitaremos tener la pila lamp instalada ya que vamos a tener que instalar mysql-server, un usuario creado desde mysql -u root -p</text:p>
      <text:p text:style-name="P41">tendremos que cambiar la contraseña en <text:span text:style-name="T10">/etc/zabbix/zabbix_server.conf </text:span><text:s/>donde buscamos <text:span text:style-name="T10">DBPassword, </text:span>lo descomentamos y ponemos la contraseña</text:p>
      <text:p text:style-name="P41">tendremos que configurar <text:span text:style-name="T10">/etc/zabbix/apache.conf </text:span>descomentar <text:span text:style-name="T10">date.timezone </text:span>y sustituirlo por <text:span text:style-name="T10">Madrid</text:span></text:p>
      <text:p text:style-name="P41"><text:span text:style-name="T10"/></text:p>
      <text:p text:style-name="P23">sudo systemctl restart zabbix-server zabbix-agent apache2</text:p>
      <text:p text:style-name="P23">sudo systemctl enable zabbix-server zabbix-agent apache2</text:p>
      <text:p text:style-name="P41"><text:span text:style-name="T10"/></text:p>
      <text:p text:style-name="P41">editamos <text:span text:style-name="T10">/etc/zabbix/zabbiz_agentd.conf </text:span>y añadimos en /Server= <text:span text:style-name="T10">Server=127.0.0.1,192.168.56.105 </text:span>en /Hostname= añadimos <text:span text:style-name="T10">Hostname=UBUNTU Host</text:span></text:p>
      <text:p text:style-name="P23">systemctl restart zabbix-agent</text:p>
      <text:p text:style-name="P41"><text:span text:style-name="T10"/></text:p>
      <text:p text:style-name="P42">en rocky</text:p>
      <text:p text:style-name="P24">/etc/yum.repos.d/epel.repo </text:p>
      <text:p text:style-name="P24">[epel]</text:p>
      <text:p text:style-name="P23">…</text:p>
      <text:p text:style-name="P23">excludepkgs=zabbix*</text:p>
      <text:p text:style-name="P41"><text:span text:style-name="T10"/></text:p>
      <text:p text:style-name="P42">editamos el arch al igual q en ubs y ponemos los nombres y la ip del servidor</text:p>
      <text:p text:style-name="P42">es necesario que los siguientes puertos esten libres, 22 no lo se los demas si</text:p>
      <text:p text:style-name="P25">sudo firewall-cmd --add-port=10050/tcp --permanent #ZABBIX-SERVER</text:p>
      <text:p text:style-name="P25">sudo firewall-cmd --add-port=22/tcp --permanent #SSH</text:p>
      <text:p text:style-name="P25">sudo firewall-cmd --add-port=80/tcp --permanent #HTTP</text:p>
      <text:p text:style-name="P25">sudo firewall-cmd –reload</text:p>
      <text:p text:style-name="P25"/>
      <text:p text:style-name="P42">La clave es: net.tcp.service[http,,80] o net.tcp.service[ssh,,22022]</text:p>
      <text:p text:style-name="P42"/>
      <text:p text:style-name="P25">zabbix_get -s 192.168.56.105 -p 10050 -k net.tcp.service[ssh,22022]</text:p>
      <text:p text:style-name="P25">zabbix_get -s 192.168.56.110 -p 10050 -k net.tcp.service[http]</text:p>
      <text:p text:style-name="P25"/>
      <text:p text:style-name="P25">ansible</text:p>
      <text:p text:style-name="P42">Playbooks: secuencia de acciones a tomar, es como un script/receta</text:p>
      <text:p text:style-name="P42">sudo apt install ansible -y</text:p>
      <text:p text:style-name="P42">ansible all —list-hosts para ver los hosts con gurados</text:p>
      <text:p text:style-name="P42">los con guramos de esta forma -&gt; [nombre] 192.168.56.11:22022</text:p>
      <text:p text:style-name="P42">por ejemplo </text:p>
      <text:p text:style-name="P25">/etc/ansible/host</text:p>
      <text:p text:style-name="P42"><text:tab/><text:span text:style-name="T10">[Servers]</text:span></text:p>
      <text:p text:style-name="P25"><text:tab/>192.168.56.110:22022</text:p>
      <text:p text:style-name="P25"><text:tab/>192.168.56.105:22022</text:p>
      <text:p text:style-name="P42">como vamos a hacer uso de ssh para usar ansible entonces necesitamos con<text:span text:style-name="T18">fi</text:span>gurar claves</text:p>
      <text:p text:style-name="P42">publicas para todos los servidores que vayamos a usar con el ansible (ssh-keygen. Ssh-copy-id 192.168.56.105 -p 22022)</text:p>
      <text:p text:style-name="P42">“ansible all/rocky/ubuntu/ambos(aquii es donde metemos a q host le vamos a realizar la accion o</text:p>
      <text:p text:style-name="P42">a todos) -m command -a “mkdir /home/mehdii/ansiblePrueba“</text:p>
      <text:p text:style-name="P42">“ansible all -m ping”</text:p>
      <text:p text:style-name="P42"/>
      <text:p text:style-name="P42">ansible-playbook playbook.yaml --ask-become-pas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4T18:04:53.045605842</meta:creation-date>
    <meta:generator>LibreOffice/24.2.5.2$Linux_X86_64 LibreOffice_project/420$Build-2</meta:generator>
    <dc:date>2024-12-17T11:05:54.522191936</dc:date>
    <meta:editing-duration>PT3H19M34S</meta:editing-duration>
    <meta:editing-cycles>11</meta:editing-cycles>
    <meta:document-statistic meta:table-count="0" meta:image-count="2" meta:object-count="0" meta:page-count="8" meta:paragraph-count="244" meta:word-count="1715" meta:character-count="11008" meta:non-whitespace-character-count="9461"/>
  </office:meta>
</office:document-meta>
</file>