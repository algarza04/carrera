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B0000016DEAF1F80E.png" manifest:media-type="image/png"/>
  <manifest:file-entry manifest:full-path="Pictures/100000010000020A00000123A5808409.png" manifest:media-type="image/png"/>
  <manifest:file-entry manifest:full-path="Pictures/100000010000029A000000A49251EF1A.png" manifest:media-type="image/png"/>
  <manifest:file-entry manifest:full-path="Pictures/100000010000044C0000019924DA3E96.png" manifest:media-type="image/png"/>
  <manifest:file-entry manifest:full-path="Pictures/10000001000001CF0000002EA5977DB0.png" manifest:media-type="image/png"/>
  <manifest:file-entry manifest:full-path="Pictures/10000001000003BB000001949AB20316.png" manifest:media-type="image/png"/>
  <manifest:file-entry manifest:full-path="Pictures/100000010000032F00000053B64F05C9.png" manifest:media-type="image/png"/>
  <manifest:file-entry manifest:full-path="Pictures/100000010000044D00000163780C385B.png" manifest:media-type="image/png"/>
  <manifest:file-entry manifest:full-path="Pictures/100000010000045D000001EECBACB178.png" manifest:media-type="image/png"/>
  <manifest:file-entry manifest:full-path="Pictures/100000010000023500000100C2077540.png" manifest:media-type="image/png"/>
  <manifest:file-entry manifest:full-path="Pictures/10000001000003A000000379C9F9C7D8.png" manifest:media-type="image/png"/>
  <manifest:file-entry manifest:full-path="Pictures/100000010000033700000091A0068D53.png" manifest:media-type="image/png"/>
  <manifest:file-entry manifest:full-path="Pictures/100000010000019A000001D3381629BA.png" manifest:media-type="image/png"/>
  <manifest:file-entry manifest:full-path="Pictures/1000000100000443000001C00A62E253.png" manifest:media-type="image/png"/>
  <manifest:file-entry manifest:full-path="Pictures/10000001000004480000017F2C908C6B.png" manifest:media-type="image/png"/>
  <manifest:file-entry manifest:full-path="Pictures/10000001000007800000040F75F3455B.png" manifest:media-type="image/png"/>
  <manifest:file-entry manifest:full-path="Pictures/10000001000001050000021AB7704590.png" manifest:media-type="image/png"/>
  <manifest:file-entry manifest:full-path="Pictures/100000010000044D0000016356CEFE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524" officeooo:paragraph-rsid="0028b298"/>
    </style:style>
    <style:style style:name="P2" style:family="paragraph" style:parent-style-name="Standard">
      <style:text-properties officeooo:rsid="002049d9" officeooo:paragraph-rsid="002a3158"/>
    </style:style>
    <style:style style:name="P3" style:family="paragraph" style:parent-style-name="Standard">
      <style:text-properties officeooo:rsid="0022bb8c" officeooo:paragraph-rsid="0022bb8c"/>
    </style:style>
    <style:style style:name="P4" style:family="paragraph" style:parent-style-name="Standard">
      <style:text-properties officeooo:rsid="0025624f" officeooo:paragraph-rsid="0025624f"/>
    </style:style>
    <style:style style:name="P5" style:family="paragraph" style:parent-style-name="Standard">
      <style:text-properties fo:font-weight="bold" officeooo:rsid="0025624f" officeooo:paragraph-rsid="0025624f" style:font-weight-asian="bold" style:font-weight-complex="bold"/>
    </style:style>
    <style:style style:name="P6" style:family="paragraph" style:parent-style-name="Standard">
      <style:text-properties officeooo:rsid="002733e5" officeooo:paragraph-rsid="0025624f"/>
    </style:style>
    <style:style style:name="P7" style:family="paragraph" style:parent-style-name="Standard">
      <style:text-properties officeooo:rsid="00203e5f" officeooo:paragraph-rsid="002cc347"/>
    </style:style>
    <style:style style:name="P8" style:family="paragraph" style:parent-style-name="Standard">
      <style:text-properties officeooo:rsid="002cc347" officeooo:paragraph-rsid="002cc347"/>
    </style:style>
    <style:style style:name="P9" style:family="paragraph" style:parent-style-name="Standard">
      <style:text-properties officeooo:rsid="00216899" officeooo:paragraph-rsid="002cc347"/>
    </style:style>
    <style:style style:name="P10" style:family="paragraph" style:parent-style-name="Standard">
      <style:text-properties officeooo:rsid="00216899" officeooo:paragraph-rsid="0028b298"/>
    </style:style>
    <style:style style:name="P11" style:family="paragraph" style:parent-style-name="Standard">
      <style:text-properties officeooo:rsid="00304522" officeooo:paragraph-rsid="00304522"/>
    </style:style>
    <style:style style:name="T1" style:family="text">
      <style:text-properties officeooo:rsid="002260f7"/>
    </style:style>
    <style:style style:name="T2" style:family="text">
      <style:text-properties officeooo:rsid="00237752"/>
    </style:style>
    <style:style style:name="T3" style:family="text">
      <style:text-properties officeooo:rsid="0025624f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 vuelto a empezar de nuevo <text:span text:style-name="T3">la instalación por si me he saltado algún paso o no he comprobado que algo este correcto, </text:span>para ello primer lugar <text:span text:style-name="T3">he</text:span> amplia<text:span text:style-name="T3">do</text:span> el espacio de la mv ya que no <text:span text:style-name="T3">había </text:span>suficiente.</text:p>
      <text:p text:style-name="P3"/>
      <text:p text:style-name="P3">Una vez ampliado el espacio he pasado a la instalación del docker, el cuál me daba la siguiente salida al hacer el update, para solucionarlo lo que he tenido que hacer ha sido borrar las lineas repetidas que había <text:span text:style-name="T2">(estas estaban al haber puesto anteriormente mal la entrada)</text:span>, una vez hecho eso ya lo he podido realizar sin problema.</text:p>
      <text:p text:style-name="P3">E: Malformed entry 50 in list file /etc/apt/sources.list (URI parse)</text:p>
      <text:p text:style-name="P3">E: The list of sources could not be read.</text:p>
      <text:p text:style-name="P3"/>
      <text:p text:style-name="P4">Al arreglar dicho problema he podido concluir con la intalación del docker</text:p>
      <text:p text:style-name="P4"><text:tab/><text:span text:style-name="T4">sudo apt install docker-ce</text:span></text:p>
      <text:p text:style-name="P4">y he añadido mi usuario al docker<text:tab/></text:p>
      <text:p text:style-name="P4"><text:tab/><text:span text:style-name="T4">sudo usermod -aG docker nombre_usuario</text:span></text:p>
      <text:p text:style-name="P4">i</text:p>
      <text:p text:style-name="P4">A continuación he pasado con la instalación de docker-compose</text:p>
      <text:p text:style-name="P5"><text:tab/>sudo apt install docker-compose</text:p>
      <text:p text:style-name="P4"><draw:frame draw:style-name="fr1" draw:name="Imagen3" text:anchor-type="char" svg:x="-0.587cm" svg:y="0.328cm" svg:width="9.433cm" svg:height="0.938cm" draw:z-index="0"><draw:image xlink:href="Pictures/10000001000001CF0000002EA5977DB0.png" xlink:type="simple" xlink:show="embed" xlink:actuate="onLoad" draw:mime-type="image/png"/></draw:frame></text:p>
      <text:p text:style-name="P4"/>
      <text:p text:style-name="P4"/>
      <text:p text:style-name="P4"><draw:frame draw:style-name="fr1" draw:name="Imagen5" text:anchor-type="char" svg:x="-0.543cm" svg:y="0.314cm" svg:width="15.469cm" svg:height="6.544cm" draw:z-index="1"><draw:image xlink:href="Pictures/10000001000003BB000001949AB2031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8">He intentado iniciar el docker en ubs pero me da error</text:p>
      <text:p text:style-name="P8"><draw:frame draw:style-name="fr1" draw:name="Imagen6" text:anchor-type="char" svg:x="-1.032cm" svg:y="0cm" svg:width="17cm" svg:height="1.73cm" draw:z-index="3"><draw:image xlink:href="Pictures/100000010000032F00000053B64F05C9.png" xlink:type="simple" xlink:show="embed" xlink:actuate="onLoad" draw:mime-type="image/png"/></draw:frame>He intentado solucionar este problema pero no he encontrado una solución para esto, por lo que he decidido hacerlo directamente desde el host.</text:p>
      <text:p text:style-name="P8"><draw:frame draw:style-name="fr1" draw:name="Imagen7" text:anchor-type="char" svg:x="-0.767cm" svg:y="0.132cm" svg:width="17cm" svg:height="2.995cm" draw:z-index="4"><draw:image xlink:href="Pictures/100000010000033700000091A0068D53.png" xlink:type="simple" xlink:show="embed" xlink:actuate="onLoad" draw:mime-type="image/png"/></draw:frame></text:p>
      <text:p text:style-name="P8"/>
      <text:p text:style-name="P8"><text:soft-page-break/>Una vez preparado el host he descargado y configurado jmeter y la he ejecutado durante un periodo de tiempo.</text:p>
      <text:p text:style-name="P8"><draw:frame draw:style-name="fr1" draw:name="Imagen4 Copia 1" text:anchor-type="char" svg:x="-0.796cm" svg:y="0.386cm" svg:width="11.007cm" svg:height="10.543cm" draw:z-index="5"><draw:image xlink:href="Pictures/10000001000003A000000379C9F9C7D8.png" xlink:type="simple" xlink:show="embed" xlink:actuate="onLoad" draw:mime-type="image/png"/></draw:frame></text:p>
      <text:p text:style-name="P8"/>
      <text:p text:style-name="P8"/>
      <text:p text:style-name="P8"><draw:frame draw:style-name="fr1" draw:name="Imagen8" text:anchor-type="char" svg:x="10.395cm" svg:y="0.18cm" svg:width="7.602cm" svg:height="8.659cm" draw:z-index="17"><draw:image xlink:href="Pictures/100000010000019A000001D3381629B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2">En la primera ejecución que hice me daba error del 100% , por lo que me puse a revisarlo para ver a que se debía.</text:p>
      <text:p text:style-name="P1"><draw:frame draw:style-name="fr1" draw:name="Imagen2" text:anchor-type="char" svg:x="-0.469cm" svg:y="0.22cm" svg:width="12.363cm" svg:height="6.69cm" draw:z-index="2"><draw:image xlink:href="Pictures/10000001000007800000040F75F345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Uno de los errores es que en credenciales de administrador y de alumnos tenia todos los hilos en vez de actual grupo de hilos, también tania JWT Token y Extract JWT Token de administrador creado fuera de sus grupos (esto no se si daba error pero lo vi al revisarlo), <text:span text:style-name="T1">hasta el momento no he visto más errores pero sigue sin funcionar.</text:span></text:p>
      <text:p text:style-name="P1"/>
      <text:p text:style-name="P1"/>
      <text:p text:style-name="P1"/>
      <text:p text:style-name="P1"/>
      <text:p text:style-name="P1"><draw:frame draw:style-name="fr1" draw:name="Imagen1" text:anchor-type="char" svg:x="-0.609cm" svg:y="0.164cm" svg:width="17cm" svg:height="7.518cm" draw:z-index="6"><draw:image xlink:href="Pictures/100000010000045D000001EECBACB178.png" xlink:type="simple" xlink:show="embed" xlink:actuate="onLoad" draw:mime-type="image/png"/></draw:frame><draw:frame draw:style-name="fr1" draw:name="Imagen9" text:anchor-type="char" svg:x="0.18cm" svg:y="8.005cm" svg:width="6.906cm" svg:height="14.235cm" draw:z-index="7"><draw:image xlink:href="Pictures/10000001000001050000021AB770459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La configuración de jmeter es la siguiente:</text:p>
      <text:p text:style-name="P11"><draw:frame draw:style-name="fr1" draw:name="Imagen10" text:anchor-type="char" svg:x="-0.492cm" svg:y="0.249cm" svg:width="15.833cm" svg:height="5.105cm" draw:z-index="8"><draw:image xlink:href="Pictures/100000010000044D00000163780C385B.png" xlink:type="simple" xlink:show="embed" xlink:actuate="onLoad" draw:mime-type="image/png"/></draw:frame><text:tab/></text:p>
      <text:p text:style-name="P11"><draw:frame draw:style-name="fr1" draw:name="Imagen11" text:anchor-type="char" svg:x="-0.45cm" svg:y="1.27cm" svg:width="15.512cm" svg:height="5.001cm" draw:z-index="9"><draw:image xlink:href="Pictures/100000010000044D0000016356CEFE75.png" xlink:type="simple" xlink:show="embed" xlink:actuate="onLoad" draw:mime-type="image/png"/></draw:frame>En el campo de contraseña podemos encontrar laApiDeLaETSIIDaLache, la cuál es la contraseña para poder conectarnos.</text:p>
      <text:p text:style-name="P11"><draw:frame draw:style-name="fr1" draw:name="Imagen12" text:anchor-type="char" svg:x="-0.45cm" svg:y="5.56cm" svg:width="15.446cm" svg:height="6.341cm" draw:z-index="10"><draw:image xlink:href="Pictures/1000000100000443000001C00A62E25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13" text:anchor-type="char" svg:x="-0.397cm" svg:y="0.296cm" svg:width="15.476cm" svg:height="5.408cm" draw:z-index="11"><draw:image xlink:href="Pictures/10000001000004480000017F2C908C6B.png" xlink:type="simple" xlink:show="embed" xlink:actuate="onLoad" draw:mime-type="image/png"/></draw:frame></text:p>
      <text:p text:style-name="P11"><draw:frame draw:style-name="fr1" draw:name="Imagen14" text:anchor-type="char" svg:x="0cm" svg:y="-0.148cm" svg:width="15.035cm" svg:height="5.59cm" draw:z-index="12"><draw:image xlink:href="Pictures/100000010000044C0000019924DA3E96.png" xlink:type="simple" xlink:show="embed" xlink:actuate="onLoad" draw:mime-type="image/png"/></draw:frame><draw:frame draw:style-name="fr1" draw:name="Imagen15" text:anchor-type="char" svg:x="-0.007cm" svg:y="5.757cm" svg:width="7.939cm" svg:height="4.426cm" draw:z-index="13"><draw:image xlink:href="Pictures/100000010000020A00000123A5808409.png" xlink:type="simple" xlink:show="embed" xlink:actuate="onLoad" draw:mime-type="image/png"/></draw:frame><text:soft-page-break/></text:p>
      <text:p text:style-name="P11"><draw:frame draw:style-name="fr1" draw:name="Imagen16" text:anchor-type="char" svg:x="8.248cm" svg:y="0.056cm" svg:width="9.135cm" svg:height="4.14cm" draw:z-index="14"><draw:image xlink:href="Pictures/100000010000023500000100C207754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17" text:anchor-type="char" svg:x="-0.132cm" svg:y="0.104cm" svg:width="14.6cm" svg:height="3.595cm" draw:z-index="15"><draw:image xlink:href="Pictures/100000010000029A000000A49251EF1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ara los administradores esta casi todo con los mismos datos, lo único que cambia es que cambia es los test que se le pasan a credenciales administradores que se le pasan los test de administradores y:</text:p>
      <text:p text:style-name="P11"><draw:frame draw:style-name="fr1" draw:name="Imagen18" text:anchor-type="char" svg:x="-0.318cm" svg:y="0.169cm" svg:width="17cm" svg:height="5.644cm" draw:z-index="16"><draw:image xlink:href="Pictures/100000010000044B0000016DEAF1F80E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4:49:36.552933784</meta:creation-date>
    <dc:date>2024-12-12T10:09:38.954361236</dc:date>
    <meta:editing-duration>PT2H21M42S</meta:editing-duration>
    <meta:editing-cycles>9</meta:editing-cycles>
    <meta:generator>LibreOffice/24.2.5.2$Linux_X86_64 LibreOffice_project/420$Build-2</meta:generator>
    <meta:document-statistic meta:table-count="0" meta:image-count="18" meta:object-count="0" meta:page-count="5" meta:paragraph-count="20" meta:word-count="358" meta:character-count="2020" meta:non-whitespace-character-count="1676"/>
  </office:meta>
</office:document-meta>
</file>