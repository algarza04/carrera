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400000221CE4DAA36.png" manifest:media-type="image/png"/>
  <manifest:file-entry manifest:full-path="Pictures/10000001000002CF00000142B521029E.png" manifest:media-type="image/png"/>
  <manifest:file-entry manifest:full-path="Pictures/100000010000035F0000015194B18B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ab66" officeooo:paragraph-rsid="0015ab66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3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6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9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4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5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00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7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31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89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0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52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42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3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4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43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31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38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67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Marco de texto 1" draw:style-name="gr6" draw:text-style-name="P2" svg:width="2.303cm" svg:height="0.489cm" svg:x="14.295cm" svg:y="0.568cm"><draw:text-box><text:p>0100</text:p></draw:text-box></draw:frame><draw:frame text:anchor-type="paragraph" draw:z-index="2" draw:name="Marco de texto 2" draw:style-name="gr21" draw:text-style-name="P2" svg:width="1.641cm" svg:height="0.676cm" svg:x="14.48cm" svg:y="1.057cm"><draw:text-box><text:p>0001</text:p></draw:text-box></draw:frame><draw:frame text:anchor-type="paragraph" draw:z-index="3" draw:name="Marco de texto 3" draw:style-name="gr15" draw:text-style-name="P2" svg:width="1.615cm" svg:height="0.489cm" svg:x="14.321cm" svg:y="1.468cm"><draw:text-box><text:p>0012</text:p></draw:text-box></draw:frame><draw:frame text:anchor-type="paragraph" draw:z-index="4" draw:name="Marco de texto 4" draw:style-name="gr5" draw:text-style-name="P2" svg:width="1.615cm" svg:height="0.489cm" svg:x="14.321cm" svg:y="1.956cm"><draw:text-box><text:p>0011</text:p></draw:text-box></draw:frame><draw:frame text:anchor-type="paragraph" draw:z-index="5" draw:name="Marco de texto 5" draw:style-name="gr3" draw:text-style-name="P2" svg:width="1.959cm" svg:height="0.489cm" svg:x="14.321cm" svg:y="2.445cm"><draw:text-box><text:p>0002</text:p></draw:text-box></draw:frame><draw:frame text:anchor-type="paragraph" draw:z-index="6" draw:name="Marco de texto 6" draw:style-name="gr9" draw:text-style-name="P2" svg:width="1.694cm" svg:height="0.489cm" svg:x="14.321cm" svg:y="2.817cm"><draw:text-box><text:p>0010</text:p></draw:text-box></draw:frame><draw:frame text:anchor-type="paragraph" draw:z-index="7" draw:name="Marco de texto 7" draw:style-name="gr3" draw:text-style-name="P2" svg:width="1.773cm" svg:height="0.489cm" svg:x="14.48cm" svg:y="3.769cm"><draw:text-box><text:p>0011</text:p></draw:text-box></draw:frame><draw:frame text:anchor-type="paragraph" draw:z-index="8" draw:name="Marco de texto 8" draw:style-name="gr3" draw:text-style-name="P2" svg:width="1.773cm" svg:height="0.489cm" svg:x="14.215cm" svg:y="4.219cm"><draw:text-box><text:p>0100</text:p></draw:text-box></draw:frame><draw:frame text:anchor-type="paragraph" draw:z-index="9" draw:name="Marco de texto 9" draw:style-name="gr20" draw:text-style-name="P2" svg:width="1.456cm" svg:height="0.489cm" svg:x="14.215cm" svg:y="4.708cm"><draw:text-box><text:p>0013</text:p></draw:text-box></draw:frame><draw:frame text:anchor-type="paragraph" draw:z-index="10" draw:name="Marco de texto 10" draw:style-name="gr19" draw:text-style-name="P2" svg:width="1.509cm" svg:height="0.489cm" svg:x="14.586cm" svg:y="5.038cm"><draw:text-box><text:p>0101</text:p></draw:text-box></draw:frame><draw:frame text:anchor-type="paragraph" draw:z-index="11" draw:name="Marco de texto 11" draw:style-name="gr10" draw:text-style-name="P2" svg:width="1.721cm" svg:height="0.489cm" svg:x="14.374cm" svg:y="5.41cm"><draw:text-box><text:p>0002</text:p></draw:text-box></draw:frame><draw:frame text:anchor-type="paragraph" draw:z-index="12" draw:name="Marco de texto 12" draw:style-name="gr18" draw:text-style-name="P2" svg:width="1.482cm" svg:height="0.489cm" svg:x="14.374cm" svg:y="5.898cm"><draw:text-box><text:p>0113</text:p></draw:text-box></draw:frame><draw:frame text:anchor-type="paragraph" draw:z-index="13" draw:name="Marco de texto 13" draw:style-name="gr17" draw:text-style-name="P2" svg:width="1.8cm" svg:height="0.489cm" svg:x="14.374cm" svg:y="6.387cm"><draw:text-box><text:p>0100</text:p></draw:text-box></draw:frame><draw:frame text:anchor-type="paragraph" draw:z-index="14" draw:name="Marco de texto 14" draw:style-name="gr16" draw:text-style-name="P2" svg:width="1.403cm" svg:height="0.489cm" svg:x="14.374cm" svg:y="6.876cm"><draw:text-box><text:p>0015</text:p></draw:text-box></draw:frame><draw:frame text:anchor-type="paragraph" draw:z-index="17" draw:name="Marco de texto 15" draw:style-name="gr15" draw:text-style-name="P2" svg:width="2.382cm" svg:height="0.489cm" svg:x="11.278cm" svg:y="10.209cm"><draw:text-box><text:p>2(section)</text:p></draw:text-box></draw:frame><draw:frame text:anchor-type="paragraph" draw:z-index="18" draw:name="Marco de texto 16" draw:style-name="gr14" draw:text-style-name="P2" svg:width="1.271cm" svg:height="0.53cm" svg:x="14.85cm" svg:y="10.183cm"><draw:text-box><text:p>green</text:p></draw:text-box></draw:frame><draw:frame text:anchor-type="paragraph" draw:z-index="19" draw:name="Marco de texto 17" draw:style-name="gr7" draw:text-style-name="P2" svg:width="2.567cm" svg:height="0.489cm" svg:x="11.278cm" svg:y="10.698cm"><draw:text-box><text:p>12(section h2)</text:p></draw:text-box></draw:frame><draw:frame text:anchor-type="paragraph" draw:z-index="20" draw:name="Marco de texto 18" draw:style-name="gr13" draw:text-style-name="P2" svg:width="1.488cm" svg:height="0.609cm" svg:x="14.85cm" svg:y="10.58cm"><draw:text-box><text:p>skyblue</text:p></draw:text-box></draw:frame><draw:frame text:anchor-type="paragraph" draw:z-index="21" draw:name="Marco de texto 19" draw:style-name="gr4" draw:text-style-name="P2" svg:width="4.261cm" svg:height="0.976cm" svg:x="10.696cm" svg:y="12.617cm"><draw:text-box><text:p>1.2(#ftecnica&amp;&amp;section)</text:p></draw:text-box></draw:frame><draw:frame text:anchor-type="paragraph" draw:z-index="22" draw:name="Marco de texto 20" draw:style-name="gr4" draw:text-style-name="P2" svg:width="2.779cm" svg:height="0.976cm" svg:x="14.956cm" svg:y="12.617cm"><draw:text-box><text:p>gold+espec.</text:p></draw:text-box></draw:frame><draw:frame text:anchor-type="paragraph" draw:z-index="23" draw:name="Marco de texto 21" draw:style-name="gr12" draw:text-style-name="P2" svg:width="5.663cm" svg:height="0.895cm" svg:x="9.453cm" svg:y="13.093cm"><draw:text-box><text:p><text:span text:style-name="T2">11.12(#ftecnica h2 &amp;&amp; section h2)</text:span></text:p></draw:text-box></draw:frame><draw:frame text:anchor-type="paragraph" draw:z-index="24" draw:name="Marco de texto 22" draw:style-name="gr11" draw:text-style-name="P2" svg:width="1.43cm" svg:height="0.715cm" svg:x="15.115cm" svg:y="13.093cm"><draw:text-box><text:p>plum</text:p></draw:text-box></draw:frame><draw:frame text:anchor-type="paragraph" draw:z-index="25" draw:name="Marco de texto 23" draw:style-name="gr10" draw:text-style-name="P2" svg:width="4.128cm" svg:height="0.489cm" svg:x="10.564cm" svg:y="14.258cm"><draw:text-box><text:p>5,6(li span &amp;&amp; .enfasis)</text:p></draw:text-box></draw:frame><draw:frame text:anchor-type="paragraph" draw:z-index="26" draw:name="Marco de texto 24" draw:style-name="gr10" draw:text-style-name="P2" svg:width="1.641cm" svg:height="0.489cm" svg:x="14.691cm" svg:y="14.258cm"><draw:text-box><text:p>pink</text:p></draw:text-box></draw:frame><draw:frame text:anchor-type="paragraph" draw:z-index="27" draw:name="Marco de texto 25" draw:style-name="gr9" draw:text-style-name="P2" svg:width="4.155cm" svg:height="0.489cm" svg:x="10.617cm" svg:y="14.919cm"><draw:text-box><text:p>5(li span)</text:p></draw:text-box></draw:frame><draw:frame text:anchor-type="paragraph" draw:z-index="28" draw:name="Marco de texto 26" draw:style-name="gr3" draw:text-style-name="P2" svg:width="1.641cm" svg:height="0.489cm" svg:x="14.771cm" svg:y="14.919cm"><draw:text-box><text:p>blue</text:p></draw:text-box></draw:frame><draw:frame text:anchor-type="paragraph" draw:z-index="29" draw:name="Marco de texto 27" draw:style-name="gr4" draw:text-style-name="P2" svg:width="4.419cm" svg:height="0.976cm" svg:x="10.194cm" svg:y="15.607cm"><draw:text-box><text:p>3,5(li&gt;span:not(:first-child)&amp;&amp; li span))</text:p></draw:text-box></draw:frame><draw:frame text:anchor-type="paragraph" draw:z-index="30" draw:name="Marco de texto 28" draw:style-name="gr6" draw:text-style-name="P2" svg:width="1.35cm" svg:height="0.489cm" svg:x="14.93cm" svg:y="15.819cm"><draw:text-box><text:p>aqua</text:p></draw:text-box></draw:frame><draw:frame text:anchor-type="paragraph" draw:z-index="31" draw:name="Marco de texto 29" draw:style-name="gr6" draw:text-style-name="P2" svg:width="1.35cm" svg:height="0.489cm" svg:x="14.956cm" svg:y="16.48cm"><draw:text-box><text:p>aqua</text:p></draw:text-box></draw:frame><draw:frame text:anchor-type="paragraph" draw:z-index="32" draw:name="Marco de texto 30" draw:style-name="gr6" draw:text-style-name="P2" svg:width="1.35cm" svg:height="0.489cm" svg:x="14.93cm" svg:y="15.819cm"><draw:text-box><text:p>aqua</text:p></draw:text-box></draw:frame><draw:frame text:anchor-type="paragraph" draw:z-index="33" draw:name="Marco de texto 31" draw:style-name="gr6" draw:text-style-name="P2" svg:width="1.35cm" svg:height="0.489cm" svg:x="14.903cm" svg:y="17.274cm"><draw:text-box><text:p>aqua</text:p></draw:text-box></draw:frame><draw:frame text:anchor-type="paragraph" draw:z-index="34" draw:name="Marco de texto 32" draw:style-name="gr4" draw:text-style-name="P2" svg:width="4.419cm" svg:height="0.976cm" svg:x="10.194cm" svg:y="16.48cm"><draw:text-box><text:p>3,5(li&gt;span:not(:first-child)&amp;&amp; li span))</text:p></draw:text-box></draw:frame><draw:frame text:anchor-type="paragraph" draw:z-index="35" draw:name="Marco de texto 33" draw:style-name="gr4" draw:text-style-name="P3" svg:width="4.419cm" svg:height="0.976cm" svg:x="10.194cm" svg:y="17.455cm"><draw:text-box><text:p><text:span text:style-name="T1">3,5(li&gt;span:not(:first-child)¬¬ li span))</text:span></text:p></draw:text-box></draw:frame><draw:frame text:anchor-type="paragraph" draw:z-index="36" draw:name="Marco de texto 34" draw:style-name="gr9" draw:text-style-name="P2" svg:width="1.535cm" svg:height="0.489cm" svg:x="14.797cm" svg:y="18.861cm"><draw:text-box><text:p>sienna</text:p></draw:text-box></draw:frame><draw:frame text:anchor-type="paragraph" draw:z-index="37" draw:name="Marco de texto 35" draw:style-name="gr6" draw:text-style-name="P2" svg:width="4.049cm" svg:height="0.489cm" svg:x="10.59cm" svg:y="18.861cm"><draw:text-box><text:p>13(li:last-child)</text:p></draw:text-box></draw:frame><draw:frame text:anchor-type="paragraph" draw:z-index="38" draw:name="Marco de texto 36" draw:style-name="gr8" draw:text-style-name="P2" svg:width="1.324cm" svg:height="0.489cm" svg:x="15.168cm" svg:y="20.449cm"><draw:text-box><text:p>green</text:p></draw:text-box></draw:frame><draw:frame text:anchor-type="paragraph" draw:z-index="39" draw:name="Marco de texto 37" draw:style-name="gr7" draw:text-style-name="P2" svg:width="1.535cm" svg:height="0.489cm" svg:x="14.956cm" svg:y="20.937cm"><draw:text-box><text:p>skyblue</text:p></draw:text-box></draw:frame><draw:frame text:anchor-type="paragraph" draw:z-index="40" draw:name="Marco de texto 38" draw:style-name="gr6" draw:text-style-name="P2" svg:width="1.694cm" svg:height="0.489cm" svg:x="15.014cm" svg:y="21.613cm"><draw:text-box><text:p>gray</text:p></draw:text-box></draw:frame><draw:frame text:anchor-type="paragraph" draw:z-index="41" draw:name="Marco de texto 39" draw:style-name="gr5" draw:text-style-name="P2" svg:width="1.779cm" svg:height="0.489cm" svg:x="14.93cm" svg:y="22.102cm"><draw:text-box><text:p>salmon</text:p></draw:text-box></draw:frame><draw:frame text:anchor-type="paragraph" draw:z-index="42" draw:name="Marco de texto 40" draw:style-name="gr5" draw:text-style-name="P2" svg:width="1.562cm" svg:height="0.489cm" svg:x="14.982cm" svg:y="22.936cm"><draw:text-box><text:p>saalmon</text:p></draw:text-box></draw:frame><draw:frame text:anchor-type="paragraph" draw:z-index="43" draw:name="Marco de texto 41" draw:style-name="gr4" draw:text-style-name="P2" svg:width="1.985cm" svg:height="0.976cm" svg:x="14.982cm" svg:y="23.28cm"><draw:text-box><text:p>darkblue</text:p></draw:text-box></draw:frame><draw:frame text:anchor-type="paragraph" draw:z-index="44" draw:name="Marco de texto 42" draw:style-name="gr2" draw:text-style-name="P2" svg:width="1.482cm" svg:height="0.489cm" svg:x="15.035cm" svg:y="26.164cm"><draw:text-box><text:p>pink</text:p></draw:text-box></draw:frame><draw:frame text:anchor-type="paragraph" draw:z-index="45" draw:name="Marco de texto 43" draw:style-name="gr2" draw:text-style-name="P2" svg:width="2.885cm" svg:height="0.489cm" svg:x="11.252cm" svg:y="26.137cm"><draw:text-box><text:p>6(.enfasis)</text:p></draw:text-box></draw:frame><draw:frame text:anchor-type="paragraph" draw:z-index="46" draw:name="Marco de texto 44" draw:style-name="gr6" draw:text-style-name="P2" svg:width="2.065cm" svg:height="0.489cm" svg:x="11.887cm" svg:y="20.634cm"><draw:text-box><text:p>2(section)</text:p></draw:text-box></draw:frame><draw:frame text:anchor-type="paragraph" draw:z-index="47" draw:name="Marco de texto 45" draw:style-name="gr5" draw:text-style-name="P2" svg:width="2.647cm" svg:height="0.489cm" svg:x="11.675cm" svg:y="21.031cm"><draw:text-box><text:p>12(section h2)</text:p></draw:text-box></draw:frame><draw:frame text:anchor-type="paragraph" draw:z-index="48" draw:name="Marco de texto 46" draw:style-name="gr4" draw:text-style-name="P3" svg:width="4.208cm" svg:height="0.976cm" svg:x="10.67cm" svg:y="21.772cm"><draw:text-box><text:p><text:span text:style-name="T1">9,10(#brya</text:span><text:span text:style-name="T1">n&amp;&amp;li.mai</text:span><text:span text:style-name="T1">n)</text:span></text:p></draw:text-box></draw:frame><draw:frame text:anchor-type="paragraph" draw:z-index="49" draw:name="Marco de texto 47" draw:style-name="gr3" draw:text-style-name="P2" svg:width="2.514cm" svg:height="0.489cm" svg:x="11.516cm" svg:y="22.089cm"><draw:text-box><text:p>8(2º,4º,6º...)</text:p></draw:text-box></draw:frame><draw:frame text:anchor-type="paragraph" draw:z-index="50" draw:name="Marco de texto 48" draw:style-name="gr2" draw:text-style-name="P2" svg:width="1.218cm" svg:height="0.489cm" svg:x="12.125cm" svg:y="22.909cm"><draw:text-box><text:p>8</text:p></draw:text-box></draw:frame><draw:frame text:anchor-type="paragraph" draw:z-index="51" draw:name="Marco de texto 49" draw:style-name="gr1" draw:text-style-name="P2" svg:width="2.382cm" svg:height="0.489cm" svg:x="11.596cm" svg:y="23.2cm"><draw:text-box><text:p>14(#betsy)</text:p></draw:text-box></draw:frame><draw:frame draw:style-name="fr2" draw:name="Imagen1" text:anchor-type="char" svg:width="19.001cm" svg:height="7.419cm" draw:z-index="0"><draw:image xlink:href="Pictures/100000010000035F0000015194B18B78.png" xlink:type="simple" xlink:show="embed" xlink:actuate="onLoad" draw:mime-type="image/png"/></draw:frame><draw:frame draw:style-name="fr1" draw:name="Imagen3" text:anchor-type="char" svg:x="-0.291cm" svg:y="20.087cm" svg:width="17cm" svg:height="7.613cm" draw:z-index="16"><draw:image xlink:href="Pictures/10000001000002CF00000142B521029E.png" xlink:type="simple" xlink:show="embed" xlink:actuate="onLoad" draw:mime-type="image/png"/></draw:frame><draw:frame draw:style-name="fr1" draw:name="Imagen2" text:anchor-type="char" svg:x="-0.45cm" svg:y="7.417cm" svg:width="17cm" svg:height="12.797cm" draw:z-index="15"><draw:image xlink:href="Pictures/10000001000002D400000221CE4DAA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9:58:56.250061965</meta:creation-date>
    <dc:date>2025-04-11T20:24:42.726475724</dc:date>
    <meta:editing-duration>PT3M32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