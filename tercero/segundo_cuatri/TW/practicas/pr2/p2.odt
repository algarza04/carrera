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E00000095C575B8EA.png" manifest:media-type="image/png"/>
  <manifest:file-entry manifest:full-path="Pictures/10000001000004180000032135CFD9B2.png" manifest:media-type="image/png"/>
  <manifest:file-entry manifest:full-path="Pictures/1000000100000163000000E3B027BF2C.png" manifest:media-type="image/png"/>
  <manifest:file-entry manifest:full-path="Pictures/10000001000003D900000302D6DB11EC.png" manifest:media-type="image/png"/>
  <manifest:file-entry manifest:full-path="Pictures/10000001000001EE000000B7B02AB7EB.png" manifest:media-type="image/png"/>
  <manifest:file-entry manifest:full-path="Pictures/10000001000001F8000000A7E888F09A.png" manifest:media-type="image/png"/>
  <manifest:file-entry manifest:full-path="Pictures/10000001000001F6000000B444E175FE.png" manifest:media-type="image/png"/>
  <manifest:file-entry manifest:full-path="Pictures/10000001000003AE0000027E3C46EB52.png" manifest:media-type="image/png"/>
  <manifest:file-entry manifest:full-path="Pictures/100000010000054100000141FAB5779B.png" manifest:media-type="image/png"/>
  <manifest:file-entry manifest:full-path="Pictures/100000010000034D0000026D9F263154.png" manifest:media-type="image/png"/>
  <manifest:file-entry manifest:full-path="Pictures/10000001000003220000026966ED4F50.png" manifest:media-type="image/png"/>
  <manifest:file-entry manifest:full-path="Pictures/10000001000002DA0000020A9B0E6732.png" manifest:media-type="image/png"/>
  <manifest:file-entry manifest:full-path="Pictures/1000000100000476000003E345417CAD.png" manifest:media-type="image/png"/>
  <manifest:file-entry manifest:full-path="Pictures/10000001000001CB0000011B2DFF4C85.png" manifest:media-type="image/png"/>
  <manifest:file-entry manifest:full-path="Pictures/100000010000031D000001255EF419DA.png" manifest:media-type="image/png"/>
  <manifest:file-entry manifest:full-path="Pictures/10000001000006B00000052CB633DFBE.png" manifest:media-type="image/png"/>
  <manifest:file-entry manifest:full-path="Pictures/1000000100000494000004AF27A01214.png" manifest:media-type="image/png"/>
  <manifest:file-entry manifest:full-path="Pictures/10000001000001E00000014165D798D6.png" manifest:media-type="image/png"/>
  <manifest:file-entry manifest:full-path="Pictures/10000001000003690000026FA5F40792.png" manifest:media-type="image/png"/>
  <manifest:file-entry manifest:full-path="Pictures/10000001000001DE000000C866AF78CF.png" manifest:media-type="image/png"/>
  <manifest:file-entry manifest:full-path="Pictures/100000010000054100000141C3E38795.png" manifest:media-type="image/png"/>
  <manifest:file-entry manifest:full-path="Pictures/10000001000001E10000008C89AAA1BA.png" manifest:media-type="image/png"/>
  <manifest:file-entry manifest:full-path="Pictures/10000001000001E10000010D9BD4ED3E.png" manifest:media-type="image/png"/>
  <manifest:file-entry manifest:full-path="Pictures/10000001000002EE00000181C61DA620.png" manifest:media-type="image/png"/>
  <manifest:file-entry manifest:full-path="Pictures/10000001000004980000045E1B1FB1C2.png" manifest:media-type="image/png"/>
  <manifest:file-entry manifest:full-path="Pictures/10000001000002EE000002D6354D749E.png" manifest:media-type="image/png"/>
  <manifest:file-entry manifest:full-path="Pictures/1000000100000558000004445D1DC16D.png" manifest:media-type="image/png"/>
  <manifest:file-entry manifest:full-path="Pictures/1000000100000233000002249AD27E02.png" manifest:media-type="image/png"/>
  <manifest:file-entry manifest:full-path="Pictures/1000000100000324000000D8A1AD96F8.png" manifest:media-type="image/png"/>
  <manifest:file-entry manifest:full-path="Pictures/10000001000002E5000000EE14AD36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cbf" officeooo:paragraph-rsid="000d3c56"/>
    </style:style>
    <style:style style:name="P2" style:family="paragraph" style:parent-style-name="Standard">
      <style:text-properties fo:font-weight="normal" officeooo:rsid="000d3c56" officeooo:paragraph-rsid="000d3c56" style:font-weight-asian="normal" style:font-weight-complex="normal"/>
    </style:style>
    <style:style style:name="P3" style:family="paragraph" style:parent-style-name="Standard">
      <style:text-properties fo:font-weight="normal" officeooo:rsid="0013db3f" officeooo:paragraph-rsid="0013db3f" style:font-weight-asian="normal" style:font-weight-complex="normal"/>
    </style:style>
    <style:style style:name="P4" style:family="paragraph" style:parent-style-name="Standard">
      <style:text-properties fo:font-weight="normal" officeooo:rsid="0011412c" officeooo:paragraph-rsid="0011412c" style:font-weight-asian="normal" style:font-weight-complex="normal"/>
    </style:style>
    <style:style style:name="P5" style:family="paragraph" style:parent-style-name="Standard">
      <style:text-properties fo:font-weight="normal" officeooo:rsid="00152755" officeooo:paragraph-rsid="00152755" style:font-weight-asian="normal" style:font-weight-complex="normal"/>
    </style:style>
    <style:style style:name="P6" style:family="paragraph" style:parent-style-name="Standard">
      <style:text-properties fo:font-weight="normal" officeooo:rsid="0016dbd6" officeooo:paragraph-rsid="0016dbd6" style:font-weight-asian="normal" style:font-weight-complex="normal"/>
    </style:style>
    <style:style style:name="P7" style:family="paragraph" style:parent-style-name="Standard">
      <style:text-properties fo:font-weight="normal" officeooo:rsid="0018598d" officeooo:paragraph-rsid="0018598d" style:font-weight-asian="normal" style:font-weight-complex="normal"/>
    </style:style>
    <style:style style:name="P8" style:family="paragraph" style:parent-style-name="Standard">
      <style:text-properties fo:font-weight="normal" officeooo:rsid="0019e408" officeooo:paragraph-rsid="0019e408" style:font-weight-asian="normal" style:font-weight-complex="normal"/>
    </style:style>
    <style:style style:name="P9" style:family="paragraph" style:parent-style-name="Standard">
      <style:text-properties fo:font-size="12pt" fo:font-weight="normal" officeooo:rsid="000afcbf" officeooo:paragraph-rsid="000afcb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ca447" officeooo:paragraph-rsid="000ca44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d3c56" officeooo:paragraph-rsid="000d3c5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de2a1" officeooo:paragraph-rsid="000d3c5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style="normal" fo:font-weight="normal" officeooo:rsid="000afcbf" officeooo:paragraph-rsid="000afcb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officeooo:rsid="000de2a1" officeooo:paragraph-rsid="000de2a1"/>
    </style:style>
    <style:style style:name="P15" style:family="paragraph" style:parent-style-name="Standard">
      <style:text-properties officeooo:rsid="000de2a1" officeooo:paragraph-rsid="001d840b"/>
    </style:style>
    <style:style style:name="P16" style:family="paragraph" style:parent-style-name="Standard">
      <style:text-properties fo:font-weight="bold" officeooo:rsid="000de2a1" officeooo:paragraph-rsid="000de2a1" style:font-weight-asian="bold" style:font-weight-complex="bold"/>
    </style:style>
    <style:style style:name="P17" style:family="paragraph" style:parent-style-name="Standard">
      <style:text-properties fo:font-weight="bold" officeooo:rsid="0011412c" officeooo:paragraph-rsid="0011412c" style:font-weight-asian="bold" style:font-weight-complex="bold"/>
    </style:style>
    <style:style style:name="P18" style:family="paragraph" style:parent-style-name="Standard">
      <style:text-properties fo:font-size="13pt" fo:font-weight="bold" officeooo:rsid="000afcbf" officeooo:paragraph-rsid="000afcbf" style:font-size-asian="13pt" style:font-weight-asian="bold" style:font-size-complex="13pt" style:font-weight-complex="bold"/>
    </style:style>
    <style:style style:name="P19" style:family="paragraph" style:parent-style-name="Standard">
      <style:text-properties style:text-underline-style="none" fo:font-weight="normal" officeooo:rsid="000de2a1" officeooo:paragraph-rsid="000de2a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9e408" officeooo:paragraph-rsid="0019e408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1b6a12" officeooo:paragraph-rsid="001b6a12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c1d47" officeooo:paragraph-rsid="001c1d47" style:font-weight-asian="bold" style:font-weight-complex="bold"/>
    </style:style>
    <style:style style:name="P23" style:family="paragraph" style:parent-style-name="Standard">
      <style:text-properties fo:color="#000000" loext:opacity="100%" fo:font-size="15pt" fo:font-style="italic" fo:font-weight="bold" officeooo:rsid="000afcbf" officeooo:paragraph-rsid="000afcbf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text-properties fo:font-size="15pt" fo:font-style="italic" officeooo:rsid="000afcbf" officeooo:paragraph-rsid="000d3c56" style:font-size-asian="15pt" style:font-style-asian="italic" style:font-size-complex="15pt" style:font-style-complex="italic"/>
    </style:style>
    <style:style style:name="P25" style:family="paragraph" style:parent-style-name="Standard">
      <style:text-properties fo:font-size="15pt" fo:font-style="italic" fo:font-weight="bold" officeooo:rsid="000de2a1" officeooo:paragraph-rsid="000de2a1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text-properties fo:font-size="15pt" fo:font-style="italic" fo:font-weight="bold" officeooo:rsid="000de2a1" officeooo:paragraph-rsid="001d840b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text-properties fo:font-size="15pt" fo:font-style="italic" fo:font-weight="bold" officeooo:rsid="0011412c" officeooo:paragraph-rsid="0011412c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text-properties fo:font-size="15pt" fo:font-style="italic" style:text-underline-style="none" fo:font-weight="bold" officeooo:rsid="001c1d47" officeooo:paragraph-rsid="001c1d47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 style:list-style-name="L1">
      <style:text-properties fo:font-size="12pt" fo:font-weight="normal" officeooo:rsid="000ca447" officeooo:paragraph-rsid="000afcb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00ca447" officeooo:paragraph-rsid="000ca447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1f41c0" officeooo:paragraph-rsid="001f41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5pt" fo:font-style="italic" style:text-underline-style="none" fo:font-weight="bold" officeooo:rsid="001b6a12" officeooo:paragraph-rsid="001b6a12" style:font-size-asian="15pt" style:font-style-asian="italic" style:font-weight-asian="bold" style:font-size-complex="15pt" style:font-style-complex="italic" style:font-weight-complex="bold"/>
    </style:style>
    <style:style style:name="P33" style:family="paragraph" style:parent-style-name="Standard">
      <style:text-properties style:text-underline-style="none" fo:font-weight="bold" officeooo:rsid="001c1d47" officeooo:paragraph-rsid="001b6a12" style:font-weight-asian="bold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d3c56" style:font-size-asian="13pt" style:font-size-complex="13pt"/>
    </style:style>
    <style:style style:name="T4" style:family="text">
      <style:text-properties officeooo:rsid="000ca447"/>
    </style:style>
    <style:style style:name="T5" style:family="text">
      <style:text-properties officeooo:rsid="00145af2"/>
    </style:style>
    <style:style style:name="T6" style:family="text">
      <style:text-properties officeooo:rsid="0016dbd6"/>
    </style:style>
    <style:style style:name="T7" style:family="text">
      <style:text-properties officeooo:rsid="0018598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3c56" style:font-weight-asian="bold" style:font-weight-complex="bold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Á<text:span text:style-name="T5">lvaro García Zafra<text:tab/>Practica 2</text:span></text:p>
      <text:p text:style-name="P18"/>
      <text:p text:style-name="P23">Ejercicio 1</text:p>
      <text:p text:style-name="P13">$ curl <text:a xlink:type="simple" xlink:href="http://void.ugr.es/publico/noredir/hola.html" text:style-name="Internet_20_link" text:visited-style-name="Visited_20_Internet_20_Link">http://void.ugr.es/publico/noredir/hola.html</text:a></text:p>
      <text:p text:style-name="P13">Al realizar el curl de esta dirección nos aparecer por pantalla el código html de esta.</text:p>
      <text:p text:style-name="P13"/>
      <text:p text:style-name="P9">$ curl -v <text:a xlink:type="simple" xlink:href="http://void.ugr.es/publico/noredir/hola.html" text:style-name="Internet_20_link" text:visited-style-name="Visited_20_Internet_20_Link">http://void.ugr.es/publico/noredir/hola.html</text:a></text:p>
      <text:p text:style-name="P9">Al añadirle el modificador -v nos aparece información sobre <text:span text:style-name="T4">la dirección:</text:span></text:p>
      <text:list text:style-name="L1">
        <text:list-item>
          <text:p text:style-name="P29">Primera linea: indica que estamos solicitando una página con la versión 1.1 de HTTP</text:p>
        </text:list-item>
        <text:list-item>
          <text:p text:style-name="P29">Encabezados: nos indican que estamos realizando una solicitud al host void.ugr.es, con el agente de usuario curl/8.5.0 y que puede aceptar cualquier contenido del tipo MIME.</text:p>
        </text:list-item>
        <text:list-item>
          <text:p text:style-name="P29">Al recibir el servidor el mensaje nos da la siguiente respuesta HTTP</text:p>
          <text:list>
            <text:list-item>
              <text:p text:style-name="P30">Primera linea: indica que esta usando HTTP versión 1.1 y que no ha habido ningún error.</text:p>
            </text:list-item>
            <text:list-item>
              <text:p text:style-name="P30">Encabezados: nos indican la hora en que se ha enviado la respuesta, que esta usando el servidor Apache/2.4.52, que esta usando un mecanismo de transporte seguro, que la última fecha de modificación del documento fue en febrero de 2024, el tag, el tamaño del fichero en bytes(152), y el tipo MIME text/html.</text:p>
            </text:list-item>
          </text:list>
        </text:list-item>
      </text:list>
      <text:p text:style-name="P10">A parte de toda esta información también nos aparece el código fuente del documento solicitado.</text:p>
      <text:p text:style-name="P10"/>
      <text:p text:style-name="P1"><text:span text:style-name="T1"/></text:p>
      <text:p text:style-name="P1"><text:span text:style-name="T1"/></text:p>
      <text:p text:style-name="P1"><text:span text:style-name="T1"/></text:p>
      <text:p text:style-name="P24"><text:span text:style-name="T9">Ejercicio </text:span><text:span text:style-name="T10">2</text:span></text:p>
      <text:p text:style-name="P2"><text:span text:style-name="T2">$ curl -v </text:span><text:a xlink:type="simple" xlink:href="http://void.ugr.es/publico/hola.html" text:style-name="Internet_20_link" text:visited-style-name="Visited_20_Internet_20_Link"><text:span text:style-name="T2">http://void.ugr.es/publico/hola.html</text:span></text:a></text:p>
      <text:p text:style-name="P2"><draw:frame draw:style-name="fr2" draw:name="Imagen1" text:anchor-type="char" svg:x="0.034cm" svg:y="0.183cm" svg:width="15.709cm" svg:height="11.211cm" draw:z-index="0"><draw:image xlink:href="Pictures/10000001000003690000026FA5F40792.png" xlink:type="simple" xlink:show="embed" xlink:actuate="onLoad" draw:mime-type="image/png"/></draw:frame><text:span text:style-name="T3"/></text:p>
      <text:p text:style-name="P11"/>
      <text:p text:style-name="P11"/>
      <text:p text:style-name="P11"/>
      <text:p text:style-name="P11"><text:soft-page-break/>$ curl -vL <text:a xlink:type="simple" xlink:href="http://void.ugr.es/publico/hola.html" text:style-name="Internet_20_link" text:visited-style-name="Visited_20_Internet_20_Link">http://void.ugr.es/publico/hola.html</text:a></text:p>
      <text:p text:style-name="P12"><draw:frame draw:style-name="fr2" draw:name="Imagen2" text:anchor-type="char" svg:x="-0.104cm" svg:y="0.395cm" svg:width="13.836cm" svg:height="12.053cm" draw:z-index="1"><draw:image xlink:href="Pictures/1000000100000476000003E345417CAD.png" xlink:type="simple" xlink:show="embed" xlink:actuate="onLoad" draw:mime-type="image/png"/></draw:frame><text:s/></text:p>
      <text:p text:style-name="P12"/>
      <text:p text:style-name="P12"/>
      <text:p text:style-name="P26">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Ejercicio 3</text:p>
      <text:p text:style-name="P14">$ curl -v -H "Accept-Encoding: gzip" <text:a xlink:type="simple" xlink:href="http://void.ugr.es/publico/noredir/hola.html" text:style-name="Internet_20_link" text:visited-style-name="Visited_20_Internet_20_Link">http://void.ugr.es/publico/noredir/hola.html</text:a></text:p>
      <text:p text:style-name="P14"><draw:frame draw:style-name="fr2" draw:name="Imagen3" text:anchor-type="char" svg:x="0.425cm" svg:y="0.032cm" svg:width="11.707cm" svg:height="9.006cm" draw:z-index="2"><draw:image xlink:href="Pictures/10000001000003220000026966ED4F50.png" xlink:type="simple" xlink:show="embed" xlink:actuate="onLoad" draw:mime-type="image/png"/></draw:frame></text:p>
      <text:p text:style-name="P14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$ curl -v -H "Accept-Encoding: gzip" <text:a xlink:type="simple" xlink:href="http://void.ugr.es/publico/noredir/hola.html" text:style-name="Internet_20_link" text:visited-style-name="Visited_20_Internet_20_Link">http://void.ugr.es/publico/noredir/hola.html</text:a> –output -</text:p>
      <text:p text:style-name="P14"><draw:frame draw:style-name="fr2" draw:name="Imagen4" text:anchor-type="char" svg:x="0.309cm" svg:y="0cm" svg:width="11.977cm" svg:height="8.802cm" draw:z-index="3"><draw:image xlink:href="Pictures/100000010000034D0000026D9F26315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$ curl -v -H "Accept-Encoding: gzip" <text:a xlink:type="simple" xlink:href="http://void.ugr.es/publico/noredir/hola.html" text:style-name="Internet_20_link" text:visited-style-name="Visited_20_Internet_20_Link">http://void.ugr.es/publico/noredir/hola.html</text:a> –output fichero.html.gz</text:p>
      <text:p text:style-name="P14"><draw:frame draw:style-name="fr2" draw:name="Imagen5" text:anchor-type="char" svg:x="0.215cm" svg:y="0.148cm" svg:width="11.917cm" svg:height="8.072cm" draw:z-index="4"><draw:image xlink:href="Pictures/10000001000003AE0000027E3C46EB52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l descomprimir el archivo (gunzip fichero.html.gz) podemos ver el código html.</text:p>
      <text:p text:style-name="P14"><draw:frame draw:style-name="fr2" draw:name="Imagen6" text:anchor-type="char" svg:x="1.498cm" svg:y="0cm" svg:width="6.207cm" svg:height="3.969cm" draw:z-index="5"><draw:image xlink:href="Pictures/1000000100000163000000E3B027BF2C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Ejercicio 4</text:p>
      <text:p text:style-name="P16"/>
      <text:p text:style-name="P16"><draw:frame draw:style-name="fr2" draw:name="Imagen9" text:anchor-type="char" svg:x="0.702cm" svg:y="0cm" svg:width="9.604cm" svg:height="9.297cm" draw:z-index="6"><draw:image xlink:href="Pictures/10000001000002EE000002D6354D749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  <text:p text:style-name="P3">En este caso la última línea nos indica que la conexión no ha sido cerrada, que permanece intacta.</text:p>
      <text:p text:style-name="P3"/>
      <text:p text:style-name="P3"><draw:frame draw:style-name="fr2" draw:name="Imagen10" text:anchor-type="char" svg:x="0.3cm" svg:y="0.143cm" svg:width="14.605cm" svg:height="11.418cm" draw:z-index="7"><draw:image xlink:href="Pictures/10000001000003D900000302D6DB11EC.png" xlink:type="simple" xlink:show="embed" xlink:actuate="onLoad" draw:mime-type="image/png"/></draw:frame></text:p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  <text:p text:style-name="P3">Como podemos ver al usar la extensión -H “Conection: Close” nos indica que la conexión no es persistente, ya que nos indica que ha sido cerrada, otro indicador de que ha sido cerrada es la última línea, Closing connection.</text:p>
      <text:p text:style-name="P16"/>
      <text:p text:style-name="P16"><draw:frame draw:style-name="fr2" draw:name="Imagen11" text:anchor-type="char" svg:x="0.115cm" svg:y="0.228cm" svg:width="14.39cm" svg:height="10.998cm" draw:z-index="8"><draw:image xlink:href="Pictures/10000001000004180000032135CFD9B2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 este caso al añadir la extensión -H “Conection: Keep-Alive” se mantiene la conexión persistente, además al igual que en el primer caso <text:span text:style-name="T5">la última linea nos indica que la conexión permanece intacta.</text:span></text:p>
      <text:p text:style-name="P16"/>
      <text:p text:style-name="P16"/>
      <text:p text:style-name="P16"/>
      <text:p text:style-name="P16"/>
      <text:p text:style-name="P27">Ejercicio 5</text:p>
      <text:p text:style-name="P17"><draw:frame draw:style-name="fr2" draw:name="Imagen13" text:anchor-type="char" svg:x="-0.035cm" svg:y="0.328cm" svg:width="9.23cm" svg:height="3.059cm" draw:z-index="10"><draw:image xlink:href="Pictures/10000001000001F8000000A7E888F09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5">El servidor de void.ugr.es es Apache y redir<text:span text:style-name="T6">ige</text:span> a https <text:span text:style-name="T7">de manera permanente</text:span>.</text:p>
      <text:p text:style-name="P5"/>
      <text:p text:style-name="P17"><draw:frame draw:style-name="fr2" draw:name="Imagen12" text:anchor-type="char" svg:x="-0.261cm" svg:y="0.413cm" svg:width="9.85cm" svg:height="3.531cm" draw:z-index="9"><draw:image xlink:href="Pictures/10000001000001F6000000B444E175F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/>
      <text:p text:style-name="P4">El servidor de <text:a xlink:type="simple" xlink:href="http://www.ugr.es/" text:style-name="Internet_20_link" text:visited-style-name="Visited_20_Internet_20_Link">www.ugr.es</text:a> es nginx <text:span text:style-name="T6">y redirige a https </text:span><text:span text:style-name="T7">de manera permanente</text:span>.</text:p>
      <text:p text:style-name="P4"/>
      <text:p text:style-name="P17"/>
      <text:p text:style-name="P17"><draw:frame draw:style-name="fr2" draw:name="Imagen14" text:anchor-type="char" svg:x="0.06cm" svg:y="-0.079cm" svg:width="9.841cm" svg:height="2.969cm" draw:z-index="11"><draw:image xlink:href="Pictures/10000001000001EE00000095C575B8EA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4">El servidor de upm.es es BigIP <text:span text:style-name="T6">y redirige a https </text:span><text:span text:style-name="T7">de forma temporal</text:span><text:span text:style-name="T6">.</text:span></text:p>
      <text:p text:style-name="P4"/>
      <text:p text:style-name="P4"><draw:frame draw:style-name="fr2" draw:name="Imagen15" text:anchor-type="char" svg:x="0cm" svg:y="0.36cm" svg:width="8.107cm" svg:height="5.422cm" draw:z-index="12"><draw:image xlink:href="Pictures/10000001000001E00000014165D798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l servidor de xkcd.com utiliza varnish como servidor web, indica que cache-mad22070-MAD es el servidor que ha atendido la solicitud y que la respuesta viene de la cache, <text:span text:style-name="T6">además redirige a https </text:span><text:span text:style-name="T7">de manera permanente</text:span>.</text:p>
      <text:p text:style-name="P4"/>
      <text:p text:style-name="P4"/>
      <text:p text:style-name="P6"><draw:frame draw:style-name="fr2" draw:name="Imagen16" text:anchor-type="char" svg:x="-0.318cm" svg:y="0.138cm" svg:width="17cm" svg:height="4.057cm" draw:z-index="13"><draw:image xlink:href="Pictures/100000010000054100000141FAB5779B.png" xlink:type="simple" xlink:show="embed" xlink:actuate="onLoad" draw:mime-type="image/png"/></draw:frame>El servidor es cloudflare <text:span text:style-name="T7">y redirige a https de manera permanente.</text:span></text:p>
      <text:p text:style-name="P4"/>
      <text:p text:style-name="P4"/>
      <text:p text:style-name="P7"><draw:frame draw:style-name="fr3" draw:name="Imagen17" text:anchor-type="char" svg:width="17cm" svg:height="4.057cm" draw:z-index="14"><draw:image xlink:href="Pictures/100000010000054100000141C3E38795.png" xlink:type="simple" xlink:show="embed" xlink:actuate="onLoad" draw:mime-type="image/png"/></draw:frame>El servidor es cloudfare y redirige a https de manera permanente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n18" text:anchor-type="char" svg:x="0.243cm" svg:y="-0.041cm" svg:width="10.552cm" svg:height="3.909cm" draw:z-index="19"><draw:image xlink:href="Pictures/10000001000001EE000000B7B02AB7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El servidor es nginx.</text:p>
      <text:p text:style-name="P4"/>
      <text:p text:style-name="P4"/>
      <text:p text:style-name="P4"><draw:frame draw:style-name="fr2" draw:name="Imagen19" text:anchor-type="char" svg:x="0.407cm" svg:y="0.016cm" svg:width="11.105cm" svg:height="3.233cm" draw:z-index="15"><draw:image xlink:href="Pictures/10000001000001E10000008C89AAA1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El servidor es Apache y OpenSSL y redirige a https de manera permanente.</text:p>
      <text:p text:style-name="P4"/>
      <text:p text:style-name="P4"/>
      <text:p text:style-name="P4"/>
      <text:p text:style-name="P4"><draw:frame draw:style-name="fr2" draw:name="Imagen20" text:anchor-type="char" svg:x="0.236cm" svg:y="0cm" svg:width="8.8cm" svg:height="4.921cm" draw:z-index="16"><draw:image xlink:href="Pictures/10000001000001E10000010D9BD4ED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El servidor es nginx, la solicitud a pasado por por un sistema varnish y redirige a https de forma permanente.</text:p>
      <text:p text:style-name="P4"/>
      <text:p text:style-name="P4"/>
      <text:p text:style-name="P4"><draw:frame draw:style-name="fr2" draw:name="Imagen21" text:anchor-type="char" svg:x="-0.023cm" svg:y="0.051cm" svg:width="10.061cm" svg:height="4.21cm" draw:z-index="17"><draw:image xlink:href="Pictures/10000001000001DE000000C866AF78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El servidor es awselb y redirige a https de forma permanente.</text:p>
      <text:p text:style-name="P4"/>
      <text:p text:style-name="P4"/>
      <text:p text:style-name="P4"/>
      <text:p text:style-name="P4"/>
      <text:p text:style-name="P4"><draw:frame draw:style-name="fr2" draw:name="Imagen22" text:anchor-type="char" svg:x="-0.33cm" svg:y="0.079cm" svg:width="11.418cm" svg:height="5.861cm" draw:z-index="18"><draw:image xlink:href="Pictures/10000001000002EE00000181C61DA62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7">El servidor es apache y redirige de forma permanente.</text:p>
      <text:p text:style-name="P17"/>
      <text:p text:style-name="P17"/>
      <text:p text:style-name="P17"/>
      <text:p text:style-name="P17"/>
      <text:p text:style-name="P17"><text:s text:c="2"/><text:span text:style-name="T11">Ejercicio 6</text:span></text:p>
      <text:p text:style-name="P17"><draw:frame draw:style-name="fr2" draw:name="Imagen23" text:anchor-type="char" svg:x="-0.034cm" svg:y="0.425cm" svg:width="9.59cm" svg:height="9.116cm" draw:z-index="21"><draw:image xlink:href="Pictures/10000001000004980000045E1B1FB1C2.png" xlink:type="simple" xlink:show="embed" xlink:actuate="onLoad" draw:mime-type="image/png"/></draw:frame><draw:frame draw:style-name="fr2" draw:name="Imagen7" text:anchor-type="char" svg:x="9.892cm" svg:y="0.349cm" svg:width="8.357cm" svg:height="3.074cm" draw:z-index="20"><draw:image xlink:href="Pictures/100000010000031D000001255EF419D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Get envía los datos en la URL y los podemos modificar y además nos permite realizarlo también desde la terminal con curl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Ejercicio 7</text:p>
      <text:p text:style-name="P19"><text:span text:style-name="T8">curl -d "nombre=Pepito&amp;password=laclave&amp;enviar=Enviar" -v </text:span><text:a xlink:type="simple" xlink:href="https://void.ugr.es/publico/procesar.php" text:style-name="Internet_20_link" text:visited-style-name="Visited_20_Internet_20_Link"><text:span text:style-name="T8">https://void.ugr.es/publico/procesar.php</text:span></text:a></text:p>
      <text:p text:style-name="P20">Este comando envía los datos como cuerpo de la solicitud mientas que al utilizarlo con la extensión –trace-ascii nos muestra como los datos están siendo realmente enviados.</text:p>
      <text:p text:style-name="P20"><draw:frame draw:style-name="fr2" draw:name="Imagen8" text:anchor-type="char" svg:x="0.123cm" svg:y="0.097cm" svg:width="9.435cm" svg:height="7.532cm" draw:z-index="22"><draw:image xlink:href="Pictures/1000000100000558000004445D1DC16D.png" xlink:type="simple" xlink:show="embed" xlink:actuate="onLoad" draw:mime-type="image/png"/></draw:frame><draw:frame draw:style-name="fr2" draw:name="Imagen24" text:anchor-type="char" svg:x="9.557cm" svg:y="0.658cm" svg:width="7.973cm" svg:height="4.916cm" draw:z-index="23"><draw:image xlink:href="Pictures/10000001000001CB0000011B2DFF4C85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32">Ejercicio 8</text:p>
      <text:p text:style-name="P31">Para que al hacer el curl funcione de esta manera lo que he hecho ha sido cambiar el formulario poniendo &lt;form action="https://void.ugr.es/~miusuario/procesar.php" method="POST"&gt;, así de esta manera el action apunta hacia el.</text:p>
      <text:p text:style-name="P21"><draw:frame draw:style-name="fr2" draw:name="Imagen30" text:anchor-type="char" svg:x="0.273cm" svg:y="0.434cm" svg:width="14.427cm" svg:height="11.157cm" draw:z-index="29"><draw:image xlink:href="Pictures/10000001000006B00000052CB633DFB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8">Ejercicio 9</text:p>
      <text:p text:style-name="P22"><draw:frame draw:style-name="fr2" draw:name="Imagen27" text:anchor-type="char" svg:x="-0.485cm" svg:y="0.416cm" svg:width="10.186cm" svg:height="9.915cm" draw:z-index="26"><draw:image xlink:href="Pictures/1000000100000233000002249AD27E0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25" text:anchor-type="char" svg:x="0.552cm" svg:y="4.103cm" svg:width="12.019cm" svg:height="8.592cm" draw:z-index="24"><draw:image xlink:href="Pictures/10000001000002DA0000020A9B0E6732.png" xlink:type="simple" xlink:show="embed" xlink:actuate="onLoad" draw:mime-type="image/png"/></draw:frame><draw:frame draw:style-name="fr2" draw:name="Imagen26" text:anchor-type="char" svg:x="-1.016cm" svg:y="0.062cm" svg:width="17.364cm" svg:height="4.043cm" draw:z-index="25"><draw:image xlink:href="Pictures/1000000100000324000000D8A1AD96F8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/>
      <text:p text:style-name="P28"><text:soft-page-break/>Ejercicio 10</text:p>
      <text:p text:style-name="P22"><draw:frame draw:style-name="fr2" draw:name="Imagen28" text:anchor-type="char" svg:x="0.074cm" svg:y="0.247cm" svg:width="13.342cm" svg:height="4.284cm" draw:z-index="27"><draw:image xlink:href="Pictures/10000001000002E5000000EE14AD36B5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n29" text:anchor-type="char" svg:width="17cm" svg:height="17.392cm" draw:z-index="28"><draw:image xlink:href="Pictures/1000000100000494000004AF27A012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2:37:53.356139600</meta:creation-date>
    <dc:date>2025-03-12T18:46:31.687364057</dc:date>
    <meta:editing-duration>PT3H6M</meta:editing-duration>
    <meta:editing-cycles>6</meta:editing-cycles>
    <meta:generator>LibreOffice/24.2.7.2$Linux_X86_64 LibreOffice_project/420$Build-2</meta:generator>
    <meta:document-statistic meta:table-count="0" meta:image-count="30" meta:object-count="0" meta:page-count="11" meta:paragraph-count="53" meta:word-count="572" meta:character-count="3702" meta:non-whitespace-character-count="3169"/>
  </office:meta>
</office:document-meta>
</file>