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E000000A831CE27FC.png" manifest:media-type="image/png"/>
  <manifest:file-entry manifest:full-path="Pictures/100000010000036E000000A8A32ACC6E.png" manifest:media-type="image/png"/>
  <manifest:file-entry manifest:full-path="Pictures/10000001000003A9000000F1EC234B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none" officeooo:rsid="003b4ca8" officeooo:paragraph-rsid="0038ef4f"/>
    </style:style>
    <style:style style:name="P2" style:family="paragraph" style:parent-style-name="Standard">
      <style:text-properties officeooo:rsid="003ceefe" officeooo:paragraph-rsid="003ceefe"/>
    </style:style>
    <style:style style:name="P3" style:family="paragraph" style:parent-style-name="Standard">
      <style:text-properties officeooo:rsid="003ecafc" officeooo:paragraph-rsid="003ecafc"/>
    </style:style>
    <style:style style:name="P4" style:family="paragraph" style:parent-style-name="Text_20_body">
      <style:text-properties officeooo:rsid="003ecafc" officeooo:paragraph-rsid="003ecafc"/>
    </style:style>
    <style:style style:name="P5" style:family="paragraph" style:parent-style-name="Standard">
      <style:text-properties officeooo:rsid="003fcc40" officeooo:paragraph-rsid="003fcc40"/>
    </style:style>
    <style:style style:name="P6" style:family="paragraph" style:parent-style-name="Text_20_body">
      <style:text-properties officeooo:rsid="003fcc40" officeooo:paragraph-rsid="003fcc40"/>
    </style:style>
    <style:style style:name="P7" style:family="paragraph" style:parent-style-name="Standard">
      <style:text-properties officeooo:rsid="0043e547" officeooo:paragraph-rsid="0043e547"/>
    </style:style>
    <style:style style:name="P8" style:family="paragraph" style:parent-style-name="Standard">
      <style:text-properties officeooo:rsid="00471fbd" officeooo:paragraph-rsid="00471fbd"/>
    </style:style>
    <style:style style:name="P9" style:family="paragraph" style:parent-style-name="Standard">
      <style:text-properties officeooo:rsid="0047f6dc" officeooo:paragraph-rsid="0047f6dc"/>
    </style:style>
    <style:style style:name="P10" style:family="paragraph" style:parent-style-name="Standard">
      <style:text-properties officeooo:rsid="00549a30" officeooo:paragraph-rsid="00549a30"/>
    </style:style>
    <style:style style:name="P11" style:family="paragraph" style:parent-style-name="Standard">
      <style:text-properties officeooo:rsid="005553b6" officeooo:paragraph-rsid="005553b6"/>
    </style:style>
    <style:style style:name="P12" style:family="paragraph" style:parent-style-name="Standard">
      <style:text-properties officeooo:rsid="005592ff" officeooo:paragraph-rsid="005592ff"/>
    </style:style>
    <style:style style:name="P13" style:family="paragraph" style:parent-style-name="Standard">
      <style:text-properties officeooo:paragraph-rsid="0042c361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T1" style:family="text">
      <style:text-properties style:text-underline-style="none" officeooo:rsid="003cb492"/>
    </style:style>
    <style:style style:name="T2" style:family="text">
      <style:text-properties style:text-underline-style="none" officeooo:rsid="003ceefe"/>
    </style:style>
    <style:style style:name="T3" style:family="text">
      <style:text-properties officeooo:rsid="003ecafc"/>
    </style:style>
    <style:style style:name="T4" style:family="text">
      <style:text-properties officeooo:rsid="0042c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<text:span text:style-name="T4">A3</text:span></text:p>
      <text:p text:style-name="P7">en primer lugar estuve intentando realizar el traefik, pero no entendia bien como funcionaba ni para que srvia por lo que le pregunte a la ia q me explicara desde 0</text:p>
      <text:p text:style-name="P7">que pasa si traefik no esta en ambas redes?</text:p>
      <text:h text:style-name="Heading_20_6" text:outline-level="6"/>
      <text:p text:style-name="Text_20_body">Si <text:span text:style-name="Strong_20_Emphasis">Traefik no está en ambas redes</text:span>, entonces no podrá acceder a los contenedores en la red en la que no esté presente. Esto significa que <text:span text:style-name="Strong_20_Emphasis">Traefik no podrá balancear tráfico entre los contenedores que están en redes separadas</text:span>.</text:p>
      <text:p text:style-name="P7"/>
      <text:p text:style-name="P7"><draw:frame draw:style-name="fr2" draw:name="Imagen45" text:anchor-type="char" svg:width="17cm" svg:height="4.371cm" draw:z-index="0"><draw:image xlink:href="Pictures/10000001000003A9000000F1EC234BDA.png" xlink:type="simple" xlink:show="embed" xlink:actuate="onLoad" draw:mime-type="image/png"/></draw:frame></text:p>
      <text:p text:style-name="P7"><draw:frame draw:style-name="fr2" draw:name="Imagen46" text:anchor-type="char" svg:width="17cm" svg:height="3.253cm" draw:z-index="1"><draw:image xlink:href="Pictures/100000010000036E000000A8A32ACC6E.png" xlink:type="simple" xlink:show="embed" xlink:actuate="onLoad" draw:mime-type="image/png"/></draw:frame><draw:frame draw:style-name="fr1" draw:name="Imagen47" text:anchor-type="char" svg:x="-0.355cm" svg:y="3.544cm" svg:width="17cm" svg:height="3.253cm" draw:z-index="2"><draw:image xlink:href="Pictures/100000010000036E000000A831CE27FC.png" xlink:type="simple" xlink:show="embed" xlink:actuate="onLoad" draw:mime-type="image/png"/></draw:frame></text:p>
      <text:p text:style-name="P9">Aquí podemos ver dos ejemplos de que divide correctamente la carga entre tod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a ia me decia cambiar mis redes por otras networks:</text:p>
      <text:p text:style-name="P7"><text:s text:c="2"/>traefik-net:</text:p>
      <text:p text:style-name="P7"><text:s text:c="4"/>driver: bridge</text:p>
      <text:p text:style-name="P7">o me decia que hiciera cosas que no hacian falta para lo q estaba pidiendo traefik-proxy/</text:p>
      <text:p text:style-name="P7">├── docker-compose.yml</text:p>
      <text:p text:style-name="P7">├── traefik/</text:p>
      <text:p text:style-name="P7">│ <text:s text:c="2"/>├── traefik.yml <text:s text:c="5"/>(configuración estática de Traefik)</text:p>
      <text:p text:style-name="P7">│ <text:s text:c="2"/>└── dynamic.yml <text:s text:c="5"/>(configuración dinámica de Traefik, si la necesitas)</text:p>
      <text:p text:style-name="P7">└── acme.json <text:s text:c="11"/>(si usas Let's Encrypt para certificados SSL)</text:p>
      <text:p text:style-name="P8">hay veces que no responde a ñp qie ñe estas preguntando y tienes que hacerlo varias veces, por ejemplo yo le pregunte sobre si era necesario que traekfik tuviera la red servicios configurada para que funcionara y me respondia a preguntas pero con ambas redes configuradas, despues de explicarselo varias veces me dijo que funcionaria sin problema y eso no es asi, traefik debe estan en todas las redes para poder balancear la carga sin problema</text:p>
      <text:p text:style-name="P8"/>
      <text:p text:style-name="P9">tambien dice q no es necesario un dockerfile</text:p>
      <text:p text:style-name="P9"/>
      <text:p text:style-name="P11">hay cosas q te pone y no te dice como el el apartado a4 en la coprobacion de errores haproxy que te dice que pongas option httpchk GET /health pero no te dice que sea necesario que para que funcione tiene que existir la ruta /health en la web</text:p>
      <text:p text:style-name="P9"/>
      <text:p text:style-name="P9"/>
      <text:p text:style-name="P9"><text:s text:c="3"/>server web1 192.168.10.2:80 maxconn 32 weight 1</text:p>
      <text:p text:style-name="P9"><text:s text:c="4"/>server web2 192.168.10.3:80 maxconn 32 weight 1</text:p>
      <text:p text:style-name="P9"><text:s text:c="4"/>server web3 192.168.10.4:80 maxconn 32 weight 4</text:p>
      <text:p text:style-name="P9"><text:s text:c="4"/>server web4 192.168.10.5:80 maxconn 32 weight 2</text:p>
      <text:p text:style-name="P9"><text:s text:c="4"/>server web5 192.168.10.6:80 maxconn 32 weight 1</text:p>
      <text:p text:style-name="P9"><text:s text:c="4"/>server web6 192.168.10.7:80 maxconn 32 weight 8</text:p>
      <text:p text:style-name="P9"><text:s text:c="4"/>server web7 192.168.10.8:80 maxconn 32 weight 1</text:p>
      <text:p text:style-name="P9"><text:s text:c="4"/>server web8 192.168.10.9:80 maxconn 32 weight 1</text:p>
      <text:p text:style-name="P9"/>
      <text:p text:style-name="P12">la ia ponia el copy en los dockerfile, cosa q no es necesaria ya que se hace con los volume en el docker compo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6:45:54.530538884</meta:creation-date>
    <dc:date>2025-04-23T18:39:42.109139694</dc:date>
    <meta:editing-duration>PT5H50M28S</meta:editing-duration>
    <meta:editing-cycles>14</meta:editing-cycles>
    <meta:generator>LibreOffice/24.2.7.2$Linux_X86_64 LibreOffice_project/420$Build-2</meta:generator>
    <meta:document-statistic meta:table-count="0" meta:image-count="3" meta:object-count="0" meta:page-count="4" meta:paragraph-count="26" meta:word-count="365" meta:character-count="2174" meta:non-whitespace-character-count="1773"/>
  </office:meta>
</office:document-meta>
</file>