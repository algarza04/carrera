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AA000000AA00666DF3.png" manifest:media-type="image/png"/>
  <manifest:file-entry manifest:full-path="Pictures/10000000000000AA000000AAE1ADA875.png" manifest:media-type="image/png"/>
  <manifest:file-entry manifest:full-path="Pictures/10000000000000AA000000AAA447D201.png" manifest:media-type="image/png"/>
  <manifest:file-entry manifest:full-path="Pictures/10000000000000AA000000AAE77FD44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12.324cm" svg:y="0.226cm" svg:width="4.498cm" svg:height="4.498cm" draw:z-index="0" draw:transform="translate (-14.573cm -2.475cm) rotate (4.71238898038469) translate (14.573cm 2.475cm)"><draw:image xlink:href="Pictures/10000000000000AA000000AAE77FD448.png" xlink:type="simple" xlink:show="embed" xlink:actuate="onLoad" draw:mime-type="image/png"/></draw:frame><draw:frame draw:style-name="fr1" draw:name="Imagen2" text:anchor-type="char" svg:x="0.086cm" svg:y="0.125cm" svg:width="4.498cm" svg:height="4.498cm" draw:z-index="1" draw:transform="translate (-2.335cm -2.374cm) rotate (4.71238898038469) translate (2.335cm 2.374cm)"><draw:image xlink:href="Pictures/10000000000000AA000000AAE1ADA875.png" xlink:type="simple" xlink:show="embed" xlink:actuate="onLoad" draw:mime-type="image/png"/></draw:frame></text:p>
      <text:p text:style-name="Standard"><draw:frame draw:style-name="fr1" draw:name="Imagen3" text:anchor-type="char" svg:x="12.351cm" svg:y="20.505cm" svg:width="4.498cm" svg:height="4.498cm" draw:z-index="2" draw:transform="translate (-14.6cm -22.754cm) rotate (4.71238898038469) translate (14.6cm 22.754cm)"><draw:image xlink:href="Pictures/10000000000000AA000000AAA447D201.png" xlink:type="simple" xlink:show="embed" xlink:actuate="onLoad" draw:mime-type="image/png"/></draw:frame><draw:frame draw:style-name="fr1" draw:name="Imagen4" text:anchor-type="char" svg:x="0.109cm" svg:y="20.394cm" svg:width="4.498cm" svg:height="4.498cm" draw:z-index="3" draw:transform="translate (-2.358cm -22.643cm) rotate (4.71238898038469) translate (2.358cm 22.643cm)"><draw:image xlink:href="Pictures/10000000000000AA000000AA00666D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1T18:35:24.643781875</meta:creation-date>
    <dc:date>2025-07-01T18:38:49.240418675</dc:date>
    <meta:editing-duration>PT3M25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