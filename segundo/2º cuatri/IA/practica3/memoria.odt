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70000031FFFBB2B5F5DB1EC65.png" manifest:media-type="image/png"/>
  <manifest:file-entry manifest:full-path="Pictures/10000001000003270000031F5502FB240AC5E776.png" manifest:media-type="image/png"/>
  <manifest:file-entry manifest:full-path="Pictures/10000001000003240000031DA8E7A3033F28507D.png" manifest:media-type="image/png"/>
  <manifest:file-entry manifest:full-path="Pictures/10000001000003270000031F2B4ADB90FED03532.png" manifest:media-type="image/png"/>
  <manifest:file-entry manifest:full-path="Pictures/10000001000003240000031DB60589E32C650E10.png" manifest:media-type="image/png"/>
  <manifest:file-entry manifest:full-path="Pictures/10000001000003240000031DE7BD7ACC7154FCF2.png" manifest:media-type="image/png"/>
  <manifest:file-entry manifest:full-path="Pictures/100000010000018A0000018A9CF6C16C1A48C4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0.61cm" table:align="left"/>
    </style:style>
    <style:style style:name="Tabla2.A" style:family="table-column">
      <style:table-column-properties style:column-width="5.292cm"/>
    </style:style>
    <style:style style:name="Tabla2.B" style:family="table-column">
      <style:table-column-properties style:column-width="5.318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1" style:family="table" style:master-page-name="">
      <style:table-properties style:width="17.992cm" fo:margin-left="-0.254cm" style:page-number="auto" table:align="left"/>
    </style:style>
    <style:style style:name="Tabla1.A" style:family="table-column">
      <style:table-column-properties style:column-width="8.969cm"/>
    </style:style>
    <style:style style:name="Tabla1.B" style:family="table-column">
      <style:table-column-properties style:column-width="9.022cm"/>
    </style:style>
    <style:style style:name="Tabla1.1" style:family="table-row">
      <style:table-row-properties style:min-row-height="1.11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2" style:family="table-row">
      <style:table-row-properties style:min-row-height="11.007cm"/>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3" style:family="table-row">
      <style:table-row-properties style:min-row-height="0cm"/>
    </style:style>
    <style:style style:name="P1" style:family="paragraph" style:parent-style-name="Standard">
      <style:paragraph-properties fo:text-align="center" style:justify-single-word="false"/>
      <style:text-properties fo:font-size="18pt" fo:font-weight="bold" officeooo:rsid="0016cbd9" officeooo:paragraph-rsid="0016cbd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officeooo:rsid="0016cbd9" officeooo:paragraph-rsid="0016cbd9"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style="italic" fo:font-weight="bold" officeooo:rsid="001fd0f9" officeooo:paragraph-rsid="001fd0f9"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b3b2c" officeooo:paragraph-rsid="002b3b2c"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font-size="20pt" fo:font-weight="bold" officeooo:rsid="0016cbd9" officeooo:paragraph-rsid="0016cbd9"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normal" officeooo:rsid="0016cbd9" officeooo:paragraph-rsid="0016cbd9"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32pt" fo:font-weight="bold" officeooo:rsid="0016cbd9" officeooo:paragraph-rsid="0016cbd9" style:font-size-asian="32pt" style:font-weight-asian="bold" style:font-size-complex="32pt" style:font-weight-complex="bold"/>
    </style:style>
    <style:style style:name="P8" style:family="paragraph" style:parent-style-name="Standard">
      <style:paragraph-properties fo:text-align="start" style:justify-single-word="false"/>
      <style:text-properties fo:font-size="14pt" fo:font-weight="normal" officeooo:rsid="001fd0f9" officeooo:paragraph-rsid="001fd0f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fd0f9" officeooo:paragraph-rsid="002cb6c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style="normal" fo:font-weight="normal" officeooo:rsid="001fd0f9" officeooo:paragraph-rsid="001fd0f9"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1fd0f9" officeooo:paragraph-rsid="0020471e"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0471e" officeooo:paragraph-rsid="0020471e"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1e844" officeooo:paragraph-rsid="0021e844"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21e844" officeooo:paragraph-rsid="00240a64"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240a64" officeooo:paragraph-rsid="00240a64"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26dc91" officeooo:paragraph-rsid="0026dc91"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2b3b2c" officeooo:paragraph-rsid="002b3b2c" style:font-size-asian="12.25pt" style:font-style-asian="normal" style:font-weight-asian="normal" style:font-size-complex="14pt" style:font-style-complex="normal" style:font-weight-complex="normal"/>
    </style:style>
    <style:style style:name="P18" style:family="paragraph" style:parent-style-name="Table_20_Contents">
      <style:paragraph-properties fo:text-align="start" style:justify-single-word="false"/>
      <style:text-properties fo:font-size="12pt" officeooo:rsid="001ca830" officeooo:paragraph-rsid="001ca830" style:font-size-asian="12pt" style:font-size-complex="12pt"/>
    </style:style>
    <style:style style:name="P19" style:family="paragraph" style:parent-style-name="Table_20_Contents">
      <style:paragraph-properties fo:text-align="start" style:justify-single-word="false"/>
      <style:text-properties fo:color="#00a933" loext:opacity="100%" fo:font-size="14pt" officeooo:rsid="0021e844" officeooo:paragraph-rsid="0021e844" style:font-size-asian="12.25pt" style:font-size-complex="14pt"/>
    </style:style>
    <style:style style:name="P20"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officeooo:rsid="002b3b2c" officeooo:paragraph-rsid="001fd0f9"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b3b2c" officeooo:paragraph-rsid="002b3b2c" style:font-size-asian="16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font-size="16pt" fo:font-weight="bold" officeooo:rsid="002b3b2c" officeooo:paragraph-rsid="002b3b2c" style:font-size-asian="16pt" style:font-weight-asian="bold" style:font-size-complex="16pt" style:font-weight-complex="bold"/>
    </style:style>
    <style:style style:name="P23" style:family="paragraph" style:parent-style-name="Table_20_Contents">
      <style:paragraph-properties fo:text-align="start" style:justify-single-word="false"/>
      <style:text-properties fo:font-size="2pt" officeooo:rsid="001ca830" officeooo:paragraph-rsid="001ca830" style:font-size-asian="1.75pt" style:font-size-complex="2pt"/>
    </style:style>
    <style:style style:name="P24" style:family="paragraph" style:parent-style-name="Standard">
      <style:paragraph-properties fo:text-align="start" style:justify-single-word="false"/>
      <style:text-properties fo:font-size="14pt" fo:font-weight="normal" officeooo:rsid="002cb6cb" officeooo:paragraph-rsid="002b3b2c" style:font-size-asian="14pt" style:font-weight-asian="normal" style:font-size-complex="14pt" style:font-weight-complex="normal"/>
    </style:style>
    <style:style style:name="P25" style:family="paragraph" style:parent-style-name="Standard" style:list-style-name="L1">
      <style:paragraph-properties fo:text-align="start" style:justify-single-word="false"/>
      <style:text-properties fo:font-size="14pt" fo:font-weight="normal" officeooo:rsid="001fd0f9" officeooo:paragraph-rsid="002d2cb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fd0f9" officeooo:paragraph-rsid="001fd0f9" style:font-size-asian="14pt" style:font-weight-asian="normal" style:font-size-complex="14pt" style:font-weight-complex="normal"/>
    </style:style>
    <style:style style:name="P27" style:family="paragraph" style:parent-style-name="Standard" style:list-style-name="L1">
      <style:paragraph-properties fo:text-align="start" style:justify-single-word="false"/>
      <style:text-properties fo:font-size="14pt" fo:font-weight="normal" officeooo:rsid="002e8a28" officeooo:paragraph-rsid="002e8a28"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2b3b2c" officeooo:paragraph-rsid="002b3b2c"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240a64" officeooo:paragraph-rsid="00240a64" style:font-size-asian="12.25pt" style:font-style-asian="normal" style:font-weight-asian="normal" style:font-size-complex="14pt" style:font-style-complex="normal" style:font-weight-complex="normal"/>
    </style:style>
    <style:style style:name="P30" style:family="paragraph" style:parent-style-name="Standard" style:list-style-name="L1">
      <style:paragraph-properties fo:text-align="start" style:justify-single-word="false"/>
      <style:text-properties officeooo:paragraph-rsid="00333e32"/>
    </style:style>
    <style:style style:name="P31" style:family="paragraph" style:parent-style-name="Standard" style:list-style-name="L1">
      <style:paragraph-properties fo:text-align="start" style:justify-single-word="false"/>
      <style:text-properties officeooo:paragraph-rsid="003378b0"/>
    </style:style>
    <style:style style:name="P32" style:family="paragraph" style:parent-style-name="Standard">
      <style:paragraph-properties fo:text-align="start" style:justify-single-word="false"/>
      <style:text-properties fo:font-size="20pt" fo:font-weight="bold" officeooo:rsid="0018b846" officeooo:paragraph-rsid="0018b846" style:font-size-asian="20pt" style:font-weight-asian="bold" style:font-size-complex="20pt" style:font-weight-complex="bold"/>
    </style:style>
    <style:style style:name="P33" style:family="paragraph" style:parent-style-name="Standard">
      <style:paragraph-properties fo:text-align="start" style:justify-single-word="false"/>
      <style:text-properties fo:font-size="20pt" fo:font-weight="bold" officeooo:rsid="0018b846" officeooo:paragraph-rsid="00349649"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20pt" fo:font-weight="bold" officeooo:rsid="0018b846" officeooo:paragraph-rsid="00240a64" style:font-size-asian="20pt" style:font-weight-asian="bold" style:font-size-complex="20pt" style:font-weight-complex="bold"/>
    </style:style>
    <style:style style:name="P35" style:family="paragraph" style:parent-style-name="Standard">
      <style:paragraph-properties fo:text-align="start" style:justify-single-word="false"/>
      <style:text-properties fo:font-size="20pt" fo:font-weight="bold" officeooo:rsid="00349649" officeooo:paragraph-rsid="00349649"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font-size="12pt" officeooo:rsid="001ca830" officeooo:paragraph-rsid="001ca830" style:font-size-asian="12pt" style:font-size-complex="12pt"/>
    </style:style>
    <style:style style:name="P3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font-size="14pt" officeooo:rsid="001ca830" officeooo:paragraph-rsid="00349649" style:font-size-asian="14pt" style:font-size-complex="14pt"/>
    </style:style>
    <style:style style:name="P38" style:family="paragraph" style:parent-style-name="Table_20_Contents">
      <style:paragraph-properties fo:text-align="start" style:justify-single-word="false"/>
      <style:text-properties fo:font-size="14pt" officeooo:rsid="001ca830" officeooo:paragraph-rsid="00349649" style:font-size-asian="14pt" style:font-size-complex="14pt"/>
    </style:style>
    <style:style style:name="P3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font-size="2pt" officeooo:rsid="001ca830" officeooo:paragraph-rsid="001ca830" style:font-size-asian="1.75pt" style:font-size-complex="2pt"/>
    </style:style>
    <style:style style:name="T1" style:family="text">
      <style:text-properties officeooo:rsid="0021e844"/>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3378b0" style:font-size-asian="16pt" style:font-weight-asian="bold" style:font-size-complex="16pt" style:font-weight-complex="bold"/>
    </style:style>
    <style:style style:name="T4" style:family="text">
      <style:text-properties officeooo:rsid="0025d46c"/>
    </style:style>
    <style:style style:name="T5" style:family="text">
      <style:text-properties officeooo:rsid="0026dc91"/>
    </style:style>
    <style:style style:name="T6" style:family="text">
      <style:text-properties fo:font-size="14pt" fo:font-weight="normal" officeooo:rsid="002cb6cb" style:font-size-asian="14pt" style:font-weight-asian="normal" style:font-size-complex="14pt" style:font-weight-complex="normal"/>
    </style:style>
    <style:style style:name="T7" style:family="text">
      <style:text-properties fo:font-size="14pt" fo:font-weight="normal" officeooo:rsid="00333e32" style:font-size-asian="14pt" style:font-weight-asian="normal" style:font-size-complex="14pt" style:font-weight-complex="normal"/>
    </style:style>
    <style:style style:name="T8" style:family="text">
      <style:text-properties fo:font-size="14pt" fo:font-weight="normal" officeooo:rsid="002d2cb6" style:font-size-asian="14pt" style:font-weight-asian="normal" style:font-size-complex="14pt" style:font-weight-complex="normal"/>
    </style:style>
    <style:style style:name="T9" style:family="text">
      <style:text-properties fo:font-size="14pt" fo:font-weight="normal" officeooo:rsid="002e8a28" style:font-size-asian="14pt" style:font-weight-asian="normal" style:font-size-complex="14pt" style:font-weight-complex="normal"/>
    </style:style>
    <style:style style:name="T10" style:family="text">
      <style:text-properties fo:font-size="14pt" fo:font-weight="normal" officeooo:rsid="003378b0" style:font-size-asian="14pt" style:font-weight-asian="normal" style:font-size-complex="14pt" style:font-weight-complex="normal"/>
    </style:style>
    <style:style style:name="T11" style:family="text">
      <style:text-properties officeooo:rsid="002cb6cb"/>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2d2cb6"/>
    </style:style>
    <style:style style:name="T14" style:family="text">
      <style:text-properties officeooo:rsid="003378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ELIGENCIA ARTIFICIAL</text:p>
      <text:p text:style-name="P7"/>
      <text:p text:style-name="P7">PRÁCTICA 3</text:p>
      <text:p text:style-name="P1"><draw:frame draw:style-name="fr3" draw:name="Imagen1" text:anchor-type="char" svg:x="1.304cm" svg:y="0.413cm" svg:width="14.448cm" svg:height="14.713cm" draw:z-index="0"><draw:image xlink:href="Pictures/100000010000018A0000018A9CF6C16C1A48C4D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6">Parchís (BOOM!)</text:p>
      <text:p text:style-name="P5"/>
      <text:p text:style-name="P1"/>
      <text:p text:style-name="P5">ÁLVARO GARCÍA ZAFRA</text:p>
      <text:p text:style-name="P5"/>
      <text:p text:style-name="P21"><text:soft-page-break/>ANÁLISIS DEL PROBLEMA</text:p>
      <text:p text:style-name="P4"/>
      <text:p text:style-name="P17">La práctica consiste en desarrollar un agente deliberativo capaz de ganar a su oponente en el juego del Parchís BOOM. Para ello, en cada partida debemos conseguir el mayor beneficio para ganar.</text:p>
      <text:p text:style-name="P17"/>
      <text:p text:style-name="P17">Para conseguir nuestro objetivo vamos a crear un árbol de exploración, el cuál puede ser min-max o poda alfa-beta, el segundo es mejor ya que tiene que evaluar menos nodos.</text:p>
      <text:p text:style-name="P17"/>
      <text:p text:style-name="P17">Cada uno de los hijos del árbol son las posibles jugadas hasta llegar a los nodos hoja, los cuáles se evalúan con la heurística creada <text:span text:style-name="T11">y de este modo le va añadiendo valor al hijo.</text:span></text:p>
      <text:p text:style-name="P17"/>
      <text:p text:style-name="P17"/>
      <text:p text:style-name="P22"><text:span text:style-name="T12">DESCRIPCIÓN DE LA SOLUCIÓN</text:span><text:span text:style-name="T6"> </text:span></text:p>
      <text:p text:style-name="P24"/>
      <text:p text:style-name="P3">Poda Alfa-Beta</text:p>
      <text:p text:style-name="P9">Para realizar este algoritmo he partido de <text:span text:style-name="T5">la cabecera que había creada en la práctica</text:span><text:span text:style-name="T11"> y de la explicación de clase, lo cuál he acompañado con un pseudocódigo.</text:span></text:p>
      <text:p text:style-name="P9"/>
      <text:list xml:id="list3079935076" text:style-name="L1">
        <text:list-item>
          <text:p text:style-name="P25"><text:span text:style-name="T11">E</text:span><text:span text:style-name="T13">ste algoritmo comprueba si se a alcanzado la profundidad máxima o si ha terminado la partida, en este caso devuelve el valor heurístico.</text:span></text:p>
          <text:p text:style-name="P25"/>
        </text:list-item>
        <text:list-item>
          <text:p text:style-name="P31"><text:span text:style-name="T8">Posteriormente inicializa el mejor valor y recorre todos los hijos del estado actual, llamando recursivamente al algoritmo e incrementando su profundidad.</text:span></text:p>
          <text:p text:style-name="P31"><text:span text:style-name="T8"><text:s/></text:span></text:p>
        </text:list-item>
        <text:list-item>
          <text:p text:style-name="P30"><text:span text:style-name="T8">Dentro del bucle </text:span><text:span text:style-name="T7">se pueden dar dos opciones</text:span><text:span text:style-name="T10">(maximizar o minimizar</text:span><text:span text:style-name="T7">:</text:span></text:p>
          <text:list>
            <text:list-item text:start-value="1">
              <text:p text:style-name="P31"><text:span text:style-name="T7">En el caso de maximizar</text:span><text:span text:style-name="T8"> actualiza mejor valor </text:span><text:span text:style-name="T7">si es menor que el</text:span><text:span text:style-name="T9"> valor del hijo </text:span><text:span text:style-name="T10">y actualiza también el valor de alpha con el máximo. Si profundidad es 0</text:span><text:span text:style-name="T9"> </text:span><text:span text:style-name="T10">actualiza algunas variables</text:span><text:span text:style-name="T9">.</text:span></text:p>
            </text:list-item>
            <text:list-item>
              <text:p text:style-name="P31"><text:span text:style-name="T10">En el caso de minimizar actualiza mejor valor si es mayor que el valor del hijo y actualiza beta con el mínimo.</text:span><text:span text:style-name="T9"> </text:span></text:p>
            </text:list-item>
            <text:list-item>
              <text:p text:style-name="P31"><text:span text:style-name="T10">Una vez realizado lo anterior comprueba si beta es menor o igual que alfa, si es correcto realiza la poda</text:span><text:span text:style-name="T9">.</text:span></text:p>
            </text:list-item>
          </text:list>
          <text:p text:style-name="P30"><text:span text:style-name="T9"/></text:p>
        </text:list-item>
        <text:list-item>
          <text:p text:style-name="P27">Finalmente devuelve el mejor valor encontrado.</text:p>
        </text:list-item>
      </text:list>
      <text:p text:style-name="P8"/>
      <text:p text:style-name="P8"/>
      <text:p text:style-name="P8"/>
      <text:p text:style-name="P8"/>
      <text:p text:style-name="P8"/>
      <text:p text:style-name="P8"/>
      <text:p text:style-name="P3"><text:soft-page-break/>Mi heurística</text:p>
      <text:p text:style-name="P20"/>
      <text:p text:style-name="P10">Para conseguir ganar a los tres ninjas de la práctica he creado una sola heurística en la cuál he añadido las mismas condiciones tanto para mi jugador como para el oponente, las que suman para el jugador las valoro positivamente y las que restan <text:span text:style-name="T14">las valoro </text:span>negativamente<text:span text:style-name="T14">, </text:span>mientras que para el oponente es al contrario.</text:p>
      <text:p text:style-name="P10"/>
      <text:p text:style-name="P11">Al crear la heurística me empezó dando como correctos 3 de los 6 <text:span text:style-name="T4">combates</text:span>, para esto añadí:</text:p>
      <text:p text:style-name="P11"><text:s/><text:tab/>-<text:span text:style-name="T4">Sumar </text:span>cuando una pieza entra en la meta.</text:p>
      <text:p text:style-name="P11"><text:tab/>-<text:span text:style-name="T4">Sumar</text:span> al formar una barrera.</text:p>
      <text:p text:style-name="P12"><text:tab/>-<text:span text:style-name="T4">Sumar</text:span> al llegar al camino final.</text:p>
      <text:p text:style-name="P12"><text:tab/>-<text:span text:style-name="T4">Sumar</text:span> al entrar en una casilla segura.</text:p>
      <text:p text:style-name="P12"><text:tab/>-<text:span text:style-name="T4">Restar</text:span> al tener <text:span text:style-name="T14">ficha</text:span> en casa.</text:p>
      <text:p text:style-name="P12"><text:tab/>-<text:span text:style-name="T4">Sumar</text:span> por estar cerca de la meta.</text:p>
      <text:p text:style-name="P12"/>
      <text:p text:style-name="P12">Después seguí haciendo pruebas y añadiendo condiciones, con lo que se me quedó en 4 de 6 <text:span text:style-name="T4">combates</text:span>:</text:p>
      <text:p text:style-name="P12"><text:tab/>-<text:span text:style-name="T4">S</text:span>umar por comerse una ficha rival, si termina en una casilla segura o <text:span text:style-name="T14">que me beneficie </text:span>suma más.</text:p>
      <text:p text:style-name="P12"><text:tab/>-<text:span text:style-name="T4">S</text:span>umar por comerse una ficha de mi mismo jugador siempre y cuándo termine en una posición beneficiosa para mis fichas.</text:p>
      <text:p text:style-name="P12"><text:tab/>-<text:span text:style-name="T4">C</text:span>ambié la manera en la que resta al tener una ficha en casa, restando más dependiendo de si hay 0, 1 o 2 fichas en la meta.</text:p>
      <text:p text:style-name="P12"><text:tab/>-<text:span text:style-name="T4">A</text:span>ñadí las acciones del dado especial, sumando más en las acciones que son positivas para mis colores y restando más en las que más me perjudican.</text:p>
      <text:p text:style-name="P12"/>
      <text:p text:style-name="P13"><text:span text:style-name="T5">Para poder </text:span>llegar a <text:span text:style-name="T5">gana</text:span><text:span text:style-name="T14">r</text:span><text:span text:style-name="T5"> </text:span>los 6 <text:span text:style-name="T5">combates</text:span> estuve intercambiando los valores <text:span text:style-name="T14">de las condiciones</text:span>, esto no me mej<text:span text:style-name="T5">o</text:span>raba <text:span text:style-name="T5">por lo que</text:span> pensé en <text:span text:style-name="T5">eliminar</text:span> co<text:span text:style-name="T5">ndiciones para ver si alguna de ellas me </text:span><text:span text:style-name="T14">estaba </text:span><text:span text:style-name="T5">perjudica</text:span><text:span text:style-name="T14">ndo</text:span>, de esta manera <text:span text:style-name="T5">quité</text:span> la condición de sumar al hacer una barrera y <text:span text:style-name="T5">terminé encontrando así la solución</text:span>.</text:p>
      <text:p text:style-name="P16"/>
      <text:p text:style-name="P13"/>
      <table:table table:name="Tabla2" table:style-name="Tabla2">
        <table:table-column table:style-name="Tabla2.A"/>
        <table:table-column table:style-name="Tabla2.B"/>
        <table:table-row>
          <table:table-cell table:style-name="Tabla2.A1" office:value-type="string">
            <text:p text:style-name="P18">Ninja 1: Heurística vs ninja</text:p>
          </table:table-cell>
          <table:table-cell table:style-name="Tabla2.B1" office:value-type="string">
            <text:p text:style-name="P18">Ninja 1: Ninja vs heurística</text:p>
          </table:table-cell>
        </table:table-row>
        <table:table-row>
          <table:table-cell table:style-name="Tabla2.A2" office:value-type="string">
            <text:p text:style-name="P19">Si</text:p>
          </table:table-cell>
          <table:table-cell table:style-name="Tabla2.B2" office:value-type="string">
            <text:p text:style-name="P19">Si</text:p>
          </table:table-cell>
        </table:table-row>
        <table:table-row>
          <table:table-cell table:style-name="Tabla2.A2" office:value-type="string">
            <text:p text:style-name="P18">Ninja <text:span text:style-name="T1">2</text:span>: Heurística vs ninja</text:p>
          </table:table-cell>
          <table:table-cell table:style-name="Tabla2.B2" office:value-type="string">
            <text:p text:style-name="P18">Ninja <text:span text:style-name="T1">2</text:span>: Ninja vs heurística</text:p>
          </table:table-cell>
        </table:table-row>
        <table:table-row>
          <table:table-cell table:style-name="Tabla2.A2" office:value-type="string">
            <text:p text:style-name="P19">Si</text:p>
          </table:table-cell>
          <table:table-cell table:style-name="Tabla2.B2" office:value-type="string">
            <text:p text:style-name="P19">Si</text:p>
          </table:table-cell>
        </table:table-row>
        <table:table-row>
          <table:table-cell table:style-name="Tabla2.A2" office:value-type="string">
            <text:p text:style-name="P18">Ninja <text:span text:style-name="T1">3</text:span>: Heurística vs ninja</text:p>
          </table:table-cell>
          <table:table-cell table:style-name="Tabla2.B2" office:value-type="string">
            <text:p text:style-name="P18">Ninja <text:span text:style-name="T1">3</text:span>: Ninja vs heurística</text:p>
          </table:table-cell>
        </table:table-row>
        <table:table-row>
          <table:table-cell table:style-name="Tabla2.A2" office:value-type="string">
            <text:p text:style-name="P19">Si</text:p>
          </table:table-cell>
          <table:table-cell table:style-name="Tabla2.B2" office:value-type="string">
            <text:p text:style-name="P19">Si</text:p>
          </table:table-cell>
        </table:table-row>
      </table:table>
      <text:p text:style-name="P13"/>
      <text:p text:style-name="P15"><text:span text:style-name="T2"/></text:p>
      <text:p text:style-name="P15"><text:span text:style-name="T2"/></text:p>
      <text:p text:style-name="P15"><text:soft-page-break/><text:span text:style-name="T2">Desventajas </text:span><text:span text:style-name="T3">de mi heurística</text:span>:</text:p>
      <text:p text:style-name="P15"/>
      <text:p text:style-name="P15">A pesar de que sea capaz de ganar a los ninjas hay vari<text:span text:style-name="T4">as situaciones que no he conseguido mejorar</text:span>:</text:p>
      <text:p text:style-name="P15"/>
      <text:p text:style-name="P15"><text:tab/>-<text:span text:style-name="T14">L</text:span><text:span text:style-name="T4">a</text:span> primer<text:span text:style-name="T14">a </text:span>es que hay varias partidas en las cuales mete 5 fichas (2 de un color y 3 de otro) en lugar de priorizar a meter a los colores que menos fichas les queda por introducir.</text:p>
      <text:p text:style-name="P15"/>
      <text:p text:style-name="P15"><text:tab/>-Otro <text:span text:style-name="T4">posible mejora es</text:span> al introducir una ficha al camino final, <text:span text:style-name="T4">ya que </text:span>hay veces que sigue moviendola sabiendo que no puede entrar con los dados que quedan <text:span text:style-name="T4">y en lugar de esto podría ser mejor que avanzara con otras fichas.</text:span></text:p>
      <text:p text:style-name="P15"/>
      <text:p text:style-name="P15"><text:tab/>-<text:span text:style-name="T4">Por último, creo que también podía haber mejorado algunas acciones con el dado especial, como por ejemplo el movimiento bala, el cuál suele introducir en meta a la casilla más cercana en lugar de avanzar con otra, lo cuál en algunas situaciones podrá ser más beneficioso.</text:span></text:p>
      <text:p text:style-name="P15"/>
      <text:p text:style-name="P34"/>
      <text:p text:style-name="P34"/>
      <text:p text:style-name="P35">Resultados de mi ejecución</text:p>
      <text:p text:style-name="P33"/>
      <table:table table:name="Tabla1" table:style-name="Tabla1">
        <table:table-column table:style-name="Tabla1.A"/>
        <table:table-column table:style-name="Tabla1.B"/>
        <table:table-row table:style-name="Tabla1.1">
          <table:table-cell table:style-name="Tabla1.A1" office:value-type="string">
            <text:p text:style-name="P37">Ninja 1: Heurística vs ninja</text:p>
          </table:table-cell>
          <table:table-cell table:style-name="Tabla1.B1" office:value-type="string">
            <text:p text:style-name="P38">Ninja 1: Ninja vs heurística</text:p>
          </table:table-cell>
        </table:table-row>
        <table:table-row table:style-name="Tabla1.2">
          <table:table-cell table:style-name="Tabla1.A2" office:value-type="string">
            <text:p text:style-name="P39"><draw:frame draw:style-name="fr2" draw:name="Imagen5" text:anchor-type="char" svg:x="-0.132cm" svg:y="0.794cm" svg:width="8.643cm" svg:height="8.569cm" draw:z-index="3"><draw:image xlink:href="Pictures/10000001000003240000031DE7BD7ACC7154FCF2.png" xlink:type="simple" xlink:show="embed" xlink:actuate="onLoad" draw:mime-type="image/png"/></draw:frame><draw:frame draw:style-name="fr2" draw:name="Imagen3" text:anchor-type="char" svg:x="9.091cm" svg:y="0.794cm" svg:width="8.645cm" svg:height="8.569cm" draw:z-index="1"><draw:image xlink:href="Pictures/10000001000003240000031DB60589E32C650E10.png" xlink:type="simple" xlink:show="embed" xlink:actuate="onLoad" draw:mime-type="image/png"/></draw:frame></text:p>
          </table:table-cell>
          <table:table-cell table:style-name="Tabla1.B2" office:value-type="string">
            <text:p text:style-name="P18"/>
            <text:p text:style-name="P23"/>
          </table:table-cell>
        </table:table-row>
        <text:soft-page-break/>
        <table:table-row table:style-name="Tabla1.3">
          <table:table-cell table:style-name="Tabla1.A2" office:value-type="string">
            <text:p text:style-name="P38">Ninja 2: Heurística vs ninja</text:p>
          </table:table-cell>
          <table:table-cell table:style-name="Tabla1.B2" office:value-type="string">
            <text:p text:style-name="P38">Ninja 2: Ninja vs heurística</text:p>
          </table:table-cell>
        </table:table-row>
        <table:table-row table:style-name="Tabla1.3">
          <table:table-cell table:style-name="Tabla1.A2" office:value-type="string">
            <text:p text:style-name="P18"><draw:frame draw:style-name="fr1" draw:name="Imagen2" text:anchor-type="char" svg:width="8.664cm" svg:height="8.587cm" draw:z-index="4"><draw:image xlink:href="Pictures/10000001000003240000031DA8E7A3033F28507D.png" xlink:type="simple" xlink:show="embed" xlink:actuate="onLoad" draw:mime-type="image/png"/></draw:frame></text:p>
            <text:p text:style-name="P23"/>
          </table:table-cell>
          <table:table-cell table:style-name="Tabla1.B2" office:value-type="string">
            <text:p text:style-name="P18"><draw:frame draw:style-name="fr1" draw:name="Imagen4" text:anchor-type="char" svg:width="8.377cm" svg:height="8.468cm" draw:z-index="2"><draw:image xlink:href="Pictures/10000001000003270000031F2B4ADB90FED03532.png" xlink:type="simple" xlink:show="embed" xlink:actuate="onLoad" draw:mime-type="image/png"/></draw:frame></text:p>
            <text:p text:style-name="P23"/>
          </table:table-cell>
        </table:table-row>
        <table:table-row table:style-name="Tabla1.3">
          <table:table-cell table:style-name="Tabla1.A2" office:value-type="string">
            <text:p text:style-name="P38">Ninja 3: Heurística vs ninja</text:p>
          </table:table-cell>
          <table:table-cell table:style-name="Tabla1.B2" office:value-type="string">
            <text:p text:style-name="P38">Ninja 3: Ninja vs heurística</text:p>
          </table:table-cell>
        </table:table-row>
        <table:table-row table:style-name="Tabla1.3">
          <table:table-cell table:style-name="Tabla1.A2" office:value-type="string">
            <text:p text:style-name="P18"/>
            <text:p text:style-name="P18"><draw:frame draw:style-name="fr1" draw:name="Imagen8" text:anchor-type="char" svg:width="7.982cm" svg:height="7.904cm" draw:z-index="6"><draw:image xlink:href="Pictures/10000001000003270000031F5502FB240AC5E776.png" xlink:type="simple" xlink:show="embed" xlink:actuate="onLoad" draw:mime-type="image/png"/></draw:frame></text:p>
          </table:table-cell>
          <table:table-cell table:style-name="Tabla1.B2" office:value-type="string">
            <text:p text:style-name="P18"/>
            <text:p text:style-name="P18"><draw:frame draw:style-name="fr1" draw:name="Imagen6" text:anchor-type="char" svg:width="7.971cm" svg:height="7.892cm" draw:z-index="5"><draw:image xlink:href="Pictures/10000001000003270000031FFFBB2B5F5DB1EC65.png" xlink:type="simple" xlink:show="embed" xlink:actuate="onLoad" draw:mime-type="image/png"/></draw:frame></text:p>
          </table:table-cell>
        </table:table-row>
      </table:table>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2:46:57.988056651</meta:creation-date>
    <dc:date>2024-06-07T21:19:17.466237910</dc:date>
    <meta:editing-duration>PT1H11S</meta:editing-duration>
    <meta:editing-cycles>5</meta:editing-cycles>
    <meta:generator>LibreOffice/7.3.7.2$Linux_X86_64 LibreOffice_project/30$Build-2</meta:generator>
    <meta:document-statistic meta:table-count="2" meta:image-count="7" meta:object-count="0" meta:page-count="5" meta:paragraph-count="60" meta:word-count="780" meta:character-count="4360" meta:non-whitespace-character-count="3630"/>
  </office:meta>
</office:document-meta>
</file>