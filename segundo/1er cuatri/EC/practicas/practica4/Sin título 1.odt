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900000034D9A6E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d47" officeooo:paragraph-rsid="0004cd47"/>
    </style:style>
    <style:style style:name="P2" style:family="paragraph" style:parent-style-name="Standard">
      <style:text-properties officeooo:rsid="00067391" officeooo:paragraph-rsid="00067391"/>
    </style:style>
    <style:style style:name="P3" style:family="paragraph" style:parent-style-name="Standard">
      <style:text-properties officeooo:rsid="00078592" officeooo:paragraph-rsid="00078592"/>
    </style:style>
    <style:style style:name="P4" style:family="paragraph" style:parent-style-name="Standard">
      <style:text-properties officeooo:rsid="000acb08" officeooo:paragraph-rsid="000acb08"/>
    </style:style>
    <style:style style:name="T1" style:family="text">
      <style:text-properties officeooo:rsid="00090a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nemos breakpoint en main</text:p>
      <text:p text:style-name="Standard"><text:tab/>break main</text:p>
      <text:p text:style-name="Standard"><text:tab/>run</text:p>
      <text:p text:style-name="Standard"><text:tab/></text:p>
      <text:p text:style-name="Standard">avanzamos hasta justo antes de strncmp</text:p>
      <text:p text:style-name="Standard"><text:tab/>ni</text:p>
      <text:p text:style-name="P1"><text:tab/>antes de esto nos indica </text:p>
      <text:p text:style-name="P1"><text:s/><draw:frame draw:style-name="fr1" draw:name="Imagen1" text:anchor-type="char" svg:width="17cm" svg:height="1.115cm" draw:z-index="0"><draw:image xlink:href="Pictures/100000010000031900000034D9A6ECE7.png" xlink:type="simple" xlink:show="embed" xlink:actuate="onLoad" draw:mime-type="image/png"/></draw:frame><text:tab/>por lo que hacemos x/s 0x404058</text:p>
      <text:p text:style-name="P1"/>
      <text:p text:style-name="P2">cuando vea un cmp seguido de jle que es para ver el tiempo engañamos al programa </text:p>
      <text:p text:style-name="P1"><text:tab/>set $eax=0</text:p>
      <text:p text:style-name="P1"/>
      <text:p text:style-name="P3">para saber el valor</text:p>
      <text:p text:style-name="P3"><text:tab/><text:span text:style-name="T1">x/s - string</text:span></text:p>
      <text:p text:style-name="P3"><text:tab/><text:span text:style-name="T1">x/d - decimal</text:span></text:p>
      <text:p text:style-name="P3">ver mi linea actual</text:p>
      <text:p text:style-name="P3"><text:tab/>x/i $pc</text:p>
      <text:p text:style-name="P3"/>
      <text:p text:style-name="P4">si quiero modificar la contraseña que puse</text:p>
      <text:p text:style-name="P4"><text:tab/>el +0xc indica que es la posición de mem +12</text:p>
      <text:p text:style-name="P4"><text:tab/>set {int}($rsp + 0xc) = 777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1:35:15.012668719</meta:creation-date>
    <dc:date>2025-11-18T14:59:59.752667174</dc:date>
    <meta:editing-duration>PT2H25M30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18" meta:word-count="82" meta:character-count="423" meta:non-whitespace-character-count="343"/>
  </office:meta>
</office:document-meta>
</file>