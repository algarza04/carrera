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400000075852C6110.png" manifest:media-type="image/png"/>
  <manifest:file-entry manifest:full-path="Pictures/10000001000003880000017A29889C22.png" manifest:media-type="image/png"/>
  <manifest:file-entry manifest:full-path="Pictures/10000001000002B90000005F7AE343D5.png" manifest:media-type="image/png"/>
  <manifest:file-entry manifest:full-path="Pictures/100000010000010B0000006719B86773.png" manifest:media-type="image/png"/>
  <manifest:file-entry manifest:full-path="Pictures/100000010000010500000034974140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1df0" officeooo:paragraph-rsid="000c1df0"/>
    </style:style>
    <style:style style:name="P2" style:family="paragraph" style:parent-style-name="Standard">
      <style:text-properties officeooo:rsid="000dd75c" officeooo:paragraph-rsid="000dd75c"/>
    </style:style>
    <style:style style:name="P3" style:family="paragraph" style:parent-style-name="Standard">
      <style:text-properties officeooo:rsid="000e81e0" officeooo:paragraph-rsid="000e81e0"/>
    </style:style>
    <style:style style:name="P4" style:family="paragraph" style:parent-style-name="Standard" style:list-style-name="L1">
      <style:text-properties officeooo:rsid="000c1df0" officeooo:paragraph-rsid="000c1df0"/>
    </style:style>
    <style:style style:name="P5" style:family="paragraph" style:parent-style-name="Standard">
      <style:text-properties officeooo:rsid="00125a35" officeooo:paragraph-rsid="00125a35"/>
    </style:style>
    <style:style style:name="P6" style:family="paragraph" style:parent-style-name="Standard">
      <style:text-properties officeooo:rsid="000e81e0" officeooo:paragraph-rsid="000e81e0"/>
    </style:style>
    <style:style style:name="P7" style:family="paragraph" style:parent-style-name="Standard">
      <style:text-properties officeooo:rsid="00143ac7" officeooo:paragraph-rsid="00143ac7"/>
    </style:style>
    <style:style style:name="P8" style:family="paragraph" style:parent-style-name="Standard">
      <style:text-properties officeooo:rsid="0014fcfd" officeooo:paragraph-rsid="0014fcfd"/>
    </style:style>
    <style:style style:name="P9" style:family="paragraph" style:parent-style-name="Standard">
      <style:text-properties officeooo:rsid="0015bdd7" officeooo:paragraph-rsid="0015bdd7"/>
    </style:style>
    <style:style style:name="P10" style:family="paragraph" style:parent-style-name="Standard">
      <style:text-properties officeooo:rsid="0015becc" officeooo:paragraph-rsid="0015becc"/>
    </style:style>
    <style:style style:name="T1" style:family="text">
      <style:text-properties officeooo:rsid="000dd75c"/>
    </style:style>
    <style:style style:name="T2" style:family="text">
      <style:text-properties officeooo:rsid="000e81e0"/>
    </style:style>
    <style:style style:name="T3" style:family="text">
      <style:text-properties officeooo:rsid="00143ac7"/>
    </style:style>
    <style:style style:name="T4" style:family="text">
      <style:text-properties officeooo:rsid="0014fcfd"/>
    </style:style>
    <style:style style:name="T5" style:family="text">
      <style:text-properties officeooo:rsid="0015be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4: Bomba Digital </text:p>
      <text:p text:style-name="P1">Álvaro García Zafra</text:p>
      <text:p text:style-name="P1"/>
      <text:list text:style-name="L1">
        <text:list-item>
          <text:p text:style-name="P4">CLAVES</text:p>
          <text:list>
            <text:list-item>
              <text:p text:style-name="P4">CIFRADAS:</text:p>
              <text:list>
                <text:list-item>
                  <text:p text:style-name="P4">password: dmbwfcpncb</text:p>
                </text:list-item>
                <text:list-item>
                  <text:p text:style-name="P4">passcode: 10101</text:p>
                </text:list-item>
              </text:list>
            </text:list-item>
          </text:list>
        </text:list-item>
      </text:list>
      <text:p text:style-name="P1"/>
      <text:list text:continue-numbering="true" text:style-name="L1">
        <text:list-item>
          <text:list>
            <text:list-item>
              <text:p text:style-name="P4">ACCESO:</text:p>
              <text:list>
                <text:list-item>
                  <text:p text:style-name="P4">password: clavebomba (<text:span text:style-name="T1">cambiamos cada una de las letras de la contraseña del fichero por la letra del abecedario anterior a esta, es decir, cambiamos las b por las a, las d por las c...)</text:span></text:p>
                </text:list-item>
                <text:list-item>
                  <text:p text:style-name="P4">passcode: 3367 <text:span text:style-name="T1">(passcode que aparece en el fichero entre 3, es decir 10101/3)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2">RESOLUCIÓN:</text:p>
      <text:p text:style-name="P2">En primer lugar ponemos <text:s/>un breakpoint en el main y lanzamos la ejecución:</text:p>
      <text:p text:style-name="P3"><text:tab/>layout asm</text:p>
      <text:p text:style-name="P2"><text:tab/>br main</text:p>
      <text:p text:style-name="P2"><text:tab/><text:span text:style-name="T2">run</text:span></text:p>
      <text:p text:style-name="P3">Avanzaremos con ni hasta el punto en el que se nos pida la contraseña, introducimos una palabra que queramos y continuamos con la ejecución:</text:p>
      <text:p text:style-name="P3"><text:tab/>ni</text:p>
      <text:p text:style-name="P5">Una vez introducida la contraseña y avanzar un poco más realizamos una comparación entre la longitud de las contraseñas (la introducida por mi y la guardada en el fichero)</text:p>
      <text:p text:style-name="P5"/>
      <text:p text:style-name="P5"><draw:frame draw:style-name="fr3" draw:name="Imagen3" text:anchor-type="char" svg:x="0cm" svg:y="0.074cm" svg:width="6.906cm" svg:height="1.376cm" draw:z-index="2"><draw:image xlink:href="Pictures/10000001000001050000003497414070.png" xlink:type="simple" xlink:show="embed" xlink:actuate="onLoad" draw:mime-type="image/png"/></draw:frame></text:p>
      <text:p text:style-name="P5"/>
      <text:p text:style-name="P5"><text:s/></text:p>
      <text:p text:style-name="P5"><draw:frame draw:style-name="fr3" draw:name="Imagen2" text:anchor-type="char" svg:x="0cm" svg:y="0.09cm" svg:width="12.762cm" svg:height="1.739cm" draw:z-index="1"><draw:image xlink:href="Pictures/10000001000002B90000005F7AE343D5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>Si no coincide en longitud realizará una llamada a la bomba. <text:span text:style-name="T4">En el caso contrario se saltará dicha llamada y continuará la ejecución</text:span>, <text:span text:style-name="T4">en</text:span> el caso de que no coincidan bastará con modificar el valor de uno de los registros y poner el del otro, <text:span text:style-name="T4">simulamos que tienen la misma longitud</text:span>.</text:p>
      <text:p text:style-name="P3"/>
      <text:p text:style-name="P5">Una vez pasada la bomba nos podremos dar cuenta de que <text:span text:style-name="T3">hemos entrado</text:span> en un bucle, nos podemos dar cuenta de esto al ver la última instrucción de la siguiente captura, <text:span text:style-name="T3">jb, saltaremos al principio del bucle mientras que falten caracteres de la contraseña por comparar. Si al comparar una posición el char introducido no coin</text:span><text:span text:style-name="T4">c</text:span><text:span text:style-name="T3">ide con el char de la contraseña-1 (</text:span><text:span text:style-name="T4">char de la tabla ascii anterior al de la contraseña</text:span><text:span text:style-name="T3">) </text:span><text:span text:style-name="T4">llamará a la bomba y terminará la ejecución.</text:span></text:p>
      <text:p text:style-name="P7"/>
      <text:p text:style-name="P8">Otra opción para saltar la password es cuando lleguemos a cmp %rax,%rdx cambiamos el valor de rax a uno menor que el de rdx, lo que hará que no realice el salto y continue con la ejecución.</text:p>
      <text:p text:style-name="P3"><draw:frame draw:style-name="fr4" draw:name="Imagen1" text:anchor-type="char" svg:width="17cm" svg:height="7.108cm" draw:z-index="0"><draw:image xlink:href="Pictures/10000001000003880000017A29889C22.png" xlink:type="simple" xlink:show="embed" xlink:actuate="onLoad" draw:mime-type="image/png"/></draw:frame><text:soft-page-break/><text:s/></text:p>
      <text:p text:style-name="P8">Al salir del bucle hay otra comprobación de tiempo, para saltarla basta con poner rax a un valor menor.</text:p>
      <text:p text:style-name="P8"/>
      <text:p text:style-name="P8">Continuamos la ejecución hasta que nos pida el pin.</text:p>
      <text:p text:style-name="P9"/>
      <text:p text:style-name="P9"><draw:frame draw:style-name="fr2" draw:name="Imagen4" text:anchor-type="char" svg:width="17cm" svg:height="2.575cm" draw:z-index="3"><draw:image xlink:href="Pictures/100000010000030400000075852C6110.png" xlink:type="simple" xlink:show="embed" xlink:actuate="onLoad" draw:mime-type="image/png"/></draw:frame></text:p>
      <text:p text:style-name="P9">En esta parte del código podemos ver que lo que está haciendo es multiplicar por 3 el pin que hemos introducido, lo compara con el pin del código y en el caso de que sean iguales salta la bomba, por lo que se puede deducir que el pin correcto sería el pin <text:span text:style-name="T5">introducido*3=pin.</text:span></text:p>
      <text:p text:style-name="P10">Después de esto se vuelve a comprobar que no ha transcurrido más tiempo del permitido, para esto solo se cambia eax a un número menos y con esto ya tendríamos la bomba desactivada.</text:p>
      <text:p text:style-name="P10"><draw:frame draw:style-name="fr1" draw:name="Imagen5" text:anchor-type="char" svg:width="7.064cm" svg:height="2.725cm" draw:z-index="4"><draw:image xlink:href="Pictures/100000010000010B0000006719B867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42:30.032287962</meta:creation-date>
    <dc:date>2025-11-21T00:20:28.640133547</dc:date>
    <meta:editing-duration>PT30M39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2" meta:paragraph-count="27" meta:word-count="423" meta:character-count="2329" meta:non-whitespace-character-count="1928"/>
  </office:meta>
</office:document-meta>
</file>