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40000008EDD1622BE.png" manifest:media-type="image/png"/>
  <manifest:file-entry manifest:full-path="Pictures/10000001000002EA00000091B25CFDED.png" manifest:media-type="image/png"/>
  <manifest:file-entry manifest:full-path="Pictures/10000001000002870000006B520FFBB0.png" manifest:media-type="image/png"/>
  <manifest:file-entry manifest:full-path="Pictures/10000001000002980000006067FE314E.png" manifest:media-type="image/png"/>
  <manifest:file-entry manifest:full-path="Pictures/100000010000028F0000008F93EA4F86.png" manifest:media-type="image/png"/>
  <manifest:file-entry manifest:full-path="Pictures/10000001000002670000010EA00F45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ec4" officeooo:paragraph-rsid="000dcec4"/>
    </style:style>
    <style:style style:name="P2" style:family="paragraph" style:parent-style-name="Standard">
      <style:text-properties officeooo:rsid="0010ae38" officeooo:paragraph-rsid="0010ae38"/>
    </style:style>
    <style:style style:name="P3" style:family="paragraph" style:parent-style-name="Standard">
      <style:text-properties officeooo:rsid="000f4c7a" officeooo:paragraph-rsid="000f4c7a"/>
    </style:style>
    <style:style style:name="P4" style:family="paragraph" style:parent-style-name="Standard">
      <style:text-properties officeooo:rsid="001318d2" officeooo:paragraph-rsid="001318d2"/>
    </style:style>
    <style:style style:name="P5" style:family="paragraph" style:parent-style-name="Standard">
      <style:text-properties officeooo:rsid="000f4c7a" officeooo:paragraph-rsid="000dcec4"/>
    </style:style>
    <style:style style:name="P6" style:family="paragraph" style:parent-style-name="Standard">
      <style:text-properties officeooo:rsid="0010ae38" officeooo:paragraph-rsid="0010ae38"/>
    </style:style>
    <style:style style:name="P7" style:family="paragraph" style:parent-style-name="Standard">
      <style:text-properties officeooo:rsid="00152776" officeooo:paragraph-rsid="00152776"/>
    </style:style>
    <style:style style:name="P8" style:family="paragraph" style:parent-style-name="Standard">
      <style:text-properties officeooo:rsid="0011f49a" officeooo:paragraph-rsid="0011f49a"/>
    </style:style>
    <style:style style:name="P9" style:family="paragraph" style:parent-style-name="Standard">
      <style:text-properties officeooo:rsid="001318d2" officeooo:paragraph-rsid="001318d2"/>
    </style:style>
    <style:style style:name="P10" style:family="paragraph" style:parent-style-name="Standard">
      <style:text-properties officeooo:rsid="00153492" officeooo:paragraph-rsid="00153492"/>
    </style:style>
    <style:style style:name="P11" style:family="paragraph" style:parent-style-name="Standard">
      <style:text-properties officeooo:rsid="00160852" officeooo:paragraph-rsid="00160852"/>
    </style:style>
    <style:style style:name="T1" style:family="text">
      <style:text-properties officeooo:rsid="0010ae38"/>
    </style:style>
    <style:style style:name="T2" style:family="text">
      <style:text-properties officeooo:rsid="00146eec"/>
    </style:style>
    <style:style style:name="T3" style:family="text">
      <style:text-properties officeooo:rsid="000dcec4"/>
    </style:style>
    <style:style style:name="T4" style:family="text">
      <style:text-properties officeooo:rsid="00152776"/>
    </style:style>
    <style:style style:name="T5" style:family="text">
      <style:text-properties officeooo:rsid="00153492"/>
    </style:style>
    <style:style style:name="T6" style:family="text">
      <style:text-properties officeooo:rsid="001608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Á<text:span text:style-name="T1">lvaro García Zafra</text:span></text:p>
      <text:p text:style-name="P1"/>
      <text:p text:style-name="P2">Propietario de la bomba: Enrique Peralbo</text:p>
      <text:p text:style-name="P2">Contraseña: <text:span text:style-name="T2">41’:8&lt;638&amp;_</text:span></text:p>
      <text:p text:style-name="P2">Pin: <text:span text:style-name="T5">0x605e</text:span></text:p>
      <text:p text:style-name="P2"/>
      <text:p text:style-name="P2">Contraseña de desbloqueo: <text:span text:style-name="T2">adromicfms</text:span></text:p>
      <text:p text:style-name="P2">Pin de desbloqueo: <text:span text:style-name="T3"><text:s/></text:span><text:span text:style-name="T6">13579</text:span></text:p>
      <text:p text:style-name="P5"/>
      <text:p text:style-name="P3"/>
      <text:p text:style-name="P2">El primer paso que he seguido para el desbloqueo de la bomba ha sido avanzar con ni hasta que me pidieran la contraseña, <text:span text:style-name="T4">después de esto he seguido avanzando y he visto que se hace una llamada a una función llamada cifrar</text:span></text:p>
      <text:p text:style-name="P7"><draw:frame draw:style-name="fr3" draw:name="Imagen1" text:anchor-type="char" svg:width="16.272cm" svg:height="7.144cm" draw:z-index="1"><draw:image xlink:href="Pictures/10000001000002670000010EA00F457C.png" xlink:type="simple" xlink:show="embed" xlink:actuate="onLoad" draw:mime-type="image/png"/></draw:frame>He analizado esta función y me he fijado de que esta función actúa a modo de bucle, cuyo funcionamiento se basa en ir cogiendo cada uno de los bits de la contraseña que he introducido y realizarle la operación xor 0x55 a cada uno de ellos, ej, para la letra h(104 dec, 68 hex)</text:p>
      <text:p text:style-name="P7"><draw:frame draw:style-name="fr3" draw:name="Imagen2" text:anchor-type="char" svg:width="13.529cm" svg:height="2.955cm" draw:z-index="2"><draw:image xlink:href="Pictures/100000010000028F0000008F93EA4F86.png" xlink:type="simple" xlink:show="embed" xlink:actuate="onLoad" draw:mime-type="image/png"/></draw:frame>por lo que sustituiría la letra h por =(61 dec). Por lo que una vez supe esto me basto con realizar la operación <text:span text:style-name="T5">inversa</text:span> para la contraseña dada (<text:span text:style-name="T2">41’:8&lt;638&amp;₎</text:span>, <text:span text:style-name="T5">xor char, 0x55, dando como resultado adromicfms</text:span></text:p>
      <text:p text:style-name="P8"/>
      <text:p text:style-name="P4"><draw:frame draw:style-name="fr4" draw:name="Imagen3" text:anchor-type="char" svg:width="15.748cm" svg:height="2.847cm" draw:z-index="0"><draw:image xlink:href="Pictures/10000001000002980000006067FE314E.png" xlink:type="simple" xlink:show="embed" xlink:actuate="onLoad" draw:mime-type="image/png"/></draw:frame>Seguiremos avanzando y nos encontraremos con una comparación </text:p>
      <text:p text:style-name="P4">en esta comparación se revisará si el tiempo ha pasado de 60 segundos, para evitar llamar a la bomba el contenido de eax(tiempo transcurrido) deberá ser menor de 60, para esto simplemente cambiaremos su valor a 0 y al realizar la comparación y ver que es menor realizará un salto y no llamará a boom.</text:p>
      <text:p text:style-name="P4"><text:soft-page-break/>Después de esto seguiremos avanzando hasta que se pida el pin, lo introduciremos y seguiremos avanzando. Habrá un punto que nos encontremos este código:</text:p>
      <text:p text:style-name="P4"><draw:frame draw:style-name="fr1" draw:name="Imagen4" text:anchor-type="char" svg:width="17cm" svg:height="3.304cm" draw:z-index="3"><draw:image xlink:href="Pictures/10000001000002EA00000091B25CFDED.png" xlink:type="simple" xlink:show="embed" xlink:actuate="onLoad" draw:mime-type="image/png"/></draw:frame></text:p>
      <text:p text:style-name="P10">En esta parte lo que esta haciendo es coger el pin que he introducido y realizarle un xor con 0x5555, por lo que he observado el pin contenido en el ejecutable</text:p>
      <text:p text:style-name="P10"><draw:frame draw:style-name="fr2" draw:name="Imagen5" text:anchor-type="char" svg:x="0.854cm" svg:y="0cm" svg:width="8.149cm" svg:height="3.757cm" draw:z-index="4"><draw:image xlink:href="Pictures/10000001000001340000008EDD1622BE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><text:s text:c="2"/></text:p>
      <text:p text:style-name="P10"/>
      <text:p text:style-name="P10">como estamos en little-endian el pin será 0x605e, por lo que realizamos el xor inverso, xor 0x605e, 0x5555, y nos dará como resultado </text:p>
      <text:p text:style-name="P11"><draw:frame draw:style-name="fr1" draw:name="Imagen6" text:anchor-type="char" svg:width="17cm" svg:height="2.81cm" draw:z-index="5"><draw:image xlink:href="Pictures/10000001000002870000006B520FFBB0.png" xlink:type="simple" xlink:show="embed" xlink:actuate="onLoad" draw:mime-type="image/png"/></draw:frame>Por lo que de esta manera ya tendremos el pin de desbloqueo.</text:p>
      <text:p text:style-name="P11">Una vez descubierto modifico el valor de eax, set $eax=13579 (antes del xor, si lo hago después tendré que poner el resultado al hacerle el xor a ese numero), comparará los números y verá que son iguales, por lo que salta la bomba.</text:p>
      <text:p text:style-name="P11">Por último realiza una última comparación de que no ha transcurrido más tiempo que el establecido como tiempo máximo, modificamos el valor al igual que antes y una vez salte esa comparación nos saldrá el mensaje de bomba desactiva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7:02:07.636383253</meta:creation-date>
    <dc:date>2025-11-24T12:59:42.626871579</dc:date>
    <meta:editing-duration>PT48M43S</meta:editing-duration>
    <meta:editing-cycles>4</meta:editing-cycles>
    <meta:generator>LibreOffice/24.2.7.2$Linux_X86_64 LibreOffice_project/420$Build-2</meta:generator>
    <meta:document-statistic meta:table-count="0" meta:image-count="6" meta:object-count="0" meta:page-count="2" meta:paragraph-count="19" meta:word-count="388" meta:character-count="2190" meta:non-whitespace-character-count="1813"/>
  </office:meta>
</office:document-meta>
</file>