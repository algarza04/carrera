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A0000034AFF056292.png" manifest:media-type="image/png"/>
  <manifest:file-entry manifest:full-path="Pictures/10000001000004A4000003145A67DA89.png" manifest:media-type="image/png"/>
  <manifest:file-entry manifest:full-path="Pictures/1000000100000366000002E09E26E8C7.png" manifest:media-type="image/png"/>
  <manifest:file-entry manifest:full-path="Pictures/100000010000040F000002AC22857F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55e" officeooo:paragraph-rsid="001e755e"/>
    </style:style>
    <style:style style:name="P2" style:family="paragraph" style:parent-style-name="Standard">
      <style:text-properties fo:font-size="14pt" fo:font-weight="bold" officeooo:rsid="001e755e" officeooo:paragraph-rsid="001e755e" style:font-size-asian="14pt" style:font-weight-asian="bold" style:font-size-complex="14pt" style:font-weight-complex="bold"/>
    </style:style>
    <style:style style:name="T1" style:family="text">
      <style:text-properties officeooo:rsid="001f4f5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Álvaro García Zafra</text:p>
      <text:p text:style-name="P2">P5 EC</text:p>
      <text:p text:style-name="P2"/>
      <text:p text:style-name="P2">Zumbador</text:p>
      <text:p text:style-name="P1"/>
      <text:p text:style-name="P1"><draw:frame draw:style-name="fr3" draw:name="Imagen1" text:anchor-type="char" svg:width="17cm" svg:height="11.19cm" draw:z-index="0"><draw:image xlink:href="Pictures/100000010000040F000002AC22857FAA.png" xlink:type="simple" xlink:show="embed" xlink:actuate="onLoad" draw:mime-type="image/png"/></draw:frame></text:p>
      <text:p text:style-name="P1">/*************************************************</text:p>
      <text:p text:style-name="P1"><text:s text:c="3"/>Public Constants</text:p>
      <text:p text:style-name="P1"><text:s/>*************************************************/</text:p>
      <text:p text:style-name="P1">#define NOTE_C4 262</text:p>
      <text:p text:style-name="P1">#define NOTE_D4 294</text:p>
      <text:p text:style-name="P1">#define NOTE_E4 330</text:p>
      <text:p text:style-name="P1">#define NOTE_F4 349</text:p>
      <text:p text:style-name="P1">#define NOTE_G4 392</text:p>
      <text:p text:style-name="P1">#define NOTE_A4 440</text:p>
      <text:p text:style-name="P1">#define NOTE_B4 494</text:p>
      <text:p text:style-name="P1">#define NOTE_C5 523</text:p>
      <text:p text:style-name="P1">#define NOTE_D5 587</text:p>
      <text:p text:style-name="P1">#define NOTE_E5 659</text:p>
      <text:p text:style-name="P1">#define NOTE_F5 698</text:p>
      <text:p text:style-name="P1">#define NOTE_G5 784</text:p>
      <text:p text:style-name="P1">#define NOTE_A5 880</text:p>
      <text:p text:style-name="P1">#define NOTE_B5 988</text:p>
      <text:p text:style-name="P1"/>
      <text:p text:style-name="P1"/>
      <text:p text:style-name="P1">// notes in the melody:</text:p>
      <text:p text:style-name="P1">int melody[] = {</text:p>
      <text:p text:style-name="P1"><text:s text:c="4"/>NOTE_E4, NOTE_G4, NOTE_A4, NOTE_A4, 0,</text:p>
      <text:p text:style-name="P1"><text:s text:c="4"/>NOTE_A4, NOTE_B4, NOTE_C5, NOTE_C5, 0,</text:p>
      <text:p text:style-name="P1"><text:soft-page-break/><text:s text:c="4"/>NOTE_C5, NOTE_D5, NOTE_B4, NOTE_B4, 0,</text:p>
      <text:p text:style-name="P1"><text:s text:c="4"/>NOTE_A4, NOTE_G4, NOTE_A4, 0,</text:p>
      <text:p text:style-name="P1"/>
      <text:p text:style-name="P1"><text:s text:c="4"/>NOTE_E4, NOTE_G4, NOTE_A4, NOTE_A4, 0,</text:p>
      <text:p text:style-name="P1"><text:s text:c="4"/>NOTE_A4, NOTE_B4, NOTE_C5, NOTE_C5, 0,</text:p>
      <text:p text:style-name="P1"><text:s text:c="4"/>NOTE_C5, NOTE_D5, NOTE_B4, NOTE_B4, 0,</text:p>
      <text:p text:style-name="P1"><text:s text:c="4"/>NOTE_A4, NOTE_G4, NOTE_A4, 0,</text:p>
      <text:p text:style-name="P1"/>
      <text:p text:style-name="P1"><text:s text:c="4"/>NOTE_E4, NOTE_G4, NOTE_A4, NOTE_A4, 0,</text:p>
      <text:p text:style-name="P1"><text:s text:c="4"/>NOTE_A4, NOTE_C5, NOTE_D5, NOTE_D5, 0,</text:p>
      <text:p text:style-name="P1"><text:s text:c="4"/>NOTE_D5, NOTE_E5, NOTE_F5, NOTE_F5, 0,</text:p>
      <text:p text:style-name="P1"><text:s text:c="4"/>NOTE_E5, NOTE_D5, NOTE_E5, NOTE_A4, 0,</text:p>
      <text:p text:style-name="P1"/>
      <text:p text:style-name="P1"><text:s text:c="4"/>NOTE_A4, NOTE_B4, NOTE_C5, NOTE_C5, 0,</text:p>
      <text:p text:style-name="P1"><text:s text:c="4"/>NOTE_D5, NOTE_E5, NOTE_A4, 0,</text:p>
      <text:p text:style-name="P1"><text:s text:c="4"/>NOTE_A4, NOTE_C5, NOTE_B4, NOTE_B4, 0,</text:p>
      <text:p text:style-name="P1"><text:s text:c="4"/>NOTE_C5, NOTE_A4, NOTE_B4, 0,</text:p>
      <text:p text:style-name="P1"/>
      <text:p text:style-name="P1"><text:s text:c="4"/>NOTE_A4, NOTE_A4,</text:p>
      <text:p text:style-name="P1"/>
      <text:p text:style-name="P1"><text:s text:c="4"/>//Repeat of first part</text:p>
      <text:p text:style-name="P1"><text:s text:c="4"/>NOTE_A4, NOTE_B4, NOTE_C5, NOTE_C5, 0,</text:p>
      <text:p text:style-name="P1"><text:s text:c="4"/>NOTE_C5, NOTE_D5, NOTE_B4, NOTE_B4, 0,</text:p>
      <text:p text:style-name="P1"><text:s text:c="4"/>NOTE_A4, NOTE_G4, NOTE_A4, 0,</text:p>
      <text:p text:style-name="P1"/>
      <text:p text:style-name="P1"><text:s text:c="4"/>NOTE_E4, NOTE_G4, NOTE_A4, NOTE_A4, 0,</text:p>
      <text:p text:style-name="P1"><text:s text:c="4"/>NOTE_A4, NOTE_B4, NOTE_C5, NOTE_C5, 0,</text:p>
      <text:p text:style-name="P1"><text:s text:c="4"/>NOTE_C5, NOTE_D5, NOTE_B4, NOTE_B4, 0,</text:p>
      <text:p text:style-name="P1"><text:s text:c="4"/>NOTE_A4, NOTE_G4, NOTE_A4, 0,</text:p>
      <text:p text:style-name="P1"/>
      <text:p text:style-name="P1"><text:s text:c="4"/>NOTE_E4, NOTE_G4, NOTE_A4, NOTE_A4, 0,</text:p>
      <text:p text:style-name="P1"><text:s text:c="4"/>NOTE_A4, NOTE_C5, NOTE_D5, NOTE_D5, 0,</text:p>
      <text:p text:style-name="P1"><text:s text:c="4"/>NOTE_D5, NOTE_E5, NOTE_F5, NOTE_F5, 0,</text:p>
      <text:p text:style-name="P1"><text:s text:c="4"/>NOTE_E5, NOTE_D5, NOTE_E5, NOTE_A4, 0,</text:p>
      <text:p text:style-name="P1"/>
      <text:p text:style-name="P1"><text:s text:c="4"/>NOTE_A4, NOTE_B4, NOTE_C5, NOTE_C5, 0,</text:p>
      <text:p text:style-name="P1"><text:s text:c="4"/>NOTE_D5, NOTE_E5, NOTE_A4, 0,</text:p>
      <text:p text:style-name="P1"><text:s text:c="4"/>NOTE_A4, NOTE_C5, NOTE_B4, NOTE_B4, 0,</text:p>
      <text:p text:style-name="P1"><text:s text:c="4"/>NOTE_C5, NOTE_A4, NOTE_B4, 0,</text:p>
      <text:p text:style-name="P1"/>
      <text:p text:style-name="P1"><text:s text:c="4"/>//End of Repeat</text:p>
      <text:p text:style-name="P1"/>
      <text:p text:style-name="P1"><text:s text:c="4"/>NOTE_E5, 0, 0, NOTE_F5, 0, 0,</text:p>
      <text:p text:style-name="P1"><text:s text:c="4"/>NOTE_E5, NOTE_E5, 0, NOTE_G5, 0, NOTE_E5, NOTE_D5, 0, 0,</text:p>
      <text:p text:style-name="P1"><text:s text:c="4"/>NOTE_D5, 0, 0, NOTE_C5, 0, 0,</text:p>
      <text:p text:style-name="P1"><text:s text:c="4"/>NOTE_B4, NOTE_C5, 0, NOTE_B4, 0, NOTE_A4,</text:p>
      <text:p text:style-name="P1"/>
      <text:p text:style-name="P1"><text:s text:c="4"/>NOTE_E5, 0, 0, NOTE_F5, 0, 0,</text:p>
      <text:p text:style-name="P1"><text:s text:c="4"/>NOTE_E5, NOTE_E5, 0, NOTE_G5, 0, NOTE_E5, NOTE_D5, 0, 0,</text:p>
      <text:p text:style-name="P1"><text:s text:c="4"/>NOTE_D5, 0, 0, NOTE_C5, 0, 0,</text:p>
      <text:p text:style-name="P1"><text:s text:c="4"/>NOTE_B4, NOTE_C5, 0, NOTE_B4, 0, NOTE_A4};</text:p>
      <text:p text:style-name="P1"/>
      <text:p text:style-name="P1"><text:soft-page-break/></text:p>
      <text:p text:style-name="P1">int duration = 500; // 500 miliseconds</text:p>
      <text:p text:style-name="P1"/>
      <text:p text:style-name="P1">void setup() {</text:p>
      <text:p text:style-name="P1">}</text:p>
      <text:p text:style-name="P1"/>
      <text:p text:style-name="P1">void loop() {</text:p>
      <text:p text:style-name="P1"><text:s text:c="2"/>int songLength = sizeof(melody) / sizeof(melody[0]);</text:p>
      <text:p text:style-name="P1"><text:s text:c="2"/>for (int thisNote = 0; thisNote &lt; songLength; thisNote++) {</text:p>
      <text:p text:style-name="P1"><text:s text:c="2"/><text:tab/>// pin8 output the voice, every scale is 0.5 sencond</text:p>
      <text:p text:style-name="P1"><text:s text:c="2"/><text:tab/>tone(8, melody[thisNote], duration);</text:p>
      <text:p text:style-name="P1"><text:s text:c="2"/><text:tab/>// Output the voice after several minutes</text:p>
      <text:p text:style-name="P1"><text:s text:c="2"/><text:tab/>delay(125);</text:p>
      <text:p text:style-name="P1"><text:s text:c="2"/>}</text:p>
      <text:p text:style-name="P1"><text:s text:c="2"/></text:p>
      <text:p text:style-name="P1"><text:s text:c="2"/>// restart after two seconds</text:p>
      <text:p text:style-name="P1"><text:s text:c="2"/>delay(2000);</text:p>
      <text:p text:style-name="P1">}</text:p>
      <text:p text:style-name="P1"/>
      <text:p text:style-name="P1"/>
      <text:p text:style-name="P1"/>
      <text:p text:style-name="P2">Theremín sin leds</text:p>
      <text:p text:style-name="P1"/>
      <text:p text:style-name="P1"><draw:frame draw:style-name="fr1" draw:name="Imagen4" text:anchor-type="char" svg:width="17cm" svg:height="11.275cm" draw:z-index="3"><draw:image xlink:href="Pictures/10000001000004A4000003145A67DA89.png" xlink:type="simple" xlink:show="embed" xlink:actuate="onLoad" draw:mime-type="image/png"/></draw:frame></text:p>
      <text:p text:style-name="P1"/>
      <text:p text:style-name="P1"/>
      <text:p text:style-name="P1">// variable to hold sensor value</text:p>
      <text:p text:style-name="P1">int sensorValue;</text:p>
      <text:p text:style-name="P1">// variable to calibrate low value</text:p>
      <text:p text:style-name="P1"><text:soft-page-break/>int sensorLow = 1023;</text:p>
      <text:p text:style-name="P1">// variable to calibrate high value</text:p>
      <text:p text:style-name="P1">int sensorHigh = 0;</text:p>
      <text:p text:style-name="P1">// LED pin</text:p>
      <text:p text:style-name="P1">const int ledPin = 13;</text:p>
      <text:p text:style-name="P1"/>
      <text:p text:style-name="P1">void setup() {</text:p>
      <text:p text:style-name="P1"><text:s text:c="2"/>// Make the LED pin an output and turn it on</text:p>
      <text:p text:style-name="P1"><text:s text:c="2"/>Serial.begin(9600);</text:p>
      <text:p text:style-name="P1"><text:s text:c="2"/>pinMode(ledPin, OUTPUT);</text:p>
      <text:p text:style-name="P1"><text:s text:c="2"/>digitalWrite(ledPin, HIGH);</text:p>
      <text:p text:style-name="P1"><text:s text:c="2"/>// calibrate for the first five seconds after program runs</text:p>
      <text:p text:style-name="P1"><text:s text:c="2"/>while (millis() &lt; 5000) {</text:p>
      <text:p text:style-name="P1"><text:s text:c="2"/><text:tab/>// record the maximum sensor value</text:p>
      <text:p text:style-name="P1"><text:s text:c="2"/><text:tab/>sensorValue = analogRead(A0);</text:p>
      <text:p text:style-name="P1"><text:s text:c="2"/><text:tab/>if (sensorValue &gt; sensorHigh) {</text:p>
      <text:p text:style-name="P1"><text:s text:c="2"/><text:tab/><text:tab/>sensorHigh = sensorValue;</text:p>
      <text:p text:style-name="P1"><text:s text:c="2"/><text:tab/>}</text:p>
      <text:p text:style-name="P1"><text:s text:c="2"/><text:tab/>// record the minimum sensor value</text:p>
      <text:p text:style-name="P1"><text:s text:c="2"/><text:tab/>if (sensorValue &lt; sensorLow) {</text:p>
      <text:p text:style-name="P1"><text:s text:c="2"/><text:tab/><text:tab/>sensorLow = sensorValue;</text:p>
      <text:p text:style-name="P1"><text:s text:c="2"/><text:tab/>}</text:p>
      <text:p text:style-name="P1"><text:s text:c="2"/>}</text:p>
      <text:p text:style-name="P1"><text:s text:c="2"/>// turn the LED off, signaling the end of the calibration period</text:p>
      <text:p text:style-name="P1"><text:s text:c="2"/>digitalWrite(ledPin, LOW);</text:p>
      <text:p text:style-name="P1">}</text:p>
      <text:p text:style-name="P1">void loop() {</text:p>
      <text:p text:style-name="P1"><text:s text:c="2"/>//read the input from A0 and store it in a variable</text:p>
      <text:p text:style-name="P1"><text:s text:c="2"/>sensorValue = analogRead(A0);</text:p>
      <text:p text:style-name="P1"><text:s text:c="2"/>Serial.print("Value: ");</text:p>
      <text:p text:style-name="P1"><text:s text:c="2"/>Serial.print(sensorValue);</text:p>
      <text:p text:style-name="P1"><text:s text:c="2"/>Serial.print(" | Low: ");</text:p>
      <text:p text:style-name="P1"><text:s text:c="2"/>Serial.print(sensorLow);</text:p>
      <text:p text:style-name="P1"><text:s text:c="2"/>Serial.print(" | High: ");</text:p>
      <text:p text:style-name="P1"><text:s text:c="2"/>Serial.println(sensorHigh);</text:p>
      <text:p text:style-name="P1"><text:s text:c="2"/>// map the sensor values to a wide range of pitches</text:p>
      <text:p text:style-name="P1"><text:s text:c="2"/>int pitch = map(sensorValue, sensorLow, sensorHigh, 50, 4000);</text:p>
      <text:p text:style-name="P1"><text:s text:c="2"/>// play the tone for 20 ms on pin 8</text:p>
      <text:p text:style-name="P1"><text:s text:c="2"/>tone(8, pitch, 20);</text:p>
      <text:p text:style-name="P1"><text:s text:c="2"/>// wait for a moment</text:p>
      <text:p text:style-name="P1"><text:s text:c="2"/>delay(10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Theremín con leds</text:p>
      <text:p text:style-name="P2"/>
      <text:p text:style-name="P1"><draw:frame draw:style-name="fr1" draw:name="Imagen2" text:anchor-type="char" svg:width="17cm" svg:height="13.035cm" draw:z-index="2"><draw:image xlink:href="Pictures/100000010000044A0000034AFF056292.png" xlink:type="simple" xlink:show="embed" xlink:actuate="onLoad" draw:mime-type="image/png"/></draw:frame></text:p>
      <text:p text:style-name="P1">Tuve que cambiar las resistencias de 220ohmios por las de 1kohmio, ya que daba error</text:p>
      <text:p text:style-name="P1"><text:s/><text:span text:style-name="T1">­</text:span> <text:span text:style-name="T1">­</text:span><draw:frame draw:style-name="fr2" draw:name="Imagen3" text:anchor-type="char" svg:x="0.766cm" svg:y="0.201cm" svg:width="13.578cm" svg:height="11.495cm" draw:z-index="1"><draw:image xlink:href="Pictures/1000000100000366000002E09E26E8C7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t lightPin = 0;</text:p>
      <text:p text:style-name="P1">int latchPin = 11;</text:p>
      <text:p text:style-name="P1">int clockPin = 9;</text:p>
      <text:p text:style-name="P1">int dataPin = 12;</text:p>
      <text:p text:style-name="P1"/>
      <text:p text:style-name="P1">int leds = 0;</text:p>
      <text:p text:style-name="P1"/>
      <text:p text:style-name="P1">void setup() </text:p>
      <text:p text:style-name="P1">{</text:p>
      <text:p text:style-name="P1"><text:s text:c="2"/>pinMode(latchPin, OUTPUT);</text:p>
      <text:p text:style-name="P1"><text:s text:c="2"/>pinMode(dataPin, OUTPUT); <text:s/></text:p>
      <text:p text:style-name="P1"><text:s text:c="2"/>pinMode(clockPin, OUTPUT);</text:p>
      <text:p text:style-name="P1">}</text:p>
      <text:p text:style-name="P1">void updateShiftRegister()</text:p>
      <text:p text:style-name="P1">{</text:p>
      <text:p text:style-name="P1"><text:s text:c="3"/>digitalWrite(latchPin, LOW);</text:p>
      <text:p text:style-name="P1"><text:s text:c="3"/>shiftOut(dataPin, clockPin, LSBFIRST, leds);</text:p>
      <text:p text:style-name="P1"><text:s text:c="3"/>digitalWrite(latchPin, HIGH);</text:p>
      <text:p text:style-name="P1">}</text:p>
      <text:p text:style-name="P1">void loop() </text:p>
      <text:p text:style-name="P1">{</text:p>
      <text:p text:style-name="P1"><text:s text:c="2"/>int reading <text:s/>= analogRead(lightPin);</text:p>
      <text:p text:style-name="P1"><text:s text:c="2"/>int numLEDSLit = reading / 57; <text:s/>//1023 / 9 / 2</text:p>
      <text:p text:style-name="P1"><text:s text:c="2"/>if (numLEDSLit &gt; 8) numLEDSLit = 8;</text:p>
      <text:p text:style-name="P1"><text:s text:c="2"/>leds = 0; <text:s text:c="2"/>// no LEDs lit to start</text:p>
      <text:p text:style-name="P1"><text:s text:c="2"/>for (int i = 0; i &lt; numLEDSLit; i++)</text:p>
      <text:p text:style-name="P1"><text:s text:c="2"/>{</text:p>
      <text:p text:style-name="P1"><text:s text:c="4"/>leds = leds + (1 &lt;&lt; i);</text:p>
      <text:p text:style-name="P1"><text:s text:c="2"/>}</text:p>
      <text:p text:style-name="P1"><text:s text:c="2"/>updateShiftRegister();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1:51:57.127294737</meta:creation-date>
    <dc:date>2025-12-07T12:08:58.408092528</dc:date>
    <meta:editing-duration>PT5M31S</meta:editing-duration>
    <meta:editing-cycles>1</meta:editing-cycles>
    <meta:document-statistic meta:table-count="0" meta:image-count="4" meta:object-count="0" meta:page-count="6" meta:paragraph-count="157" meta:word-count="637" meta:character-count="4410" meta:non-whitespace-character-count="3612"/>
    <meta:generator>LibreOffice/24.2.7.2$Linux_X86_64 LibreOffice_project/420$Build-2</meta:generator>
  </office:meta>
</office:document-meta>
</file>