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40000011D842C2B51.png" manifest:media-type="image/png"/>
  <manifest:file-entry manifest:full-path="Pictures/10000001000003060000022F101A22B9.png" manifest:media-type="image/png"/>
  <manifest:file-entry manifest:full-path="Pictures/100000010000032400000071652590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dce91" officeooo:paragraph-rsid="001dce91"/>
    </style:style>
    <style:style style:name="P2" style:family="paragraph" style:parent-style-name="Standard">
      <style:text-properties style:text-underline-style="none" officeooo:rsid="001dce91" officeooo:paragraph-rsid="001e4c3b"/>
    </style:style>
    <style:style style:name="P3" style:family="paragraph" style:parent-style-name="Standard">
      <style:text-properties style:text-underline-style="none" officeooo:rsid="001e4c3b" officeooo:paragraph-rsid="001e4c3b"/>
    </style:style>
    <style:style style:name="P4" style:family="paragraph" style:parent-style-name="Standard">
      <style:text-properties style:text-underline-style="none" officeooo:rsid="001fb90e" officeooo:paragraph-rsid="001fb90e"/>
    </style:style>
    <style:style style:name="P5" style:family="paragraph" style:parent-style-name="Standard">
      <style:text-properties style:text-underline-style="none" officeooo:rsid="001fdc03" officeooo:paragraph-rsid="001fdc03"/>
    </style:style>
    <style:style style:name="P6" style:family="paragraph" style:parent-style-name="Standard">
      <style:text-properties style:text-underline-style="none" officeooo:rsid="00209159" officeooo:paragraph-rsid="00209159"/>
    </style:style>
    <style:style style:name="P7" style:family="paragraph" style:parent-style-name="Standard">
      <style:text-properties style:text-underline-style="none" officeooo:rsid="0020cabe" officeooo:paragraph-rsid="0020cabe"/>
    </style:style>
    <style:style style:name="P8" style:family="paragraph" style:parent-style-name="Standard">
      <style:text-properties style:text-underline-style="none" officeooo:rsid="0021e90d" officeooo:paragraph-rsid="0021e90d"/>
    </style:style>
    <style:style style:name="T1" style:family="text">
      <style:text-properties officeooo:rsid="001e4c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cabe"/>
    </style:style>
    <style:style style:name="T4" style:family="text">
      <style:text-properties style:font-name="Liberation Serif" style:font-name-asian="Liberation Serif" style:font-name-complex="Liberation Serif"/>
    </style:style>
    <style:style style:name="T5" style:family="text">
      <style:text-properties style:font-name="Liberation Serif" officeooo:rsid="0021e90d" style:font-name-asian="Liberation Serif" style:font-name-complex="Liberation Serif"/>
    </style:style>
    <style:style style:name="T6" style:family="text">
      <style:text-properties style:font-name="Liberation Serif1" style:font-name-asian="Noto Serif CJK SC" style:font-name-complex="Noto Sans Devanagari1"/>
    </style:style>
    <style:style style:name="T7" style:family="text">
      <style:text-properties style:font-name="Liberation Serif1" fo:font-weight="bold" style:font-name-asian="Noto Serif CJK SC" style:font-weight-asian="bold" style:font-name-complex="Noto Sans Devanagari1" style:font-weight-complex="bold"/>
    </style:style>
    <style:style style:name="T8" style:family="text">
      <style:text-properties officeooo:rsid="0021e9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en un enumerado no ponemos public enum va a tener visibilidad de paquete.</text:p>
      <text:p text:style-name="P1"><text:tab/>Basico::ColorPelo::Moreno para llamarlo desde otro paquete.</text:p>
      <text:p text:style-name="P1"><text:tab/><text:tab/>Moreno es un tipo del module ColorPelo(actua como enum) que es un module del <text:tab/><text:tab/>module Basico(actua como packete).</text:p>
      <text:p text:style-name="P1"/>
      <text:p text:style-name="P1"/>
      <text:p text:style-name="P1">INSTANCIA: variables asociadas a cada obj, su estado se describe mediante sus valores.</text:p>
      <text:p text:style-name="P1"><text:tab/>asociado a los objetos de dicha clase.</text:p>
      <text:p text:style-name="P1"/>
      <text:p text:style-name="P1">CLASE: almacena información asociada a dicha clase y no a cada instancia, es global.</text:p>
      <text:p text:style-name="P1"><text:tab/>Si dos objetos comparten un atributo, este es único, se encuentra en una zona de memoria <text:tab/></text:p>
      <text:p text:style-name="P1"><text:tab/>asociada a la clase.</text:p>
      <text:p text:style-name="P1"><text:tab/><text:tab/>Static</text:p>
      <text:p text:style-name="P1"><text:tab/><text:tab/>self</text:p>
      <text:p text:style-name="P1"><text:tab/><text:tab/>@@atb de clase</text:p>
      <text:p text:style-name="P1"><text:tab/><text:tab/>@atb de instancia de clase</text:p>
      <text:p text:style-name="P1"><text:tab/><text:tab/><text:tab/>en ambito de instancia es atb de instancia</text:p>
      <text:p text:style-name="P1"><text:tab/><text:tab/><text:tab/>en ambiro de inst. De clase es atb ins de clase</text:p>
      <text:p text:style-name="P1"/>
      <text:p text:style-name="P1"><text:tab/>class</text:p>
      <text:p text:style-name="P1"><text:tab/><text:tab/>@var=”inst de clase”</text:p>
      <text:p text:style-name="P1"><text:tab/><text:tab/>def initialize</text:p>
      <text:p text:style-name="P1"><text:tab/><text:tab/><text:tab/>@var=”inst”</text:p>
      <text:p text:style-name="P1"><text:tab/>end</text:p>
      <text:p text:style-name="P1"/>
      <text:p text:style-name="P1"/>
      <text:p text:style-name="P1">public static final</text:p>
      <text:p text:style-name="P1"/>
      <text:p text:style-name="P1">Un metodo de clase no se puede invocar en ruby desde una instancia, en java si:</text:p>
      <text:p text:style-name="P1"><text:tab/>self.metodo</text:p>
      <text:p text:style-name="P1"><text:tab/>Clase.metodo</text:p>
      <text:p text:style-name="P1"><text:tab/>nunca c.metodo</text:p>
      <text:p text:style-name="P1"/>
      <text:p text:style-name="P1">java →this == ruby→self</text:p>
      <text:p text:style-name="P1"/>
      <text:p text:style-name="P1">private en ruby solo afecta a los metodos de instancia</text:p>
      <text:p text:style-name="P1"><text:tab/>private :metodoInstancia</text:p>
      <text:p text:style-name="P1"><text:tab/>private_class_method :metodoClase</text:p>
      <text:p text:style-name="P1"><text:tab/></text:p>
      <text:p text:style-name="P1"/>
      <text:p text:style-name="P1"/>
      <text:p text:style-name="P1">CONSTRUCTORES</text:p>
      <text:p text:style-name="P1">En ruby podemos pasar un valor por defecro y al llamar al constructor no es necesario introducirle un valor:<text:tab/></text:p>
      <text:p text:style-name="P1"><text:tab/>def initialize(x,y,z=0)</text:p>
      <text:p text:style-name="P2">Para crear dos constructores en ruby <text:span text:style-name="T1">hacemos un metodo de clase:</text:span></text:p>
      <text:p text:style-name="P2"><text:tab/><text:span text:style-name="T1">def initialize(x,y,z)<text:tab/><text:tab/>def self.new_2D(x,y)<text:tab/><text:tab/>def self.new_3D(x,y,z)</text:span></text:p>
      <text:p text:style-name="P2"><text:tab/><text:tab/>….<text:tab/><text:tab/><text:tab/><text:tab/><text:span text:style-name="T1">new(x,y,0)<text:tab/><text:tab/><text:tab/>new(x,y,z)</text:span></text:p>
      <text:p text:style-name="P2"><text:tab/><text:span text:style-name="T1">end<text:tab/><text:tab/><text:tab/><text:tab/>end</text:span><text:tab/><text:tab/><text:tab/><text:tab/><text:span text:style-name="T1">end</text:span></text:p>
      <text:p text:style-name="P1"/>
      <text:p text:style-name="P3">privare_class_method :new<text:tab/>esto hará que para crear un objeto de dicha clase haya que llamar a new_3D o a new_2D y nunca puts NombreClase.new()</text:p>
      <text:p text:style-name="P3"><text:soft-page-break/>puts NombreClase.new_2D(1,2).inspect</text:p>
      <text:p text:style-name="P3"/>
      <text:p text:style-name="P3"/>
      <text:p text:style-name="P3"/>
      <text:p text:style-name="P3">CONSULTORES Y MODIFICADORES</text:p>
      <text:p text:style-name="P3">attr_writer :atb</text:p>
      <text:p text:style-name="P3">attr_accessor :atb</text:p>
      <text:p text:style-name="P3">attr_reader :atb</text:p>
      <text:p text:style-name="P3"/>
      <text:p text:style-name="P4">obj.atb = x</text:p>
      <text:p text:style-name="P4">puts obj.atb</text:p>
      <text:p text:style-name="P4"/>
      <text:p text:style-name="P4"/>
      <text:p text:style-name="P4"/>
      <text:p text:style-name="P4"/>
      <text:p text:style-name="P4">Cuando se devuelve el valor de una variable se devuelve una referencia a un objeto.</text:p>
      <text:p text:style-name="P4">En ruby no hay sobrecarga en métodos y constructores mientras que en java si.</text:p>
      <text:p text:style-name="P3"><draw:frame draw:style-name="fr2" draw:name="Imagen1" text:anchor-type="char" svg:width="17cm" svg:height="2.388cm" draw:z-index="0"><draw:image xlink:href="Pictures/10000001000003240000007165259006.png" xlink:type="simple" xlink:show="embed" xlink:actuate="onLoad" draw:mime-type="image/png"/></draw:frame></text:p>
      <text:p text:style-name="P3"/>
      <text:p text:style-name="P3"/>
      <text:p text:style-name="P3"/>
      <text:p text:style-name="P4">PAQUETES Y MODULOS </text:p>
      <text:p text:style-name="P4">package miPaquete;</text:p>
      <text:p text:style-name="P4">import otroPaquete.Clase;<text:tab/>//usar la clase Clase del paquete otroPaquete</text:p>
      <text:p text:style-name="P4"/>
      <text:p text:style-name="P4">En Java no existen subpaquetes, cada paquete es independiente del resto, aunque parezca que uno es subpaquete de otro</text:p>
      <text:p text:style-name="P3"/>
      <text:p text:style-name="P3"/>
      <text:p text:style-name="P5">Módulos Ruby</text:p>
      <text:p text:style-name="P5"><draw:frame draw:style-name="fr1" draw:name="Imagen2" text:anchor-type="char" svg:x="0.046cm" svg:y="0.31cm" svg:width="13.439cm" svg:height="9.705cm" draw:z-index="1"><draw:image xlink:href="Pictures/10000001000003060000022F101A22B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En ruby usamos require para archivos del lenguaje y require_relative para archivos propios</text:p>
      <text:p text:style-name="P3"/>
      <text:p text:style-name="P3"/>
      <text:p text:style-name="P3"/>
      <text:p text:style-name="P6">UML</text:p>
      <text:p text:style-name="P6"><text:span text:style-name="T2">Cardinalidad</text:span>:<text:tab/><text:tab/>producto <text:s/>1..*-------------1 puntodistribución</text:p>
      <text:p text:style-name="P6"><text:tab/>es bidireccional, por lo que el punto de distribución conoce que productos distribuye y los <text:tab/>productos conocen cuál es su punto de distribución.</text:p>
      <text:p text:style-name="P6"/>
      <text:p text:style-name="P3"/>
      <text:p text:style-name="P6"><text:span text:style-name="T2">Navegabilidad</text:span>: <text:tab/>paciente---------------→cita</text:p>
      <text:p text:style-name="P6"><text:tab/>un paciente conoce que citas tiene pero una cita no conoce cuál es su paciente.</text:p>
      <text:p text:style-name="P6"><text:tab/><text:span text:style-name="T3">Paciente puede acceder a cita</text:span></text:p>
      <text:p text:style-name="P6"/>
      <text:p text:style-name="P3"/>
      <text:p text:style-name="P7"><text:span text:style-name="T2">Agregación</text:span>: Cocina <text:s/>0..1<text:span text:style-name="T4">◊-------1..* Electrodoméstico</text:span></text:p>
      <text:p text:style-name="P7"><text:span text:style-name="T4"><text:tab/>Cocina representa las partes y electrodomésticos el todo, una cocina puede estar compuesta <text:tab/>de electrodomésticos y los electrodomésticos pueden existir sin necesidad de que exista la <text:tab/>cocina.</text:span></text:p>
      <text:p text:style-name="P7"><text:span text:style-name="T4"><text:tab/></text:span><text:span text:style-name="T5">Se hace un arraylist de electrodomésticos en cocina, en el main se inicializan los <text:tab/>electrodomésticos y se agregan a cocina.</text:span></text:p>
      <text:p text:style-name="P7"><text:span text:style-name="T4"/></text:p>
      <text:p text:style-name="P7"><text:span text:style-name="T6"/></text:p>
      <text:p text:style-name="P7"><text:span text:style-name="T7">Composición</text:span><text:span text:style-name="T6">: <text:s text:c="2"/>Banco</text:span><text:span text:style-name="T4">♦----------1..* CuentaBancaria</text:span></text:p>
      <text:p text:style-name="P3"><text:tab/><text:span text:style-name="T3">la cardinalidad de todo(banco) debe ser obligatoriamente 1, las partes no tienen sentido sin <text:tab/>el todo</text:span></text:p>
      <text:p text:style-name="P3"><text:tab/><text:span text:style-name="T8">se crea un arraylist cuentabancaria en banco y se crea un metodo que agregue las paginas <text:tab/>directamente al libro, sin hacerlo independientemente en el main</text:span></text:p>
      <text:p text:style-name="P3"/>
      <text:p text:style-name="P3"/>
      <text:p text:style-name="P3"/>
      <text:p text:style-name="P8"><text:span text:style-name="T2">Dependencia</text:span>: Gestor- - - - - → Factura</text:p>
      <text:p text:style-name="P8"><text:tab/>Nos indica que necesitamos usar la clase Factura en Gestor. </text:p>
      <text:p text:style-name="P3"><draw:frame draw:style-name="fr1" draw:name="Imagen3" text:anchor-type="char" svg:x="0cm" svg:y="0.143cm" svg:width="17cm" svg:height="6.147cm" draw:z-index="2"><draw:image xlink:href="Pictures/10000001000003140000011D842C2B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MAIN</text:p>
      <text:p text:style-name="P3">public class Clase{</text:p>
      <text:p text:style-name="P3"><text:tab/>public static void main(String[] args){</text:p>
      <text:p text:style-name="P3"><text:tab/>}</text:p>
      <text:p text:style-name="P3">}</text:p>
      <text:p text:style-name="P3"/>
      <text:p text:style-name="P3">Class Clase</text:p>
      <text:p text:style-name="P3"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1:24:20.492823371</meta:creation-date>
    <dc:date>2024-11-17T13:29:58.760558850</dc:date>
    <meta:editing-duration>PT34M32S</meta:editing-duration>
    <meta:editing-cycles>3</meta:editing-cycles>
    <meta:generator>LibreOffice/24.2.5.2$Linux_X86_64 LibreOffice_project/420$Build-2</meta:generator>
    <meta:document-statistic meta:table-count="0" meta:image-count="3" meta:object-count="0" meta:page-count="4" meta:paragraph-count="73" meta:word-count="513" meta:character-count="3373" meta:non-whitespace-character-count="2854"/>
  </office:meta>
</office:document-meta>
</file>