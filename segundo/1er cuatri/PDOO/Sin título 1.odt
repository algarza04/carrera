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00000022B4E300CE2.png" manifest:media-type="image/png"/>
  <manifest:file-entry manifest:full-path="Pictures/10000001000004650000023A47D9BA44.png" manifest:media-type="image/png"/>
  <manifest:file-entry manifest:full-path="Pictures/10000001000004F8000002FD0B9252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2a2" officeooo:paragraph-rsid="0019b2a2"/>
    </style:style>
    <style:style style:name="P2" style:family="paragraph" style:parent-style-name="Standard">
      <style:text-properties officeooo:rsid="001a224d" officeooo:paragraph-rsid="001a224d"/>
    </style:style>
    <style:style style:name="T1" style:family="text">
      <style:text-properties officeooo:rsid="001a22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E</text:p>
      <text:p text:style-name="P1"/>
      <text:p text:style-name="P1"><draw:frame draw:style-name="fr2" draw:name="Imagen1" text:anchor-type="char" svg:width="17cm" svg:height="10.224cm" draw:z-index="0"><draw:image xlink:href="Pictures/10000001000004F8000002FD0B9252FA.png" xlink:type="simple" xlink:show="embed" xlink:actuate="onLoad" draw:mime-type="image/png"/></draw:frame>Interfaz cloneable: <text:span text:style-name="T1">no define metodos, si no recomendaciones</text:span></text:p>
      <text:p text:style-name="P1"/>
      <text:p text:style-name="P2">CONSTRUCTOR COPIA </text:p>
      <text:p text:style-name="P2"><draw:frame draw:style-name="fr1" draw:name="Imagen2" text:anchor-type="char" svg:x="0.489cm" svg:y="0.609cm" svg:width="13.062cm" svg:height="6.618cm" draw:z-index="1"><draw:image xlink:href="Pictures/10000001000004650000023A47D9BA4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406cm" svg:y="0.727cm" svg:width="14.021cm" svg:height="7.258cm" draw:z-index="2"><draw:image xlink:href="Pictures/10000001000004300000022B4E300CE2.png" xlink:type="simple" xlink:show="embed" xlink:actuate="onLoad" draw:mime-type="image/png"/></draw:frame></text:p>
      <text:p text:style-name="P2"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a copia profunda la realiza el programador</text:p>
      <text:p text:style-name="P2">clone realiza una copia superficial </text:p>
      <text:p text:style-name="P2">cloneable permite que clone funcione sin lanzar ninguna excep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2:12:01.697112528</meta:creation-date>
    <dc:date>2025-01-20T22:50:55.013457265</dc:date>
    <meta:editing-duration>PT16M39S</meta:editing-duration>
    <meta:editing-cycles>1</meta:editing-cycles>
    <meta:document-statistic meta:table-count="0" meta:image-count="3" meta:object-count="0" meta:page-count="2" meta:paragraph-count="8" meta:word-count="32" meta:character-count="233" meta:non-whitespace-character-count="199"/>
    <meta:generator>LibreOffice/24.2.5.2$Linux_X86_64 LibreOffice_project/420$Build-2</meta:generator>
  </office:meta>
</office:document-meta>
</file>