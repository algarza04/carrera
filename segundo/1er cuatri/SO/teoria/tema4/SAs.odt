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91cm"/>
    </style:style>
    <style:style style:name="Tabla1.B" style:family="table-column">
      <style:table-column-properties style:column-width="3.986cm"/>
    </style:style>
    <style:style style:name="Tabla1.C" style:family="table-column">
      <style:table-column-properties style:column-width="3.764cm"/>
    </style:style>
    <style:style style:name="Tabla1.D" style:family="table-column">
      <style:table-column-properties style:column-width="7.359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2" style:family="paragraph" style:parent-style-name="Heading_20_3">
      <style:text-properties style:font-name="Google Sans Text" fo:font-weight="bold"/>
    </style:style>
    <style:style style:name="P3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Familia de Sistemas de Archivos EXT (Extended File System)</text:h>
      <text:h text:style-name="P3" text:outline-level="4">1. EXT2 (Second Extended File System)</text:h>
      <text:p text:style-name="P7">Es el "abuelo" de los sistemas modernos de Linux. Fue el estándar durante muchos años.</text:p>
      <text:list text:style-name="L1">
        <text:list-item>
          <text:p text:style-name="P8"><text:span text:style-name="T1">Funcionamiento:</text:span> Divide el disco en <text:span text:style-name="T1">Bloques</text:span>, que agrupa en <text:span text:style-name="T1">Grupos de Bloques</text:span> para reducir la fragmentación. No tiene registro de fallos (<text:span text:style-name="T2">journaling</text:span>).</text:p>
        </text:list-item>
        <text:list-item>
          <text:p text:style-name="P14">Características clave:</text:p>
          <text:list>
            <text:list-item>
              <text:p text:style-name="P8">Muy eficiente y rápido en dispositivos pequeños (como tarjetas SD antiguas o USBs) porque no tiene la "carga" de escribir el registro de fallos.</text:p>
            </text:list-item>
            <text:list-item>
              <text:p text:style-name="P17"><text:span text:style-name="T4">Problema:</text:span><text:span text:style-name="T3"> Si el sistema se apaga de golpe, el disco puede quedar corrupto y hay que pasar un escaneo largo (</text:span><text:span text:style-name="Source_20_Text"><text:span text:style-name="T3">fsck</text:span></text:span><text:span text:style-name="T3">) al reiniciar.</text:span></text:p>
            </text:list-item>
          </text:list>
        </text:list-item>
        <text:list-item>
          <text:p text:style-name="P8"><text:span text:style-name="T1">Caso de uso:</text:span> Sistemas con pocos recursos, dispositivos de memoria flash antiguos o particiones de "solo lectura".</text:p>
        </text:list-item>
      </text:list>
      <text:h text:style-name="P3" text:outline-level="4">2. EXT3 (Third Extended File System)</text:h>
      <text:p text:style-name="P7">Es una evolución directa de EXT2 que añade la característica más importante: el <text:span text:style-name="T1">Journaling</text:span>.</text:p>
      <text:list text:style-name="L2">
        <text:list-item>
          <text:p text:style-name="P9"><text:span text:style-name="T1">Funcionamiento:</text:span> Antes de realizar un cambio real en el disco, lo anota en un "diario" (<text:span text:style-name="T2">journal</text:span>). Si hay un corte de luz, el sistema mira el diario y termina lo que dejó a medias.</text:p>
        </text:list-item>
        <text:list-item>
          <text:p text:style-name="P15">Características clave:</text:p>
          <text:list>
            <text:list-item>
              <text:p text:style-name="P9"><text:span text:style-name="T1">Fiabilidad:</text:span> Evita la corrupción de datos y los reinicios lentos tras un fallo.</text:p>
            </text:list-item>
            <text:list-item>
              <text:p text:style-name="P9">Es compatible hacia atrás con EXT2 (puedes convertir un EXT2 a EXT3 sin formatear).</text:p>
            </text:list-item>
          </text:list>
        </text:list-item>
        <text:list-item>
          <text:p text:style-name="P9"><text:span text:style-name="T1">Caso de uso:</text:span> Servidores y PCs de principios de los 2000 que necesitaban estabilidad sin cambiar drásticamente de tecnología.</text:p>
        </text:list-item>
      </text:list>
      <text:h text:style-name="P3" text:outline-level="4">3. EXT4 (Fourth Extended File System)</text:h>
      <text:p text:style-name="P7">Es el estándar actual en casi todo Linux. Es una mejora masiva en rendimiento y capacidad.</text:p>
      <text:list text:style-name="L3">
        <text:list-item>
          <text:p text:style-name="P18"><text:span text:style-name="T4">Funcionamiento:</text:span><text:span text:style-name="T3"> Introduce los </text:span><text:span text:style-name="T4">Extents</text:span><text:span text:style-name="T3"> (lo que hablábamos de la </text:span><text:span text:style-name="T4">lista de bloques contiguos</text:span><text:span text:style-name="T3">). En lugar de apuntar a cada bloque individual, guarda el par </text:span><text:span text:style-name="Source_20_Text"><text:span text:style-name="T3">(bloque_inicio, cantidad)</text:span></text:span><text:span text:style-name="T3">.</text:span></text:p>
        </text:list-item>
        <text:list-item>
          <text:p text:style-name="P16"><text:soft-page-break/>Características clave:</text:p>
          <text:list>
            <text:list-item>
              <text:p text:style-name="P10"><text:span text:style-name="T1">Extents:</text:span> Reduce drásticamente la fragmentación y mejora la velocidad con archivos grandes.</text:p>
            </text:list-item>
            <text:list-item>
              <text:p text:style-name="P10">Soporta volúmenes de hasta 1 Exabyte y archivos de hasta 16 Terabytes.</text:p>
            </text:list-item>
            <text:list-item>
              <text:p text:style-name="P10">Asignación retardada (<text:span text:style-name="T2">delayed allocation</text:span>): Espera al último momento para escribir en el disco, optimizando cómo se agrupan los datos.</text:p>
            </text:list-item>
          </text:list>
        </text:list-item>
        <text:list-item>
          <text:p text:style-name="P10"><text:span text:style-name="T1">Caso de uso:</text:span> Uso general en Linux (Ubuntu, Debian, Android), bases de datos y almacenamiento de alto rendimiento.</text:p>
        </text:list-item>
      </text:list>
      <text:p text:style-name="Horizontal_20_Line"/>
      <text:h text:style-name="P1" text:outline-level="3">Otros sistemas de archivos comunes en el temario</text:h>
      <text:h text:style-name="P3" text:outline-level="4">4. FAT32 (File Allocation Table 32)</text:h>
      <text:list text:style-name="L4">
        <text:list-item>
          <text:p text:style-name="P11"><text:span text:style-name="T1">Funcionamiento:</text:span> Usa una tabla sencilla al principio del disco que indica dónde está cada trozo de archivo.</text:p>
        </text:list-item>
        <text:list-item>
          <text:p text:style-name="P11"><text:span text:style-name="T1">Limitación:</text:span> No admite archivos de más de <text:span text:style-name="T1">4 GB</text:span>.</text:p>
        </text:list-item>
        <text:list-item>
          <text:p text:style-name="P11"><text:span text:style-name="T1">Caso de uso:</text:span> Pendrives universales y tarjetas de memoria para cámaras, porque funciona en Windows, Mac, Linux y consolas.</text:p>
        </text:list-item>
      </text:list>
      <text:h text:style-name="P3" text:outline-level="4">5. NTFS (New Technology File System)</text:h>
      <text:list text:style-name="L5">
        <text:list-item>
          <text:p text:style-name="P12"><text:span text:style-name="T1">Funcionamiento:</text:span> Sistema propietario de Microsoft. Usa una estructura compleja llamada MFT (Master File Table) y tiene journaling avanzado.</text:p>
        </text:list-item>
        <text:list-item>
          <text:p text:style-name="P12"><text:span text:style-name="T1">Caso de uso:</text:span> Discos duros principales en sistemas <text:span text:style-name="T1">Windows</text:span>.</text:p>
        </text:list-item>
      </text:list>
      <text:h text:style-name="P3" text:outline-level="4">6. XFS / BTRFS (Sistemas avanzados)</text:h>
      <text:list text:style-name="L6">
        <text:list-item>
          <text:p text:style-name="P13"><text:span text:style-name="T1">XFS:</text:span> Especialista en archivos gigantescos y servidores de datos masivos (muy usado en Red Hat).</text:p>
        </text:list-item>
        <text:list-item>
          <text:p text:style-name="P13"><text:span text:style-name="T1">BTRFS:</text:span> El "sistema del futuro" de Linux. Permite "snapshots" (fotos del sistema para volver atrás si algo falla) y gestión de varios discos a la vez (RAID por software).</text:p>
        </text:list-item>
      </text:list>
      <text:p text:style-name="Horizontal_20_Line"/>
      <text:h text:style-name="P1" text:outline-level="3">Resumen rápido de diferencias (Tabla)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4"><text:span text:style-name="Strong_20_Emphasis"><text:span text:style-name="T3">Sistema</text:span></text:span></text:p>
            </table:table-cell>
            <table:table-cell table:style-name="Tabla1.A1" office:value-type="string">
              <text:p text:style-name="P4"><text:span text:style-name="Strong_20_Emphasis"><text:span text:style-name="T3">Técnica de Bloques</text:span></text:span></text:p>
            </table:table-cell>
            <table:table-cell table:style-name="Tabla1.A1" office:value-type="string">
              <text:p text:style-name="P4"><text:span text:style-name="Strong_20_Emphasis"><text:span text:style-name="T3">Registro (Journal)</text:span></text:span></text:p>
            </table:table-cell>
            <table:table-cell table:style-name="Tabla1.A1" office:value-type="string">
              <text:p text:style-name="P4"><text:span text:style-name="Strong_20_Emphasis"><text:span text:style-name="T3">Característica destacada</text:span></text:span></text:p>
            </table:table-cell>
          </table:table-row>
        </table:table-header-rows>
        <table:table-row>
          <table:table-cell table:style-name="Tabla1.A1" office:value-type="string">
            <text:p text:style-name="P5">EXT2</text:p>
          </table:table-cell>
          <table:table-cell table:style-name="Tabla1.A1" office:value-type="string">
            <text:p text:style-name="P6">Lista de bloques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Rápido pero inseguro ante fallos.</text:p>
          </table:table-cell>
        </table:table-row>
        <text:soft-page-break/>
        <table:table-row>
          <table:table-cell table:style-name="Tabla1.A1" office:value-type="string">
            <text:p text:style-name="P5">EXT3</text:p>
          </table:table-cell>
          <table:table-cell table:style-name="Tabla1.A1" office:value-type="string">
            <text:p text:style-name="P6">Lista de bloques</text:p>
          </table:table-cell>
          <table:table-cell table:style-name="Tabla1.A1" office:value-type="string">
            <text:p text:style-name="P5">Sí</text:p>
          </table:table-cell>
          <table:table-cell table:style-name="Tabla1.A1" office:value-type="string">
            <text:p text:style-name="P6">Introdujo el Journaling (seguridad).</text:p>
          </table:table-cell>
        </table:table-row>
        <table:table-row>
          <table:table-cell table:style-name="Tabla1.A1" office:value-type="string">
            <text:p text:style-name="P5">EXT4</text:p>
          </table:table-cell>
          <table:table-cell table:style-name="Tabla1.A1" office:value-type="string">
            <text:p text:style-name="P6"><text:span text:style-name="T1">Extents</text:span> (Pares)</text:p>
          </table:table-cell>
          <table:table-cell table:style-name="Tabla1.A1" office:value-type="string">
            <text:p text:style-name="P5">Sí</text:p>
          </table:table-cell>
          <table:table-cell table:style-name="Tabla1.A1" office:value-type="string">
            <text:p text:style-name="P6">Ideal para archivos grandes (Extents).</text:p>
          </table:table-cell>
        </table:table-row>
        <table:table-row>
          <table:table-cell table:style-name="Tabla1.A1" office:value-type="string">
            <text:p text:style-name="P5">FAT32</text:p>
          </table:table-cell>
          <table:table-cell table:style-name="Tabla1.A1" office:value-type="string">
            <text:p text:style-name="P6">Tabla (FAT)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Compatibilidad total / Límite 4GB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1:58:38.964955831</meta:creation-date>
    <dc:date>2026-01-06T11:59:18.367551832</dc:date>
    <meta:editing-duration>PT40S</meta:editing-duration>
    <meta:editing-cycles>1</meta:editing-cycles>
    <meta:document-statistic meta:table-count="1" meta:image-count="0" meta:object-count="0" meta:page-count="3" meta:paragraph-count="55" meta:word-count="546" meta:character-count="3318" meta:non-whitespace-character-count="2850"/>
    <meta:generator>LibreOffice/24.2.7.2$Linux_X86_64 LibreOffice_project/420$Build-2</meta:generator>
  </office:meta>
</office:document-meta>
</file>