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b9f6" officeooo:paragraph-rsid="001ab9f6"/>
    </style:style>
    <style:style style:name="P2" style:family="paragraph" style:parent-style-name="Standard">
      <style:text-properties officeooo:rsid="001ab9f6" officeooo:paragraph-rsid="001b918a"/>
    </style:style>
    <style:style style:name="P3" style:family="paragraph" style:parent-style-name="Standard">
      <style:text-properties officeooo:rsid="001ab9f6" officeooo:paragraph-rsid="001cbe12"/>
    </style:style>
    <style:style style:name="P4" style:family="paragraph" style:parent-style-name="Standard">
      <style:text-properties fo:font-weight="bold" officeooo:rsid="00202c9b" officeooo:paragraph-rsid="00202c9b" style:font-weight-asian="bold" style:font-weight-complex="bold"/>
    </style:style>
    <style:style style:name="P5" style:family="paragraph" style:parent-style-name="Standard">
      <style:text-properties fo:font-size="13pt" fo:font-weight="bold" officeooo:rsid="001ab9f6" officeooo:paragraph-rsid="001ab9f6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ab9f6" officeooo:paragraph-rsid="001cbe12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b918a" officeooo:paragraph-rsid="001b918a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cbe12" officeooo:paragraph-rsid="001cbe12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5pt" fo:font-weight="bold" officeooo:rsid="001b918a" officeooo:paragraph-rsid="001b918a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cbe12" officeooo:paragraph-rsid="001cbe12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1b918a" officeooo:paragraph-rsid="001b918a"/>
    </style:style>
    <style:style style:name="P12" style:family="paragraph" style:parent-style-name="Standard">
      <style:text-properties officeooo:rsid="00202c9b" officeooo:paragraph-rsid="00202c9b"/>
    </style:style>
    <style:style style:name="P13" style:family="paragraph" style:parent-style-name="Standard">
      <style:text-properties fo:font-weight="normal" officeooo:rsid="00202c9b" officeooo:paragraph-rsid="00202c9b" style:font-weight-asian="normal" style:font-weight-complex="normal"/>
    </style:style>
    <style:style style:name="P14" style:family="paragraph" style:parent-style-name="Heading_20_1">
      <style:text-properties style:font-name="Google Sans" fo:font-weight="bold" officeooo:rsid="00202c9b" officeooo:paragraph-rsid="001ab9f6" style:font-weight-asian="bold" style:font-weight-complex="bold"/>
    </style:style>
    <style:style style:name="P15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7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8" style:family="paragraph" style:parent-style-name="Standard" style:list-style-name="L1">
      <style:text-properties officeooo:rsid="001ab9f6" officeooo:paragraph-rsid="001ab9f6"/>
    </style:style>
    <style:style style:name="P19" style:family="paragraph" style:parent-style-name="Standard" style:list-style-name="L2">
      <style:text-properties officeooo:rsid="001ab9f6" officeooo:paragraph-rsid="001ab9f6"/>
    </style:style>
    <style:style style:name="P20" style:family="paragraph" style:parent-style-name="Standard" style:list-style-name="L3">
      <style:text-properties officeooo:rsid="001ab9f6" officeooo:paragraph-rsid="001ab9f6"/>
    </style:style>
    <style:style style:name="P21" style:family="paragraph" style:parent-style-name="Standard" style:list-style-name="L6">
      <style:text-properties officeooo:rsid="001ab9f6" officeooo:paragraph-rsid="001cbe12"/>
    </style:style>
    <style:style style:name="P22" style:family="paragraph" style:parent-style-name="Standard" style:list-style-name="L7">
      <style:text-properties officeooo:rsid="001ab9f6" officeooo:paragraph-rsid="001cbe12"/>
    </style:style>
    <style:style style:name="P23" style:family="paragraph" style:parent-style-name="Standard">
      <style:text-properties fo:font-size="15pt" fo:font-weight="bold" officeooo:rsid="001b918a" officeooo:paragraph-rsid="001b918a" style:font-size-asian="15pt" style:font-weight-asian="bold" style:font-size-complex="15pt" style:font-weight-complex="bold"/>
    </style:style>
    <style:style style:name="P24" style:family="paragraph" style:parent-style-name="Standard" style:list-style-name="L4">
      <style:text-properties officeooo:rsid="001b918a" officeooo:paragraph-rsid="001b918a"/>
    </style:style>
    <style:style style:name="P25" style:family="paragraph" style:parent-style-name="Standard" style:list-style-name="L5">
      <style:text-properties officeooo:rsid="001cbe12" officeooo:paragraph-rsid="001cbe12"/>
    </style:style>
    <style:style style:name="P26" style:family="paragraph" style:parent-style-name="Standard" style:list-style-name="L1">
      <style:text-properties officeooo:rsid="001cbe12" officeooo:paragraph-rsid="001cbe12"/>
    </style:style>
    <style:style style:name="P27" style:family="paragraph" style:parent-style-name="Standard">
      <style:text-properties fo:font-weight="bold" officeooo:rsid="00202c9b" officeooo:paragraph-rsid="001ab9f6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0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1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2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3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4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5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6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7" style:family="paragraph" style:parent-style-name="Text_20_body" style:list-style-name="L1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8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9" style:family="paragraph" style:parent-style-name="Text_20_body" style:list-style-name="L1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0" style:family="paragraph" style:parent-style-name="Text_20_body" style:list-style-name="L1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1" style:family="paragraph" style:parent-style-name="Text_20_body" style:list-style-name="L1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2" style:family="paragraph" style:parent-style-name="Text_20_body" style:list-style-name="L2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3" style:family="paragraph" style:parent-style-name="Text_20_body" style:list-style-name="L2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4" style:family="paragraph" style:parent-style-name="Text_20_body" style:list-style-name="L2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5" style:family="paragraph" style:parent-style-name="Text_20_body" style:list-style-name="L2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6" style:family="paragraph" style:parent-style-name="Text_20_body" style:list-style-name="L2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7" style:family="paragraph" style:parent-style-name="Text_20_body" style:list-style-name="L2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8" style:family="paragraph" style:parent-style-name="Text_20_body" style:list-style-name="L2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9" style:family="paragraph" style:parent-style-name="Text_20_body" style:list-style-name="L2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0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51" style:family="paragraph" style:parent-style-name="Text_20_body" style:list-style-name="L2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52" style:family="paragraph" style:parent-style-name="Text_20_body" style:list-style-name="L2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53" style:family="paragraph" style:parent-style-name="Text_20_body" style:list-style-name="L2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54" style:family="paragraph" style:parent-style-name="Text_20_body" style:list-style-name="L2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55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6" style:family="paragraph" style:parent-style-name="Text_20_body" style:list-style-name="L2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background-color="transparent" loext:char-shading-value="0"/>
    </style:style>
    <style:style style:name="T5" style:family="text">
      <style:text-properties style:font-name="Google Sans Text"/>
    </style:style>
    <style:style style:name="T6" style:family="text">
      <style:text-properties style:font-name="Google Sans Text" fo:font-weight="bold"/>
    </style:style>
    <style:style style:name="T7" style:family="text">
      <style:text-properties style:font-name="Google Sans Text" fo:font-style="italic"/>
    </style:style>
    <style:style style:name="T8" style:family="text">
      <style:text-properties style:font-name="Google Sans Text" fo:font-size="12pt" fo:background-color="transparent" loext:char-shading-value="0"/>
    </style:style>
    <style:style style:name="T9" style:family="text">
      <style:text-properties fo:font-style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Tema 1: Estructuras de Sistemas Operativos</text:h>
      <text:h text:style-name="P15" text:outline-level="2">1. Objetivos del Tema</text:h>
      <text:p text:style-name="P28">Antes de empezar, es importante saber qué buscamos con este tema<text:span text:style-name="T4">1</text:span>. Los objetivos principales son:</text:p>
      <text:list text:style-name="L8">
        <text:list-item>
          <text:p text:style-name="P30">Conocer el <text:span text:style-name="T1">soporte hardware (HW)</text:span> fundamental sobre el que trabaja el Sistema Operativo<text:span text:style-name="T4">2</text:span>.</text:p>
        </text:list-item>
        <text:list-item>
          <text:p text:style-name="P30">Entender los <text:span text:style-name="T1">requisitos funcionales</text:span> de un SO, es decir, los servicios que debe proveer<text:span text:style-name="T4">3</text:span>.</text:p>
        </text:list-item>
        <text:list-item>
          <text:p text:style-name="P30">Aprender las diferentes <text:span text:style-name="T1">arquitecturas</text:span> o formas de diseñar un SO y las ventajas de cada una<text:span text:style-name="T4">4</text:span>.</text:p>
        </text:list-item>
        <text:list-item>
          <text:p text:style-name="P30">Distinguir los tipos de <text:span text:style-name="T1">SOs de propósito específico</text:span><text:span text:style-name="T4">5</text:span>.</text:p>
        </text:list-item>
      </text:list>
      <text:h text:style-name="P15" text:outline-level="2">2. Recordatorio de Hardware (Soporte para el SO)</text:h>
      <text:p text:style-name="P28">Un sistema informático se puede ver como una pila de capas, donde cada una interactúa con la de abajo<text:span text:style-name="T4">6</text:span>.</text:p>
      <text:list text:style-name="L9">
        <text:list-item>
          <text:p text:style-name="P31"><text:span text:style-name="T1">Hardware (HW):</text:span> La base física (CPU, memoria, discos)<text:span text:style-name="T4">7</text:span>.</text:p>
        </text:list-item>
        <text:list-item>
          <text:p text:style-name="P31"><text:span text:style-name="T1">Sistema Operativo (SO):</text:span> Gestiona el hardware y provee servicios<text:span text:style-name="T4">8</text:span>.</text:p>
        </text:list-item>
        <text:list-item>
          <text:p text:style-name="P31"><text:span text:style-name="T1">Aplicaciones y Programas de Sistema:</text:span> Usan los servicios del SO<text:span text:style-name="T4">9</text:span>.</text:p>
        </text:list-item>
        <text:list-item>
          <text:p text:style-name="P31"><text:span text:style-name="T1">Usuario:</text:span> Interactúa con las aplicaciones<text:span text:style-name="T4">10</text:span>.</text:p>
        </text:list-item>
      </text:list>
      <text:p text:style-name="P28">Los componentes principales del HW son la <text:span text:style-name="T1">CPU</text:span>, la <text:span text:style-name="T1">Memoria Principal (RAM)</text:span> y los <text:span text:style-name="T1">Módulos de E/S</text:span> (Entrada/Salida), todos conectados por un <text:span text:style-name="T1">Bus del Sistema</text:span><text:span text:style-name="T4">11111111</text:span>.</text:p>
      <text:h text:style-name="P16" text:outline-level="3">2.1. CPU (Unidad Central de Procesamiento)</text:h>
      <text:p text:style-name="P28">La CPU es el cerebro. Contiene un conjunto de registros para operar<text:span text:style-name="T4">12</text:span>. Los más importantes para nosotros son:</text:p>
      <text:list text:style-name="L10">
        <text:list-item>
          <text:p text:style-name="P50">Registros Internos (no visibles al programador):</text:p>
          <text:list>
            <text:list-item>
              <text:p text:style-name="P32"><text:span text:style-name="T1">MAR (Memory Address Register):</text:span> Almacena la dirección de memoria a la que se va a acceder (leer o escribir)<text:span text:style-name="T4">13131313</text:span>.</text:p>
            </text:list-item>
            <text:list-item>
              <text:p text:style-name="P32"><text:soft-page-break/><text:span text:style-name="T1">MBR (Memory Buffer Register):</text:span> Contiene el dato que se va a escribir en memoria o el que se acaba de leer<text:span text:style-name="T4">14141414</text:span>.</text:p>
            </text:list-item>
            <text:list-item>
              <text:p text:style-name="P32"><text:span text:style-name="T1">I/O AR y I/O BR:</text:span> Registros análogos para direcciones y datos de E/S<text:span text:style-name="T4">15151515</text:span>.</text:p>
            </text:list-item>
          </text:list>
        </text:list-item>
        <text:list-item>
          <text:p text:style-name="P32"><text:span text:style-name="T1">Registros de Propósito General:</text:span> Usados por los programas para almacenar datos y direcciones (ej. EAX, EBX en IA-32)<text:span text:style-name="T4">16161616161616161616161616161616</text:span>.</text:p>
        </text:list-item>
        <text:list-item>
          <text:p text:style-name="P50">Registros de Control y Estado (cruciales para el SO):</text:p>
          <text:list>
            <text:list-item>
              <text:p text:style-name="P32"><text:span text:style-name="T1">PC (Program Counter) o EIP (en IA-32):</text:span> Contiene la dirección de la <text:span text:style-name="T9">siguiente</text:span> instrucción a ejecutar<text:span text:style-name="T4">171717171717171717</text:span>.</text:p>
            </text:list-item>
            <text:list-item>
              <text:p text:style-name="P32"><text:span text:style-name="T1">IR (Instruction Register):</text:span> Contiene la instrucción que se está ejecutando <text:span text:style-name="T9">actualmente</text:span><text:span text:style-name="T4">18181818</text:span>.</text:p>
            </text:list-item>
            <text:list-item>
              <text:p text:style-name="P32"><text:span text:style-name="T1">PSW (Program Status Word) o EFLAGS (en IA-32):</text:span> Contiene información vital sobre el estado del procesador, como códigos de condición (resultado de operaciones) e información de control (ej. si las interrupciones están habilitadas)<text:span text:style-name="T4">19191919</text:span>.</text:p>
            </text:list-item>
          </text:list>
        </text:list-item>
      </text:list>
      <text:h text:style-name="P16" text:outline-level="3">2.2. Memoria Principal (RAM)</text:h>
      <text:p text:style-name="P28">Es el almacén principal donde residen las instrucciones y los datos.</text:p>
      <text:list text:style-name="L11">
        <text:list-item>
          <text:p text:style-name="P33"><text:span text:style-name="T1">Modelo:</text:span> Se ve como un gran array (tabla) de celdas o palabras<text:span text:style-name="T4">20</text:span>.</text:p>
        </text:list-item>
        <text:list-item>
          <text:p text:style-name="P33"><text:span text:style-name="T1">Direccionamiento:</text:span> Cada celda tiene una dirección única, un número natural que empieza en 0<text:span text:style-name="T4">21</text:span>. El conjunto total de estas direcciones se llama <text:span text:style-name="T1">espacio de direcciones</text:span><text:span text:style-name="T4">22</text:span>.</text:p>
        </text:list-item>
        <text:list-item>
          <text:p text:style-name="P33"><text:span text:style-name="T1">Operaciones:</text:span> Básicamente dos: <text:span text:style-name="T1">Lectura (R)</text:span>, que obtiene el dato de una dirección, y <text:span text:style-name="T1">Escritura (W)</text:span>, que almacena un dato en una dirección <text:span text:style-name="T4">23</text:span>.</text:p>
        </text:list-item>
        <text:list-item>
          <text:p text:style-name="P33"><text:span text:style-name="T1">Capacidad:</text:span> El número de bits ($n$) usados para codificar las direcciones determina el tamaño máximo de la memoria. Con $n$ bits, podemos direccionar $2^n$ celdas<text:span text:style-name="T4">24</text:span>.</text:p>
        </text:list-item>
      </text:list>
      <text:h text:style-name="P16" text:outline-level="3">2.3. Módulos de E/S y Técnicas de E/S</text:h>
      <text:p text:style-name="P28">Son los componentes que controlan los dispositivos periféricos (discos, teclados, redes)<text:span text:style-name="T4">25</text:span>. Sus funciones principales son:</text:p>
      <text:list text:style-name="L12">
        <text:list-item>
          <text:p text:style-name="P34"><text:span text:style-name="T1">Control y temporización</text:span><text:span text:style-name="T4">26</text:span>.</text:p>
        </text:list-item>
        <text:list-item>
          <text:p text:style-name="P34"><text:span text:style-name="T1">Comunicación</text:span> con la CPU y los dispositivos<text:span text:style-name="T4">27</text:span>.</text:p>
        </text:list-item>
        <text:list-item>
          <text:p text:style-name="P34"><text:soft-page-break/><text:span text:style-name="T1">Almacenamiento temporal de datos (Buffers)</text:span><text:span text:style-name="T4">28</text:span>.</text:p>
        </text:list-item>
        <text:list-item>
          <text:p text:style-name="P34"><text:span text:style-name="T1">Detección de errores</text:span><text:span text:style-name="T4">29</text:span>.</text:p>
        </text:list-item>
      </text:list>
      <text:p text:style-name="P28">Existen tres técnicas principales para realizar la E/S<text:span text:style-name="T4">30303030</text:span>:</text:p>
      <text:list text:style-name="L13">
        <text:list-item>
          <text:p text:style-name="P35"><text:span text:style-name="T1">E/S Programada:</text:span> La CPU envía el mandato y luego se queda <text:span text:style-name="T9">esperando</text:span> (en un bucle, "busy-waiting"), comprobando el estado del módulo de E/S hasta que está listo. Es muy ineficiente<text:span text:style-name="T4">31</text:span>.</text:p>
        </text:list-item>
        <text:list-item>
          <text:p text:style-name="P35"><text:span text:style-name="T1">E/S dirigida por Interrupciones:</text:span> La CPU envía el mandato y <text:span text:style-name="T9">se va a hacer otra cosa</text:span><text:span text:style-name="T4">32</text:span>. Cuando el módulo de E/S termina, genera una <text:span text:style-name="T1">interrupción</text:span> (una señal) que avisa a la CPU. La CPU entonces detiene lo que estaba haciendo para atender la interrupción<text:span text:style-name="T4">33333333</text:span>.</text:p>
        </text:list-item>
        <text:list-item>
          <text:p text:style-name="P35"><text:span text:style-name="T1">Acceso Directo a Memoria (DMA):</text:span> Se usa para transferir grandes bloques de datos. La CPU le dice a un controlador DMA el mandato (ej. "mueve 4KB desde el disco a esta dirección de RAM"). El DMA se encarga de <text:span text:style-name="T9">toda</text:span> la transferencia sin molestar a la CPU<text:span text:style-name="T4">34</text:span>. Solo interrumpe a la CPU cuando el bloque <text:span text:style-name="T9">completo</text:span> ha sido transferido<text:span text:style-name="T4">35353535</text:span>.</text:p>
        </text:list-item>
      </text:list>
      <text:h text:style-name="P16" text:outline-level="3">2.4. Interrupciones y Modo Dual de Ejecución</text:h>
      <text:p text:style-name="P28">Las interrupciones son el mecanismo fundamental que permite al SO gestionar el HW. El ciclo de ejecución de una instrucción normal es "búsqueda" y "ejecución"<text:span text:style-name="T4">36</text:span>. Con interrupciones, tras cada ejecución, la CPU comprueba si hay una interrupción pendiente<text:span text:style-name="T4">37373737</text:span>.</text:p>
      <text:p text:style-name="P28">Si hay una interrupción <text:span text:style-name="T4">38</text:span>:</text:p>
      <text:list text:style-name="L14">
        <text:list-item>
          <text:p text:style-name="P36"><text:span text:style-name="T1">HW:</text:span> El procesador termina la instrucción actual<text:span text:style-name="T4">39</text:span>.</text:p>
        </text:list-item>
        <text:list-item>
          <text:p text:style-name="P36"><text:span text:style-name="T1">HW:</text:span> Apila (guarda en la pila) el PC y el PSW actuales<text:span text:style-name="T4">40</text:span>.</text:p>
        </text:list-item>
        <text:list-item>
          <text:p text:style-name="P36"><text:span text:style-name="T1">HW:</text:span> Carga un nuevo PC basado en el tipo de interrupción (salta a la rutina del SO que maneja esa interrupción)<text:span text:style-name="T4">41414141</text:span>.</text:p>
        </text:list-item>
        <text:list-item>
          <text:p text:style-name="P36"><text:span text:style-name="T1">SW (SO):</text:span> El SO (manejador) salva el resto del estado del proceso<text:span text:style-name="T4">42</text:span>.</text:p>
        </text:list-item>
        <text:list-item>
          <text:p text:style-name="P36"><text:span text:style-name="T1">SW (SO):</text:span> Procesa la interrupción<text:span text:style-name="T4">43</text:span>.</text:p>
        </text:list-item>
        <text:list-item>
          <text:p text:style-name="P36"><text:span text:style-name="T1">SW (SO):</text:span> Restaura el estado del proceso <text:span text:style-name="T4">44</text:span>y los antiguos PC y PSW<text:span text:style-name="T4">45</text:span>, continuando la ejecución original.</text:p>
        </text:list-item>
      </text:list>
      <text:p text:style-name="P28">Para proteger al SO de los programas de usuario (y a los programas entre sí), la CPU proporciona al menos dos modos de ejecución:</text:p>
      <text:list text:style-name="L15">
        <text:list-item>
          <text:p text:style-name="P37"><text:soft-page-break/><text:span text:style-name="T1">Modo Usuario (User Mode):</text:span> Modo restringido donde se ejecutan las aplicaciones. Ciertas instrucciones (como las de E/S o manipulación del PSW) están prohibidas.</text:p>
        </text:list-item>
        <text:list-item>
          <text:p text:style-name="P37"><text:span text:style-name="T1">Modo Kernel (Kernel Mode):</text:span> Modo privilegiado donde se ejecuta el SO. Tiene acceso total al hardware.</text:p>
        </text:list-item>
      </text:list>
      <text:p text:style-name="P28">El cambio de modo usuario a modo kernel <text:span text:style-name="T1">solo</text:span> puede ocurrir a través de tres eventos controlados por el HW<text:span text:style-name="T4">46</text:span>:</text:p>
      <text:list text:style-name="L16">
        <text:list-item>
          <text:p text:style-name="P38"><text:span text:style-name="T1">Interrupción de E/S:</text:span> Un dispositivo (HW) solicita atención<text:span text:style-name="T4">47</text:span>.</text:p>
        </text:list-item>
        <text:list-item>
          <text:p text:style-name="P38"><text:span text:style-name="T1">Excepción:</text:span> Un error en la ejecución del programa (ej. división por cero)<text:span text:style-name="T4">48</text:span>.</text:p>
        </text:list-item>
        <text:list-item>
          <text:p text:style-name="P55"><text:span text:style-name="T6">Llamada al Sistema (System Call):</text:span><text:span text:style-name="T5"> Una interrupción software </text:span><text:span text:style-name="T7">explícita</text:span><text:span text:style-name="T5"> solicitada por el programa de usuario (ej. </text:span><text:span text:style-name="Source_20_Text"><text:span text:style-name="T5">read</text:span></text:span><text:span text:style-name="T5">, </text:span><text:span text:style-name="Source_20_Text"><text:span text:style-name="T5">write</text:span></text:span><text:span text:style-name="T5">)</text:span><text:span text:style-name="T8">4949</text:span><text:span text:style-name="T5">.</text:span></text:p>
        </text:list-item>
      </text:list>
      <text:p text:style-name="P28">En los tres casos, el HW fuerza el cambio a modo kernel y salta a una dirección de memoria controlada por el SO<text:span text:style-name="T4">50505050</text:span>.</text:p>
      <text:p text:style-name="Horizontal_20_Line"/>
      <text:h text:style-name="P15" text:outline-level="2">3. Componentes y Funcionalidad de un SO</text:h>
      <text:p text:style-name="P28">El SO agrupa su funcionalidad en varios gestores o componentes <text:span text:style-name="T4">51</text:span>:</text:p>
      <text:h text:style-name="P16" text:outline-level="3">3.1. Gestor de Procesos</text:h>
      <text:p text:style-name="P29">Un proceso es el concepto clave para monitorizar un programa en ejecución52. Se compone del programa y su información de control (el PCB o Bloque de Control de Proceso) 53.</text:p>
      <text:p text:style-name="P29">El gestor se encarga de:</text:p>
      <text:list text:style-name="L17">
        <text:list-item>
          <text:p text:style-name="P39">Crear y eliminar procesos (y sus PCBs)<text:span text:style-name="T4">54</text:span>.</text:p>
        </text:list-item>
        <text:list-item>
          <text:p text:style-name="P39">Bloquear (sleep) y despertar (wakeup) procesos (ej. cuando esperan E/S)<text:span text:style-name="T4">55</text:span>.</text:p>
        </text:list-item>
        <text:list-item>
          <text:p text:style-name="P39">Proporcionar mecanismos de comunicación y sincronización entre procesos<text:span text:style-name="T4">56</text:span>.</text:p>
        </text:list-item>
      </text:list>
      <text:h text:style-name="P16" text:outline-level="3">3.2. Gestor de Memoria</text:h>
      <text:p text:style-name="P28">Se encarga de gestionar la memoria principal (RAM).</text:p>
      <text:list text:style-name="L18">
        <text:list-item>
          <text:p text:style-name="P40"><text:span text:style-name="T1">Protección:</text:span> Protege la memoria del kernel y las regiones de otros procesos<text:span text:style-name="T4">57</text:span>.</text:p>
        </text:list-item>
        <text:list-item>
          <text:p text:style-name="P40"><text:span text:style-name="T1">Compartición:</text:span> Permite que algunos procesos compartan memoria<text:span text:style-name="T4">58</text:span>.</text:p>
        </text:list-item>
        <text:list-item>
          <text:p text:style-name="P40"><text:span text:style-name="T1">Asignación/Liberación:</text:span> Asigna y libera memoria de forma automática y transparente<text:span text:style-name="T4">59</text:span>.</text:p>
        </text:list-item>
        <text:list-item>
          <text:p text:style-name="P40"><text:soft-page-break/><text:span text:style-name="T1">Seguimiento:</text:span> Mantiene información de qué memoria está en uso y por quién<text:span text:style-name="T4">60</text:span>.</text:p>
        </text:list-item>
      </text:list>
      <text:h text:style-name="P16" text:outline-level="3">3.3. Gestor de Archivos (Sistema de Archivos)</text:h>
      <text:p text:style-name="P29">Un archivo es una colección de información con nombre que reside en almacenamiento secundario (disco)61.</text:p>
      <text:p text:style-name="P29">El gestor (Sistema de Archivos) se encarga de:</text:p>
      <text:list text:style-name="L19">
        <text:list-item>
          <text:p text:style-name="P41">Crear, eliminar, copiar, renombrar archivos y directorios<text:span text:style-name="T4">62</text:span>.</text:p>
        </text:list-item>
        <text:list-item>
          <text:p text:style-name="P41">Manejar atributos de archivos (permisos, fechas, etc., a menudo en estructuras como <text:span text:style-name="T9">inodes</text:span>)<text:span text:style-name="T4">63</text:span>.</text:p>
        </text:list-item>
        <text:list-item>
          <text:p text:style-name="P41">Controlar el acceso: abrir, cerrar, leer, escribir<text:span text:style-name="T4">64</text:span>.</text:p>
        </text:list-item>
        <text:list-item>
          <text:p text:style-name="P41">Gestionar el espacio libre y asignado en el disco<text:span text:style-name="T4">65656565</text:span>.</text:p>
        </text:list-item>
      </text:list>
      <text:h text:style-name="P16" text:outline-level="3">3.4. Gestor de E/S</text:h>
      <text:p text:style-name="P28">Abstrae las particularidades del hardware.</text:p>
      <text:list text:style-name="L20">
        <text:list-item>
          <text:p text:style-name="P42">Controla los dispositivos de E/S<text:span text:style-name="T4">66</text:span>.</text:p>
        </text:list-item>
        <text:list-item>
          <text:p text:style-name="P42"><text:span text:style-name="T1">Protección:</text:span> Impide que los programas accedan directamente al HW; deben hacerlo a través de llamadas al sistema<text:span text:style-name="T4">67</text:span>.</text:p>
        </text:list-item>
        <text:list-item>
          <text:p text:style-name="P42"><text:span text:style-name="T1">Interfaz Estándar:</text:span> Proporciona una interfaz común (ej. "open, read, write") para todos los dispositivos, ocultando sus detalles<text:span text:style-name="T4">68</text:span>.</text:p>
        </text:list-item>
        <text:list-item>
          <text:p text:style-name="P42">Esto se implementa mediante <text:span text:style-name="T1">Manejadores de Dispositivo (Device Drivers)</text:span>, módulos de software específicos para cada dispositivo<text:span text:style-name="T4">69</text:span>.</text:p>
        </text:list-item>
      </text:list>
      <text:h text:style-name="P16" text:outline-level="3">3.5. Gestor de Recursos, Protección y Seguridad</text:h>
      <text:list text:style-name="L21">
        <text:list-item>
          <text:p text:style-name="P43"><text:span text:style-name="T1">Planificación:</text:span> Decide cómo asignar los recursos (CPU, memoria) de forma equitativa <text:span text:style-name="T4">70</text:span>, eficiente (maximizar productividad, minimizar respuesta) <text:span text:style-name="T4">71</text:span>y diferencial (dando prioridad a ciertos procesos si es necesario)<text:span text:style-name="T4">72</text:span>.</text:p>
        </text:list-item>
        <text:list-item>
          <text:p text:style-name="P43"><text:span text:style-name="T1">Protección:</text:span> Mecanismos para controlar el acceso de usuarios o procesos a los recursos (ej. permisos de archivos)<text:span text:style-name="T4">73</text:span>.</text:p>
        </text:list-item>
        <text:list-item>
          <text:p text:style-name="P43"><text:span text:style-name="T1">Seguridad:</text:span> Defensa contra ataques externos o internos (virus, robo de identidad, etc.)<text:span text:style-name="T4">74</text:span>.</text:p>
        </text:list-item>
      </text:list>
      <text:p text:style-name="Horizontal_20_Line"/>
      <text:h text:style-name="P15" text:outline-level="2"><text:soft-page-break/>4. Interfaces Usuario-SO y Arquitecturas</text:h>
      <text:h text:style-name="P16" text:outline-level="3">4.1. Interfaces con el SO</text:h>
      <text:p text:style-name="P28">Los usuarios y programas interactúan con el SO a través de tres interfaces principales<text:span text:style-name="T4">75</text:span>:</text:p>
      <text:list text:style-name="L22">
        <text:list-item>
          <text:p text:style-name="P44"><text:span text:style-name="T1">CLI (Command Line Interface):</text:span> Interfaz de línea de comandos, implementada a través de <text:span text:style-name="T9">shells</text:span> (ej. bash)<text:span text:style-name="T4">76</text:span>.</text:p>
        </text:list-item>
        <text:list-item>
          <text:p text:style-name="P44"><text:span text:style-name="T1">GUI (Graphic User Interface):</text:span> Interfaz gráfica (escritorio, ventanas, ratón)<text:span text:style-name="T4">77</text:span>.</text:p>
        </text:list-item>
        <text:list-item>
          <text:p text:style-name="P44"><text:span text:style-name="T1">Llamadas al Sistema (System Calls):</text:span> Es la interfaz de <text:span text:style-name="T9">programación</text:span><text:span text:style-name="T4">78</text:span>. Los programas usan una <text:span text:style-name="T1">API</text:span> (ej. la biblioteca C) que, internamente, invoca las llamadas al sistema para solicitar servicios al kernel<text:span text:style-name="T4">79797979</text:span>.</text:p>
        </text:list-item>
      </text:list>
      <text:p text:style-name="P29">Implementación de una System Call:</text:p>
      <text:p text:style-name="P29">El proceso general (ej. para un write) es 80808080:</text:p>
      <text:list text:style-name="L23">
        <text:list-item>
          <text:p text:style-name="P56"><text:span text:style-name="T6">Modo Usuario:</text:span><text:span text:style-name="T5"> El programa llama a una función de biblioteca (ej. </text:span><text:span text:style-name="Source_20_Text"><text:span text:style-name="T5">write()</text:span></text:span><text:span text:style-name="T5">)</text:span><text:span text:style-name="T8">81</text:span><text:span text:style-name="T5">.</text:span></text:p>
        </text:list-item>
        <text:list-item>
          <text:p text:style-name="P56"><text:span text:style-name="T6">Modo Usuario:</text:span><text:span text:style-name="T5"> La biblioteca prepara los parámetros (en registros o en la pila) </text:span><text:span text:style-name="T8">828282828282828282</text:span><text:span text:style-name="T5">y coloca el número de la system call (ej. '1' para </text:span><text:span text:style-name="Source_20_Text"><text:span text:style-name="T5">write</text:span></text:span><text:span text:style-name="T5"> en x86-64 </text:span><text:span text:style-name="T8">838383</text:span><text:span text:style-name="T5">) en un registro (ej. </text:span><text:span text:style-name="Source_20_Text"><text:span text:style-name="T5">%rax</text:span></text:span><text:span text:style-name="T5">)</text:span><text:span text:style-name="T8">84848484</text:span><text:span text:style-name="T5">.</text:span></text:p>
        </text:list-item>
        <text:list-item>
          <text:p text:style-name="P56"><text:span text:style-name="T6">Modo Usuario:</text:span><text:span text:style-name="T5"> La biblioteca ejecuta una instrucción especial (</text:span><text:span text:style-name="Source_20_Text"><text:span text:style-name="T5">int 0x80</text:span></text:span><text:span text:style-name="T5">, </text:span><text:span text:style-name="Source_20_Text"><text:span text:style-name="T5">syscall</text:span></text:span><text:span text:style-name="T5">) que provoca una </text:span><text:span text:style-name="T6">trampa</text:span><text:span text:style-name="T5"> (interrupción software)</text:span><text:span text:style-name="T8">858585858585858585</text:span><text:span text:style-name="T5">.</text:span></text:p>
        </text:list-item>
        <text:list-item>
          <text:p text:style-name="P45"><text:span text:style-name="T1">Modo Kernel:</text:span> El HW cambia a modo kernel <text:span text:style-name="T4">86</text:span>y salta al <text:span text:style-name="T9">manejador de llamadas</text:span> del SO<text:span text:style-name="T4">87878787</text:span>.</text:p>
        </text:list-item>
        <text:list-item>
          <text:p text:style-name="P56"><text:span text:style-name="T6">Modo Kernel:</text:span><text:span text:style-name="T5"> El manejador consulta el número en </text:span><text:span text:style-name="Source_20_Text"><text:span text:style-name="T5">%rax</text:span></text:span><text:span text:style-name="T5"> y ejecuta la rutina de servicio correspondiente (ej. </text:span><text:span text:style-name="Source_20_Text"><text:span text:style-name="T5">sys_write</text:span></text:span><text:span text:style-name="T5">)</text:span><text:span text:style-name="T8">888888888888888888</text:span><text:span text:style-name="T5">.</text:span></text:p>
        </text:list-item>
        <text:list-item>
          <text:p text:style-name="P45"><text:span text:style-name="T1">Modo Kernel:</text:span> Al terminar, el SO prepara el valor de retorno.</text:p>
        </text:list-item>
        <text:list-item>
          <text:p text:style-name="P56"><text:span text:style-name="T6">Modo Usuario:</text:span><text:span text:style-name="T5"> El SO ejecuta una instrucción de retorno especial (</text:span><text:span text:style-name="Source_20_Text"><text:span text:style-name="T5">iret</text:span></text:span><text:span text:style-name="T5">) </text:span><text:span text:style-name="T8">89</text:span><text:span text:style-name="T5"> que restaura el modo usuario y devuelve el control (y el resultado) a la biblioteca.</text:span></text:p>
        </text:list-item>
      </text:list>
      <text:h text:style-name="P16" text:outline-level="3">4.2. Estructuras/Arquitecturas de SOs</text:h>
      <text:h text:style-name="P17" text:outline-level="4">Arquitectura Monolítica</text:h>
      <text:list text:style-name="L24">
        <text:list-item>
          <text:p text:style-name="P46"><text:span text:style-name="T1">Concepto:</text:span> Es la arquitectura tradicional (usada por UNIX, Linux). El SO es un <text:span text:style-name="T1">único programa</text:span> (un gran ejecutable) que corre en modo kernel<text:span text:style-name="T4">90</text:span>.</text:p>
        </text:list-item>
        <text:list-item>
          <text:p text:style-name="P46"><text:span text:style-name="T1">Funcionamiento:</text:span> Todos los componentes (gestor de procesos, memoria, E/S, drivers) están en el mismo espacio de direcciones<text:span text:style-name="T4">91</text:span>. La comunicación entre <text:soft-page-break/>ellos es una simple llamada a procedimiento (una llamada de función), lo cual es muy <text:span text:style-name="T1">eficiente</text:span><text:span text:style-name="T4">92</text:span>.</text:p>
        </text:list-item>
        <text:list-item>
          <text:p text:style-name="P51">Problemas:</text:p>
          <text:list>
            <text:list-item>
              <text:p text:style-name="P46"><text:span text:style-name="T1">Fiabilidad:</text:span> Un fallo en un módulo (ej. un <text:span text:style-name="T9">driver</text:span>) puede colapsar todo el sistema<text:span text:style-name="T4">93</text:span>.</text:p>
            </text:list-item>
            <text:list-item>
              <text:p text:style-name="P46"><text:span text:style-name="T1">Mantenimiento:</text:span> Las dependencias entre módulos son muy complejas, lo que dificulta entender y modificar el código<text:span text:style-name="T4">94949494</text:span>.</text:p>
            </text:list-item>
          </text:list>
        </text:list-item>
      </text:list>
      <text:h text:style-name="P17" text:outline-level="4">Arquitectura Microkernel</text:h>
      <text:list text:style-name="L25">
        <text:list-item>
          <text:p text:style-name="P47"><text:span text:style-name="T1">Concepto:</text:span> Reduce el kernel al mínimo imprescindible<text:span text:style-name="T4">959595</text:span>.</text:p>
        </text:list-item>
        <text:list-item>
          <text:p text:style-name="P47"><text:span text:style-name="T1">Funcionamiento:</text:span> El microkernel (en modo kernel) solo gestiona la memoria de bajo nivel, la creación de procesos y la comunicación<text:span text:style-name="T4">96</text:span>. El resto de servicios (sistema de archivos, gestor de red, <text:span text:style-name="T9">drivers</text:span>) se ejecutan como <text:span text:style-name="T1">procesos de usuario (servidores)</text:span><text:span text:style-name="T4">979797979797979797</text:span>.</text:p>
        </text:list-item>
        <text:list-item>
          <text:p text:style-name="P47"><text:span text:style-name="T1">Modelo de servicios:</text:span> Es por <text:span text:style-name="T1">paso de mensajes</text:span><text:span text:style-name="T4">98</text:span>. Una aplicación solicita un servicio enviando un mensaje al servidor correspondiente (a través del microkernel)<text:span text:style-name="T4">99999999</text:span>.</text:p>
        </text:list-item>
        <text:list-item>
          <text:p text:style-name="P52">Ventajas:</text:p>
          <text:list>
            <text:list-item>
              <text:p text:style-name="P47"><text:span text:style-name="T1">Fiabilidad:</text:span> Si un servidor (ej. el sistema de archivos) falla, solo cae ese proceso. Se puede reiniciar sin parar el sistema<text:span text:style-name="T4">100</text:span>.</text:p>
            </text:list-item>
            <text:list-item>
              <text:p text:style-name="P47"><text:span text:style-name="T1">Extensibilidad:</text:span> Añadir nuevos servicios es tan fácil como añadir nuevos procesos de usuario<text:span text:style-name="T4">101</text:span>.</text:p>
            </text:list-item>
          </text:list>
        </text:list-item>
        <text:list-item>
          <text:p text:style-name="P52">Desventajas:</text:p>
          <text:list>
            <text:list-item>
              <text:p text:style-name="P47"><text:span text:style-name="T1">Rendimiento:</text:span> Es peor que el monolítico, ya que para obtener un servicio se requieren múltiples cambios de contexto y modo (App -&gt; Kernel -&gt; Servidor -&gt; Kernel -&gt; App), lo cual es más lento que una simple llamada a función<text:span text:style-name="T4">102</text:span>.</text:p>
            </text:list-item>
          </text:list>
        </text:list-item>
      </text:list>
      <text:p text:style-name="Horizontal_20_Line"/>
      <text:h text:style-name="P15" text:outline-level="2">5. Sistemas Operativos de Propósito Específico</text:h>
      <text:h text:style-name="P16" text:outline-level="3">5.1. SO de Tiempo Real (RTOS)</text:h>
      <text:list text:style-name="L26">
        <text:list-item>
          <text:p text:style-name="P48"><text:span text:style-name="T1">Concepto:</text:span> Se usan en sistemas de control (ej. robótica, aviónica)<text:span text:style-name="T4">103</text:span>.</text:p>
        </text:list-item>
        <text:list-item>
          <text:p text:style-name="P48"><text:span text:style-name="T1">Requisito Clave:</text:span> La corrección no solo depende del resultado lógico, sino del <text:span text:style-name="T1">tiempo</text:span> en que se produce<text:span text:style-name="T4">104</text:span>.</text:p>
        </text:list-item>
        <text:list-item>
          <text:p text:style-name="P48"><text:soft-page-break/><text:span text:style-name="T1">Objetivo:</text:span> La <text:span text:style-name="T1">planificabilidad</text:span> (schedulability), es decir, poder <text:span text:style-name="T9">garantizar</text:span> que todas las tareas críticas (procesos RT) cumplan sus plazos (deadlines)<text:span text:style-name="T4">105105105105</text:span>.</text:p>
        </text:list-item>
        <text:list-item>
          <text:p text:style-name="P53">Características:</text:p>
          <text:list>
            <text:list-item>
              <text:p text:style-name="P48"><text:span text:style-name="T1">Determinismo y Reactividad:</text:span> El sistema debe ser predecible. El tiempo para reconocer y manejar una interrupción debe ser mínimo y acotado<text:span text:style-name="T4">106106106106</text:span>.</text:p>
            </text:list-item>
            <text:list-item>
              <text:p text:style-name="P48"><text:span text:style-name="T1">Control de Prioridad:</text:span> El usuario debe poder definir prioridades estrictas<text:span text:style-name="T4">107</text:span>.</text:p>
            </text:list-item>
            <text:list-item>
              <text:p text:style-name="P48"><text:span text:style-name="T1">Fiabilidad/Estabilidad:</text:span> Si el sistema se sobrecarga, debe ser <text:span text:style-name="T9">estable</text:span>, es decir, debe seguir cumpliendo los plazos de las tareas <text:span text:style-name="T9">más críticas</text:span>, aunque falle en las menos importantes<text:span text:style-name="T4">108108108108</text:span>.</text:p>
            </text:list-item>
          </text:list>
        </text:list-item>
      </text:list>
      <text:h text:style-name="P16" text:outline-level="3">5.2. SO para Sistemas Empotrados (Embedded)</text:h>
      <text:list text:style-name="L27">
        <text:list-item>
          <text:p text:style-name="P49"><text:span text:style-name="T1">Concepto:</text:span> Un sistema empotrado es un computador que forma parte de una máquina más grande (ej. un coche, una cámara digital, un GPS) <text:span text:style-name="T4">109</text:span>.</text:p>
        </text:list-item>
        <text:list-item>
          <text:p text:style-name="P54">Características del SO (EOS):</text:p>
          <text:list>
            <text:list-item>
              <text:p text:style-name="P49"><text:span text:style-name="T1">Funcionalidad Limitada:</text:span> Solo tienen lo necesario para esa tarea<text:span text:style-name="T4">110</text:span>.</text:p>
            </text:list-item>
            <text:list-item>
              <text:p text:style-name="P49"><text:span text:style-name="T1">Robustez:</text:span> Deben ser muy fiables, ya que operan con restricciones de memoria y potencia de cómputo<text:span text:style-name="T4">111</text:span>.</text:p>
            </text:list-item>
            <text:list-item>
              <text:p text:style-name="P49">A menudo, estos sistemas <text:span text:style-name="T1">son también RTOS</text:span> porque tienen requisitos de tiempo real (ej. el sistema de frenos ABS de un coche)<text:span text:style-name="T4">112</text:span>.</text:p>
            </text:list-item>
          </text:list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9:24:52.634893119</meta:creation-date>
    <dc:date>2025-11-03T19:09:25.941059368</dc:date>
    <meta:editing-duration>PT1H5M4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8" meta:paragraph-count="135" meta:word-count="1968" meta:character-count="12481" meta:non-whitespace-character-count="10740"/>
  </office:meta>
</office:document-meta>
</file>